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27E89DD0224.png" manifest:media-type="image/png"/>
  <manifest:file-entry manifest:full-path="Pictures/10000000000003D500000280958524F4.png" manifest:media-type="image/png"/>
  <manifest:file-entry manifest:full-path="Pictures/100000000000040C0000012E49383091.jpg" manifest:media-type="image/jpeg"/>
  <manifest:file-entry manifest:full-path="Pictures/10000001000001B80000014A23D36171.png" manifest:media-type="image/png"/>
  <manifest:file-entry manifest:full-path="Pictures/1000000000000382000000E64FA0A5B7.png" manifest:media-type="image/png"/>
  <manifest:file-entry manifest:full-path="Pictures/1000000100000100000000C02D29C7E4.png" manifest:media-type="image/png"/>
  <manifest:file-entry manifest:full-path="Pictures/10000001000000270000002727B97039.png" manifest:media-type="image/png"/>
  <manifest:file-entry manifest:full-path="Pictures/1000000000000219000002191622D6D2.jpg" manifest:media-type="image/jpeg"/>
  <manifest:file-entry manifest:full-path="Pictures/1000000000000352000000C279C9AAB6.jpg" manifest:media-type="image/jpeg"/>
  <manifest:file-entry manifest:full-path="Pictures/10000000000003870000005EF2801B71.jpg" manifest:media-type="image/jpeg"/>
  <manifest:file-entry manifest:full-path="Pictures/10000000000003E70000022E37F5C892.jpg" manifest:media-type="image/jpeg"/>
  <manifest:file-entry manifest:full-path="Pictures/10000001000005AE0000021CA0F0A1A3.png" manifest:media-type="image/png"/>
  <manifest:file-entry manifest:full-path="Pictures/10000001000003AF000000D85ECA4450.png" manifest:media-type="image/png"/>
  <manifest:file-entry manifest:full-path="Pictures/10000000000001F00000011848EDB81E.jpg" manifest:media-type="image/jpeg"/>
  <manifest:file-entry manifest:full-path="Pictures/10000000000001BC000002193C1259CD.png" manifest:media-type="image/png"/>
  <manifest:file-entry manifest:full-path="Pictures/10000000000001E6000001A8AB1F3BB8.png" manifest:media-type="image/png"/>
  <manifest:file-entry manifest:full-path="Pictures/100000000000017A0000004EA11DAA4E.png" manifest:media-type="image/png"/>
  <manifest:file-entry manifest:full-path="Pictures/10000000000002DA0000021BF913477B.jpg" manifest:media-type="image/jpeg"/>
  <manifest:file-entry manifest:full-path="Pictures/10000000000005F20000033A3580BB14.jpg" manifest:media-type="image/jpeg"/>
  <manifest:file-entry manifest:full-path="Pictures/100000010000020700000187871CFFA5.png" manifest:media-type="image/png"/>
  <manifest:file-entry manifest:full-path="Pictures/10000000000002AC000001392165AB63.jpg" manifest:media-type="image/jpeg"/>
  <manifest:file-entry manifest:full-path="Pictures/10000001000000C60000004ED1B1A4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family-generic="system" style:font-pitch="variable"/>
  </office:font-face-decls>
  <office:automatic-styles>
    <style:style style:name="Table1" style:family="table" style:master-page-name="Converted8">
      <style:table-properties style:width="5.5104in" fo:margin-left="0.8722in" fo:margin-top="0in" fo:margin-bottom="0in" style:page-number="auto" table:align="left" style:writing-mode="page"/>
    </style:style>
    <style:style style:name="Table1.A" style:family="table-column">
      <style:table-column-properties style:column-width="1.6646in"/>
    </style:style>
    <style:style style:name="Table1.B" style:family="table-column">
      <style:table-column-properties style:column-width="3.8458in"/>
    </style:style>
    <style:style style:name="Table1.1" style:family="table-row">
      <style:table-row-properties style:min-row-height="0.5583in" fo:keep-together="auto"/>
    </style:style>
    <style:style style:name="Table1.A1" style:family="table-cell">
      <style:table-cell-properties fo:padding="0in" fo:border="none"/>
    </style:style>
    <style:style style:name="Table1.2" style:family="table-row">
      <style:table-row-properties style:min-row-height="0.5208in" fo:keep-together="auto"/>
    </style:style>
    <style:style style:name="Table1.3" style:family="table-row">
      <style:table-row-properties style:min-row-height="0.4146in" fo:keep-together="auto"/>
    </style:style>
    <style:style style:name="Table1.4" style:family="table-row">
      <style:table-row-properties style:min-row-height="0.4153in" fo:keep-together="auto"/>
    </style:style>
    <style:style style:name="Table1.7" style:family="table-row">
      <style:table-row-properties style:min-row-height="0.3993in" fo:keep-together="auto"/>
    </style:style>
    <style:style style:name="Table1.8" style:family="table-row">
      <style:table-row-properties style:min-row-height="0.3833in" fo:keep-together="auto"/>
    </style:style>
    <style:style style:name="Table1.9" style:family="table-row">
      <style:table-row-properties style:min-row-height="0.3986in" fo:keep-together="auto"/>
    </style:style>
    <style:style style:name="Table1.14" style:family="table-row">
      <style:table-row-properties style:min-row-height="0.2993in" fo:keep-together="auto"/>
    </style:style>
    <style:style style:name="Table2" style:family="table">
      <style:table-properties style:width="7.3854in" fo:margin-left="0.1118in" fo:margin-top="0in" fo:margin-bottom="0in" table:align="left" style:writing-mode="page"/>
    </style:style>
    <style:style style:name="Table2.A" style:family="table-column">
      <style:table-column-properties style:column-width="1.7632in"/>
    </style:style>
    <style:style style:name="Table2.B" style:family="table-column">
      <style:table-column-properties style:column-width="3.9611in"/>
    </style:style>
    <style:style style:name="Table2.C" style:family="table-column">
      <style:table-column-properties style:column-width="0.7764in"/>
    </style:style>
    <style:style style:name="Table2.D" style:family="table-column">
      <style:table-column-properties style:column-width="0.8847in"/>
    </style:style>
    <style:style style:name="Table2.1" style:family="table-row">
      <style:table-row-properties style:min-row-height="0.2229in" fo:keep-together="auto"/>
    </style:style>
    <style:style style:name="Table2.A1" style:family="table-cell">
      <style:table-cell-properties fo:padding="0in" fo:border-left="none" fo:border-right="none" fo:border-top="none" fo:border-bottom="0.5pt solid #7e7e7e"/>
    </style:style>
    <style:style style:name="Table2.2" style:family="table-row">
      <style:table-row-properties style:min-row-height="0.2514in" fo:keep-together="auto"/>
    </style:style>
    <style:style style:name="Table2.A2" style:family="table-cell">
      <style:table-cell-properties fo:background-color="#f1f1f1" fo:padding="0in" fo:border-left="none" fo:border-right="0.5pt solid #7e7e7e" fo:border-top="0.5pt solid #7e7e7e" fo:border-bottom="none">
        <style:background-image/>
      </style:table-cell-properties>
    </style:style>
    <style:style style:name="Table2.B2" style:family="table-cell">
      <style:table-cell-properties fo:background-color="#f1f1f1" fo:padding="0in" fo:border-left="0.5pt solid #7e7e7e" fo:border-right="none" fo:border-top="0.5pt solid #7e7e7e" fo:border-bottom="none">
        <style:background-image/>
      </style:table-cell-properties>
    </style:style>
    <style:style style:name="Table2.C2" style:family="table-cell">
      <style:table-cell-properties fo:background-color="#f1f1f1" fo:padding="0in" fo:border-left="none" fo:border-right="none" fo:border-top="0.5pt solid #7e7e7e" fo:border-bottom="none">
        <style:background-image/>
      </style:table-cell-properties>
    </style:style>
    <style:style style:name="Table2.3" style:family="table-row">
      <style:table-row-properties style:min-row-height="0.241in" fo:keep-together="auto"/>
    </style:style>
    <style:style style:name="Table2.A3" style:family="table-cell">
      <style:table-cell-properties fo:padding="0in" fo:border-left="none" fo:border-right="0.5pt solid #7e7e7e" fo:border-top="none" fo:border-bottom="none"/>
    </style:style>
    <style:style style:name="Table2.B3" style:family="table-cell">
      <style:table-cell-properties fo:padding="0in" fo:border-left="0.5pt solid #7e7e7e" fo:border-right="none" fo:border-top="none" fo:border-bottom="none"/>
    </style:style>
    <style:style style:name="Table2.C3" style:family="table-cell">
      <style:table-cell-properties fo:padding="0in" fo:border="none"/>
    </style:style>
    <style:style style:name="Table2.D3" style:family="table-cell">
      <style:table-cell-properties fo:padding="0in" fo:border="none"/>
    </style:style>
    <style:style style:name="Table2.4" style:family="table-row">
      <style:table-row-properties style:min-row-height="0.2528in" fo:keep-together="auto"/>
    </style:style>
    <style:style style:name="Table2.A4" style:family="table-cell">
      <style:table-cell-properties fo:background-color="#f1f1f1" fo:padding="0in" fo:border-left="none" fo:border-right="0.5pt solid #7e7e7e" fo:border-top="none" fo:border-bottom="none">
        <style:background-image/>
      </style:table-cell-properties>
    </style:style>
    <style:style style:name="Table2.B4" style:family="table-cell">
      <style:table-cell-properties fo:background-color="#f1f1f1" fo:padding="0in" fo:border-left="0.5pt solid #7e7e7e" fo:border-right="none" fo:border-top="none" fo:border-bottom="none">
        <style:background-image/>
      </style:table-cell-properties>
    </style:style>
    <style:style style:name="Table2.C4" style:family="table-cell">
      <style:table-cell-properties fo:background-color="#f1f1f1" fo:padding="0in" fo:border="none">
        <style:background-image/>
      </style:table-cell-properties>
    </style:style>
    <style:style style:name="Table2.A5" style:family="table-cell">
      <style:table-cell-properties fo:padding="0in" fo:border-left="none" fo:border-right="0.5pt solid #7e7e7e" fo:border-top="none" fo:border-bottom="none"/>
    </style:style>
    <style:style style:name="Table2.B5" style:family="table-cell">
      <style:table-cell-properties fo:padding="0in" fo:border-left="0.5pt solid #7e7e7e" fo:border-right="none" fo:border-top="none" fo:border-bottom="none"/>
    </style:style>
    <style:style style:name="Table2.C5" style:family="table-cell">
      <style:table-cell-properties fo:padding="0in" fo:border="none"/>
    </style:style>
    <style:style style:name="Table2.D5" style:family="table-cell">
      <style:table-cell-properties fo:padding="0in" fo:border="none"/>
    </style:style>
    <style:style style:name="Table2.6" style:family="table-row">
      <style:table-row-properties style:min-row-height="0.3729in" fo:keep-together="auto"/>
    </style:style>
    <style:style style:name="Table2.A7" style:family="table-cell">
      <style:table-cell-properties fo:padding="0in" fo:border-left="none" fo:border-right="0.5pt solid #7e7e7e" fo:border-top="none" fo:border-bottom="none"/>
    </style:style>
    <style:style style:name="Table2.B7" style:family="table-cell">
      <style:table-cell-properties fo:padding="0in" fo:border-left="0.5pt solid #7e7e7e" fo:border-right="none" fo:border-top="none" fo:border-bottom="none"/>
    </style:style>
    <style:style style:name="Table2.C7" style:family="table-cell">
      <style:table-cell-properties fo:padding="0in" fo:border="none"/>
    </style:style>
    <style:style style:name="Table2.D7" style:family="table-cell">
      <style:table-cell-properties fo:padding="0in" fo:border="none"/>
    </style:style>
    <style:style style:name="Table2.8" style:family="table-row">
      <style:table-row-properties style:min-row-height="0.1861in" fo:keep-together="auto"/>
    </style:style>
    <style:style style:name="Table2.A9" style:family="table-cell">
      <style:table-cell-properties fo:padding="0in" fo:border-left="none" fo:border-right="0.5pt solid #7e7e7e" fo:border-top="none" fo:border-bottom="none"/>
    </style:style>
    <style:style style:name="Table2.B9" style:family="table-cell">
      <style:table-cell-properties fo:padding="0in" fo:border-left="0.5pt solid #7e7e7e" fo:border-right="none" fo:border-top="none" fo:border-bottom="none"/>
    </style:style>
    <style:style style:name="Table2.C9" style:family="table-cell">
      <style:table-cell-properties fo:padding="0in" fo:border="none"/>
    </style:style>
    <style:style style:name="Table2.D9" style:family="table-cell">
      <style:table-cell-properties fo:padding="0in" fo:border="none"/>
    </style:style>
    <style:style style:name="Table2.A11" style:family="table-cell">
      <style:table-cell-properties fo:padding="0in" fo:border-left="none" fo:border-right="0.5pt solid #7e7e7e" fo:border-top="none" fo:border-bottom="none"/>
    </style:style>
    <style:style style:name="Table2.B11" style:family="table-cell">
      <style:table-cell-properties fo:padding="0in" fo:border-left="0.5pt solid #7e7e7e" fo:border-right="none" fo:border-top="none" fo:border-bottom="none"/>
    </style:style>
    <style:style style:name="Table2.C11" style:family="table-cell">
      <style:table-cell-properties fo:padding="0in" fo:border="none"/>
    </style:style>
    <style:style style:name="Table2.D11" style:family="table-cell">
      <style:table-cell-properties fo:padding="0in" fo:border="none"/>
    </style:style>
    <style:style style:name="Table2.12" style:family="table-row">
      <style:table-row-properties style:min-row-height="0.2417in" fo:keep-together="auto"/>
    </style:style>
    <style:style style:name="Table2.A13" style:family="table-cell">
      <style:table-cell-properties fo:padding="0in" fo:border-left="none" fo:border-right="0.5pt solid #7e7e7e" fo:border-top="none" fo:border-bottom="none"/>
    </style:style>
    <style:style style:name="Table2.B13" style:family="table-cell">
      <style:table-cell-properties fo:padding="0in" fo:border-left="0.5pt solid #7e7e7e" fo:border-right="none" fo:border-top="none" fo:border-bottom="none"/>
    </style:style>
    <style:style style:name="Table2.C13" style:family="table-cell">
      <style:table-cell-properties fo:padding="0in" fo:border="none"/>
    </style:style>
    <style:style style:name="Table2.D13" style:family="table-cell">
      <style:table-cell-properties fo:padding="0in" fo:border="none"/>
    </style:style>
    <style:style style:name="Table2.A15" style:family="table-cell">
      <style:table-cell-properties fo:padding="0in" fo:border-left="none" fo:border-right="0.5pt solid #7e7e7e" fo:border-top="none" fo:border-bottom="none"/>
    </style:style>
    <style:style style:name="Table2.B15" style:family="table-cell">
      <style:table-cell-properties fo:padding="0in" fo:border-left="0.5pt solid #7e7e7e" fo:border-right="none" fo:border-top="none" fo:border-bottom="none"/>
    </style:style>
    <style:style style:name="Table2.C15" style:family="table-cell">
      <style:table-cell-properties fo:padding="0in" fo:border="none"/>
    </style:style>
    <style:style style:name="Table2.D15" style:family="table-cell">
      <style:table-cell-properties fo:padding="0in" fo:border="none"/>
    </style:style>
    <style:style style:name="Table2.A17" style:family="table-cell">
      <style:table-cell-properties fo:padding="0in" fo:border-left="none" fo:border-right="0.5pt solid #7e7e7e" fo:border-top="none" fo:border-bottom="none"/>
    </style:style>
    <style:style style:name="Table2.B17" style:family="table-cell">
      <style:table-cell-properties fo:padding="0in" fo:border-left="0.5pt solid #7e7e7e" fo:border-right="none" fo:border-top="none" fo:border-bottom="none"/>
    </style:style>
    <style:style style:name="Table2.C17" style:family="table-cell">
      <style:table-cell-properties fo:padding="0in" fo:border="none"/>
    </style:style>
    <style:style style:name="Table2.D17" style:family="table-cell">
      <style:table-cell-properties fo:padding="0in" fo:border="none"/>
    </style:style>
    <style:style style:name="Table2.18" style:family="table-row">
      <style:table-row-properties style:min-row-height="0.6097in" fo:keep-together="auto"/>
    </style:style>
    <style:style style:name="Table2.A19" style:family="table-cell">
      <style:table-cell-properties fo:padding="0in" fo:border-left="none" fo:border-right="0.5pt solid #7e7e7e" fo:border-top="none" fo:border-bottom="none"/>
    </style:style>
    <style:style style:name="Table2.B19" style:family="table-cell">
      <style:table-cell-properties fo:padding="0in" fo:border-left="0.5pt solid #7e7e7e" fo:border-right="none" fo:border-top="none" fo:border-bottom="none"/>
    </style:style>
    <style:style style:name="Table2.C19" style:family="table-cell">
      <style:table-cell-properties fo:padding="0in" fo:border="none"/>
    </style:style>
    <style:style style:name="Table2.D19" style:family="table-cell">
      <style:table-cell-properties fo:padding="0in" fo:border="none"/>
    </style:style>
    <style:style style:name="Table2.20" style:family="table-row">
      <style:table-row-properties style:min-row-height="0.2535in" fo:keep-together="auto"/>
    </style:style>
    <style:style style:name="Table2.21" style:family="table-row">
      <style:table-row-properties style:min-row-height="0.3715in" fo:keep-together="auto"/>
    </style:style>
    <style:style style:name="Table2.A21" style:family="table-cell">
      <style:table-cell-properties fo:padding="0in" fo:border-left="none" fo:border-right="0.5pt solid #7e7e7e" fo:border-top="none" fo:border-bottom="none"/>
    </style:style>
    <style:style style:name="Table2.B21" style:family="table-cell">
      <style:table-cell-properties fo:padding="0in" fo:border-left="0.5pt solid #7e7e7e" fo:border-right="none" fo:border-top="none" fo:border-bottom="none"/>
    </style:style>
    <style:style style:name="Table2.C21" style:family="table-cell">
      <style:table-cell-properties fo:padding="0in" fo:border="none"/>
    </style:style>
    <style:style style:name="Table2.D21" style:family="table-cell">
      <style:table-cell-properties fo:padding="0in" fo:border="none"/>
    </style:style>
    <style:style style:name="P1" style:family="paragraph" style:parent-style-name="Text_20_body" style:master-page-name="Standard">
      <style:paragraph-properties fo:margin-top="0.0457in" fo:margin-bottom="0in" style:contextual-spacing="false" style:page-number="auto"/>
      <style:text-properties fo:font-size="8pt" style:font-size-asian="8pt"/>
    </style:style>
    <style:style style:name="P2" style:family="paragraph" style:parent-style-name="Standard">
      <style:paragraph-properties fo:margin-left="2.2752in" fo:margin-right="2.4665in" fo:margin-top="0in" fo:margin-bottom="0in" style:contextual-spacing="false" fo:text-align="center" style:justify-single-word="false" fo:text-indent="0in" style:auto-text-indent="false"/>
    </style:style>
    <style:style style:name="P3" style:family="paragraph" style:parent-style-name="Standard">
      <style:paragraph-properties fo:margin-left="2.2728in" fo:margin-right="2.4665in" fo:margin-top="0.0209in" fo:margin-bottom="0in" style:contextual-spacing="false" fo:text-align="center" style:justify-single-word="false" fo:text-indent="0in" style:auto-text-indent="false"/>
    </style:style>
    <style:style style:name="P4" style:family="paragraph" style:parent-style-name="Standard">
      <style:paragraph-properties fo:margin-left="2.2728in" fo:margin-right="2.4665in" fo:margin-top="0.0189in" fo:margin-bottom="0in" style:contextual-spacing="false" fo:line-height="115%" fo:text-align="center" style:justify-single-word="false" fo:text-indent="0in" style:auto-text-indent="false"/>
    </style:style>
    <style:style style:name="P5" style:family="paragraph" style:parent-style-name="Text_20_body">
      <style:paragraph-properties fo:margin-top="0.0028in" fo:margin-bottom="0in" style:contextual-spacing="false"/>
      <style:text-properties style:font-name="Arial" fo:font-size="3pt" fo:font-weight="bold" style:font-size-asian="3pt" style:font-weight-asian="bold"/>
    </style:style>
    <style:style style:name="P6" style:family="paragraph" style:parent-style-name="Text_20_body">
      <style:text-properties style:font-name="Arial" fo:font-size="18pt" fo:font-weight="bold" style:font-size-asian="18pt" style:font-weight-asian="bold"/>
    </style:style>
    <style:style style:name="P7" style:family="paragraph" style:parent-style-name="Text_20_body">
      <style:paragraph-properties fo:margin-top="0.0508in" fo:margin-bottom="0in" style:contextual-spacing="false"/>
      <style:text-properties style:font-name="Arial" fo:font-size="18pt" fo:font-weight="bold" style:font-size-asian="18pt" style:font-weight-asian="bold"/>
    </style:style>
    <style:style style:name="P8" style:family="paragraph">
      <loext:graphic-properties draw:fill="none"/>
      <style:paragraph-properties fo:text-align="left"/>
      <style:text-properties fo:font-size="18pt"/>
    </style:style>
    <style:style style:name="P9" style:family="paragraph" style:parent-style-name="Standard">
      <style:paragraph-properties fo:margin-left="1.7465in" fo:margin-right="1.9417in" fo:margin-top="0in" fo:margin-bottom="0in" style:contextual-spacing="false" fo:line-height="115%" fo:text-align="center" style:justify-single-word="false" fo:text-indent="0in" style:auto-text-indent="false"/>
    </style:style>
    <style:style style:name="P10" style:family="paragraph" style:parent-style-name="Text_20_body">
      <style:text-properties style:font-name="Calibri" fo:font-size="10pt" fo:font-weight="bold" style:font-size-asian="10pt" style:font-weight-asian="bold"/>
    </style:style>
    <style:style style:name="P11" style:family="paragraph">
      <loext:graphic-properties draw:fill="none"/>
      <style:paragraph-properties fo:text-align="left"/>
      <style:text-properties fo:font-size="11pt"/>
    </style:style>
    <style:style style:name="P12" style:family="paragraph" style:parent-style-name="Standard">
      <style:paragraph-properties fo:margin-left="0.1035in" fo:margin-right="0.1035in" fo:margin-top="0.0516in" fo:margin-bottom="0in" style:contextual-spacing="false" fo:line-height="103%" fo:text-align="center" style:justify-single-word="false" fo:text-indent="-0.0028in" style:auto-text-indent="false"/>
    </style:style>
    <style:style style:name="P13" style:family="paragraph">
      <loext:graphic-properties draw:fill="solid" draw:fill-color="#ffffff"/>
      <style:paragraph-properties fo:text-align="left"/>
    </style:style>
    <style:style style:name="P14" style:family="paragraph" style:parent-style-name="Title">
      <style:paragraph-properties fo:margin-left="2.2728in" fo:margin-right="2.4693in" fo:margin-top="0.1783in" fo:margin-bottom="0in" style:contextual-spacing="false"/>
    </style:style>
    <style:style style:name="P15" style:family="paragraph" style:parent-style-name="Standard">
      <style:paragraph-properties fo:margin-left="-0.0008in" fo:margin-right="0.1965in" fo:margin-top="0.0681in" fo:margin-bottom="0in" style:contextual-spacing="false" fo:text-align="center" style:justify-single-word="false" fo:text-indent="0in" style:auto-text-indent="false">
        <style:tab-stops>
          <style:tab-stop style:position="3.9484in"/>
        </style:tab-stops>
      </style:paragraph-properties>
      <style:text-properties style:font-name="Trebuchet MS" fo:font-size="22pt" officeooo:rsid="0010e7de" style:font-size-asian="22pt" style:text-scale="65%"/>
    </style:style>
    <style:style style:name="P16" style:family="paragraph" style:parent-style-name="Standard">
      <style:paragraph-properties fo:margin-left="-0.0008in" fo:margin-right="0.1965in" fo:margin-top="0.0681in" fo:margin-bottom="0in" style:contextual-spacing="false" fo:text-align="center" style:justify-single-word="false" fo:text-indent="0in" style:auto-text-indent="false">
        <style:tab-stops>
          <style:tab-stop style:position="3.9484in"/>
        </style:tab-stops>
      </style:paragraph-properties>
    </style:style>
    <style:style style:name="P17" style:family="paragraph" style:parent-style-name="Standard">
      <style:paragraph-properties fo:margin-left="-0.0008in" fo:margin-right="0.1965in" fo:margin-top="0.0681in" fo:margin-bottom="0in" style:contextual-spacing="false" fo:text-align="center" style:justify-single-word="false" fo:text-indent="0in" style:auto-text-indent="false">
        <style:tab-stops>
          <style:tab-stop style:position="3.9484in"/>
        </style:tab-stops>
      </style:paragraph-properties>
      <style:text-properties style:font-name="Trebuchet MS" fo:font-size="22pt" fo:letter-spacing="-0.0016in" style:font-size-asian="22pt" style:text-scale="65%"/>
    </style:style>
    <style:style style:name="P18" style:family="paragraph" style:parent-style-name="Standard">
      <style:paragraph-properties fo:margin-left="2.2728in" fo:margin-right="2.4693in" fo:margin-top="0.0681in" fo:margin-bottom="0in" style:contextual-spacing="false" fo:text-align="center" style:justify-single-word="false" fo:text-indent="0in" style:auto-text-indent="false"/>
    </style:style>
    <style:style style:name="P19" style:family="paragraph" style:parent-style-name="Text_20_body">
      <style:text-properties style:font-name="Trebuchet MS" fo:font-size="14pt" style:font-size-asian="14pt"/>
    </style:style>
    <style:style style:name="P20" style:family="paragraph" style:parent-style-name="Heading_20_4">
      <style:paragraph-properties fo:margin-left="0.2417in" fo:margin-right="0in" fo:text-align="center" style:justify-single-word="false" fo:text-indent="0in" style:auto-text-indent="false"/>
    </style:style>
    <style:style style:name="P21" style:family="paragraph" style:parent-style-name="Standard">
      <style:paragraph-properties fo:margin-left="2.2752in" fo:margin-right="2.4665in" fo:margin-top="0in" fo:margin-bottom="0in" style:contextual-spacing="false" fo:text-align="center" style:justify-single-word="false" fo:text-indent="0in" style:auto-text-indent="false"/>
      <style:text-properties fo:color="#0d0d0d" loext:opacity="100%" style:font-name="Cambria" fo:font-size="10pt" style:font-size-asian="10pt"/>
    </style:style>
    <style:style style:name="P22" style:family="paragraph" style:parent-style-name="Standard">
      <style:paragraph-properties fo:margin-left="0.0571in" fo:margin-right="0.2543in" fo:margin-top="0.0126in" fo:margin-bottom="0in" style:contextual-spacing="false" fo:text-align="center" style:justify-single-word="false" fo:text-indent="0in" style:auto-text-indent="false"/>
      <style:text-properties fo:font-size="16pt" style:font-size-asian="16pt" style:font-size-complex="16pt"/>
    </style:style>
    <style:style style:name="P23" style:family="paragraph" style:parent-style-name="Contents_20_2">
      <style:paragraph-properties fo:margin-top="0.4366in" fo:margin-bottom="0in" style:contextual-spacing="false">
        <style:tab-stops>
          <style:tab-stop style:position="7.3709in" style:type="right" style:leader-style="dotted" style:leader-text="."/>
        </style:tab-stops>
      </style:paragraph-properties>
    </style:style>
    <style:style style:name="P24" style:family="paragraph" style:parent-style-name="Contents_20_2">
      <style:paragraph-properties fo:margin-top="0.0839in" fo:margin-bottom="0in" style:contextual-spacing="false">
        <style:tab-stops>
          <style:tab-stop style:position="7.3709in" style:type="right" style:leader-style="dotted" style:leader-text="."/>
        </style:tab-stops>
      </style:paragraph-properties>
    </style:style>
    <style:style style:name="P25" style:family="paragraph" style:parent-style-name="Contents_20_2">
      <style:paragraph-properties fo:margin-top="0.0846in" fo:margin-bottom="0in" style:contextual-spacing="false">
        <style:tab-stops>
          <style:tab-stop style:position="7.3709in" style:type="right" style:leader-style="dotted" style:leader-text="."/>
        </style:tab-stops>
      </style:paragraph-properties>
    </style:style>
    <style:style style:name="P26" style:family="paragraph" style:parent-style-name="Contents_20_2">
      <style:paragraph-properties>
        <style:tab-stops>
          <style:tab-stop style:position="7.3709in" style:type="right" style:leader-style="dotted" style:leader-text="."/>
        </style:tab-stops>
      </style:paragraph-properties>
    </style:style>
    <style:style style:name="P27" style:family="paragraph" style:parent-style-name="Contents_20_2">
      <style:paragraph-properties fo:margin-top="0.0854in" fo:margin-bottom="0in" style:contextual-spacing="false">
        <style:tab-stops>
          <style:tab-stop style:position="7.3709in" style:type="right" style:leader-style="dotted" style:leader-text="."/>
        </style:tab-stops>
      </style:paragraph-properties>
    </style:style>
    <style:style style:name="P28" style:family="paragraph" style:parent-style-name="Contents_20_2">
      <style:paragraph-properties fo:margin-top="0.0846in" fo:margin-bottom="0in" style:contextual-spacing="false">
        <style:tab-stops>
          <style:tab-stop style:position="7.3717in" style:type="right" style:leader-style="dotted" style:leader-text="."/>
        </style:tab-stops>
      </style:paragraph-properties>
    </style:style>
    <style:style style:name="P29" style:family="paragraph" style:parent-style-name="Contents_20_2">
      <style:paragraph-properties>
        <style:tab-stops>
          <style:tab-stop style:position="7.3717in" style:type="right" style:leader-style="dotted" style:leader-text="."/>
        </style:tab-stops>
      </style:paragraph-properties>
    </style:style>
    <style:style style:name="P30" style:family="paragraph" style:parent-style-name="Contents_20_1">
      <style:paragraph-properties fo:margin-top="0.0862in" fo:margin-bottom="0in" style:contextual-spacing="false">
        <style:tab-stops>
          <style:tab-stop style:position="7.3717in" style:type="right" style:leader-style="dotted" style:leader-text="."/>
        </style:tab-stops>
      </style:paragraph-properties>
    </style:style>
    <style:style style:name="P31" style:family="paragraph" style:parent-style-name="Contents_20_3" style:list-style-name="WWNum1">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32" style:family="paragraph" style:parent-style-name="Contents_20_3" style:list-style-name="WWNum1">
      <style:paragraph-properties fo:margin-left="0.4898in" fo:margin-right="0in" fo:margin-top="0.0854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33" style:family="paragraph" style:parent-style-name="Contents_20_1">
      <style:paragraph-properties>
        <style:tab-stops>
          <style:tab-stop style:position="7.3717in" style:type="right" style:leader-style="dotted" style:leader-text="."/>
        </style:tab-stops>
      </style:paragraph-properties>
    </style:style>
    <style:style style:name="P34" style:family="paragraph" style:parent-style-name="Contents_20_3" style:list-style-name="WWNum2">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35" style:family="paragraph" style:parent-style-name="Contents_20_3" style:list-style-name="WWNum2">
      <style:paragraph-properties fo:margin-left="0.4898in" fo:margin-right="0in" fo:margin-top="0.0854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36" style:family="paragraph" style:parent-style-name="Contents_20_1">
      <style:paragraph-properties fo:margin-top="0.0854in" fo:margin-bottom="0in" style:contextual-spacing="false">
        <style:tab-stops>
          <style:tab-stop style:position="7.3717in" style:type="right" style:leader-style="dotted" style:leader-text="."/>
        </style:tab-stops>
      </style:paragraph-properties>
    </style:style>
    <style:style style:name="P37" style:family="paragraph" style:parent-style-name="Contents_20_3" style:list-style-name="WWNum3">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38" style:family="paragraph" style:parent-style-name="Contents_20_3" style:list-style-name="WWNum3">
      <style:paragraph-properties fo:margin-left="0.4898in" fo:margin-right="0in" fo:margin-top="0.0854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39" style:family="paragraph" style:parent-style-name="Contents_20_3" style:list-style-name="WWNum3">
      <style:paragraph-properties fo:margin-left="0.4898in" fo:margin-right="0in" fo:margin-top="0.0839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0" style:family="paragraph" style:parent-style-name="Contents_20_3" style:list-style-name="WWNum3">
      <style:paragraph-properties fo:margin-left="0.4898in" fo:margin-right="0in" fo:margin-top="0.0846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1" style:family="paragraph" style:parent-style-name="Contents_20_1">
      <style:paragraph-properties fo:margin-top="0.0839in" fo:margin-bottom="0in" style:contextual-spacing="false">
        <style:tab-stops>
          <style:tab-stop style:position="7.3717in" style:type="right" style:leader-style="dotted" style:leader-text="."/>
        </style:tab-stops>
      </style:paragraph-properties>
    </style:style>
    <style:style style:name="P42" style:family="paragraph" style:parent-style-name="Contents_20_3" style:list-style-name="WWNum4">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3" style:family="paragraph" style:parent-style-name="Contents_20_3" style:list-style-name="WWNum4">
      <style:paragraph-properties fo:margin-left="0.4898in" fo:margin-right="0in" fo:margin-top="0.0846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4" style:family="paragraph" style:parent-style-name="Contents_20_3" style:list-style-name="WWNum4">
      <style:paragraph-properties fo:margin-left="0.4898in" fo:margin-right="0in" fo:margin-top="0.0839in" fo:margin-bottom="0.0138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5" style:family="paragraph" style:parent-style-name="Contents_20_3" style:list-style-name="WWNum5">
      <style:paragraph-properties fo:margin-left="0.4898in" fo:margin-right="0in" fo:margin-top="0.0429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6" style:family="paragraph" style:parent-style-name="Contents_20_3" style:list-style-name="WWNum6">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7" style:family="paragraph" style:parent-style-name="Contents_20_3" style:list-style-name="WWNum7">
      <style:paragraph-properties fo:margin-left="0.4898in" fo:margin-right="0in" fo:margin-top="0.0854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8" style:family="paragraph" style:parent-style-name="Contents_20_3" style:list-style-name="WWNum7">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49" style:family="paragraph" style:parent-style-name="Contents_20_3" style:list-style-name="WWNum8">
      <style:paragraph-properties fo:margin-left="0.4898in" fo:margin-right="0in" fo:margin-top="0.0854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50" style:family="paragraph" style:parent-style-name="Contents_20_3" style:list-style-name="WWNum8">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51" style:family="paragraph" style:parent-style-name="Contents_20_3" style:list-style-name="WWNum8">
      <style:paragraph-properties fo:margin-left="0.528in" fo:margin-right="0in" fo:margin-top="0.0835in" fo:margin-bottom="0in" style:contextual-spacing="false" fo:line-height="100%" fo:text-align="left" style:justify-single-word="false" fo:text-indent="-0.2681in" style:auto-text-indent="false">
        <style:tab-stops>
          <style:tab-stop style:position="0.528in"/>
          <style:tab-stop style:position="7.3717in" style:type="right" style:leader-style="dotted" style:leader-text="."/>
        </style:tab-stops>
      </style:paragraph-properties>
    </style:style>
    <style:style style:name="P52" style:family="paragraph" style:parent-style-name="Contents_20_3" style:list-style-name="WWNum9">
      <style:paragraph-properties fo:margin-left="0.4898in" fo:margin-right="0in" fo:margin-top="0.0835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53" style:family="paragraph" style:parent-style-name="Contents_20_3" style:list-style-name="WWNum9">
      <style:paragraph-properties fo:margin-left="0.4898in" fo:margin-right="0in" fo:margin-top="0.0854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54" style:family="paragraph" style:parent-style-name="Contents_20_3" style:list-style-name="WWNum9">
      <style:paragraph-properties fo:margin-left="0.4898in" fo:margin-right="0in" fo:margin-top="0.0839in" fo:margin-bottom="0in" style:contextual-spacing="false" fo:line-height="100%" fo:text-align="left" style:justify-single-word="false" fo:text-indent="-0.2299in" style:auto-text-indent="false">
        <style:tab-stops>
          <style:tab-stop style:position="0.4898in"/>
          <style:tab-stop style:position="7.3717in" style:type="right" style:leader-style="dotted" style:leader-text="."/>
        </style:tab-stops>
      </style:paragraph-properties>
    </style:style>
    <style:style style:name="P55" style:family="paragraph" style:parent-style-name="Heading_20_1" style:master-page-name="Converted2">
      <style:paragraph-properties fo:margin-top="0.0425in" fo:margin-bottom="0in" style:contextual-spacing="false" style:page-number="auto"/>
    </style:style>
    <style:style style:name="P56" style:family="paragraph" style:parent-style-name="Text_20_body">
      <style:paragraph-properties fo:margin-top="0.0866in" fo:margin-bottom="0in" style:contextual-spacing="false"/>
      <style:text-properties fo:font-size="22pt" fo:font-weight="bold" style:font-size-asian="22pt" style:font-weight-asian="bold"/>
    </style:style>
    <style:style style:name="P57" style:family="paragraph" style:parent-style-name="Standard">
      <style:paragraph-properties fo:margin-left="0.1811in" fo:margin-right="0.372in" fo:margin-top="0in" fo:margin-bottom="0in" style:contextual-spacing="false" fo:line-height="115%" fo:text-align="center" style:justify-single-word="false" fo:text-indent="-0.0008in" style:auto-text-indent="false"/>
    </style:style>
    <style:style style:name="P58" style:family="paragraph" style:parent-style-name="Text_20_body">
      <style:paragraph-properties fo:margin-top="0.039in" fo:margin-bottom="0in" style:contextual-spacing="false"/>
      <style:text-properties style:font-name="Cambria" fo:font-size="16pt" style:font-size-asian="16pt"/>
    </style:style>
    <style:style style:name="P59" style:family="paragraph" style:parent-style-name="Standard">
      <style:paragraph-properties fo:margin-left="0.2846in" fo:margin-right="0.4744in" fo:margin-top="0in" fo:margin-bottom="0in" style:contextual-spacing="false" fo:line-height="115%" fo:text-align="center" style:justify-single-word="false" fo:text-indent="0.0016in" style:auto-text-indent="false"/>
    </style:style>
    <style:style style:name="P60" style:family="paragraph" style:parent-style-name="Standard">
      <style:paragraph-properties fo:margin-left="0in" fo:margin-right="0.1874in" fo:margin-top="0.0008in" fo:margin-bottom="0in" style:contextual-spacing="false" fo:text-align="center" style:justify-single-word="false" fo:text-indent="0in" style:auto-text-indent="false"/>
    </style:style>
    <style:style style:name="P61" style:family="paragraph" style:parent-style-name="Heading_20_2" style:master-page-name="Converted3">
      <style:paragraph-properties fo:margin-left="2.2728in" fo:margin-right="2.4665in" fo:margin-top="0.0417in" fo:margin-bottom="0in" style:contextual-spacing="false" fo:text-align="center" style:justify-single-word="false" style:page-number="auto"/>
    </style:style>
    <style:style style:name="P62" style:family="paragraph" style:parent-style-name="Text_20_body">
      <style:paragraph-properties fo:margin-top="0.1161in" fo:margin-bottom="0in" style:contextual-spacing="false"/>
      <style:text-properties fo:font-size="20pt" fo:font-weight="bold" style:font-size-asian="20pt" style:font-weight-asian="bold"/>
    </style:style>
    <style:style style:name="P63" style:family="paragraph" style:parent-style-name="Standard">
      <style:paragraph-properties fo:margin-left="0.0571in" fo:margin-right="0.2465in" fo:margin-top="0in" fo:margin-bottom="0in" style:contextual-spacing="false" fo:line-height="115%" fo:text-align="center" style:justify-single-word="false" fo:text-indent="0in" style:auto-text-indent="false"/>
    </style:style>
    <style:style style:name="P64" style:family="paragraph" style:parent-style-name="Standard">
      <style:paragraph-properties fo:margin-left="0.0575in" fo:margin-right="0.2465in" fo:margin-top="0.0008in" fo:margin-bottom="0in" style:contextual-spacing="false" fo:line-height="115%" fo:text-align="center" style:justify-single-word="false" fo:text-indent="0in" style:auto-text-indent="false"/>
    </style:style>
    <style:style style:name="P65" style:family="paragraph" style:parent-style-name="Heading_20_1" style:master-page-name="Converted4">
      <style:paragraph-properties fo:margin-left="3.0957in" fo:margin-right="0in" fo:margin-top="0.0409in" fo:margin-bottom="0in" style:contextual-spacing="false" fo:text-align="left" style:justify-single-word="false" style:page-number="auto"/>
      <style:text-properties fo:letter-spacing="-0.0016in"/>
    </style:style>
    <style:style style:name="P66" style:family="paragraph" style:parent-style-name="Text_20_body">
      <style:text-properties fo:font-size="22pt" fo:font-weight="bold" style:font-size-asian="22pt" style:font-weight-asian="bold"/>
    </style:style>
    <style:style style:name="P67" style:family="paragraph" style:parent-style-name="Text_20_body">
      <style:paragraph-properties fo:margin-top="0.0874in" fo:margin-bottom="0in" style:contextual-spacing="false"/>
      <style:text-properties fo:font-size="22pt" fo:font-weight="bold" style:font-size-asian="22pt" style:font-weight-asian="bold"/>
    </style:style>
    <style:style style:name="P68" style:family="paragraph" style:parent-style-name="Standard">
      <style:paragraph-properties fo:margin-left="0.5984in" fo:margin-right="0in" fo:margin-top="0.0008in" fo:margin-bottom="0in" style:contextual-spacing="false" fo:text-align="left" style:justify-single-word="false" fo:text-indent="0in" style:auto-text-indent="false"/>
    </style:style>
    <style:style style:name="P69" style:family="paragraph" style:parent-style-name="Standard">
      <style:paragraph-properties fo:margin-left="3.0571in" fo:margin-right="0.4618in" fo:margin-top="0.1728in" fo:margin-bottom="0in" style:contextual-spacing="false" fo:line-height="177%" fo:text-align="left" style:justify-single-word="false" fo:text-indent="0in" style:auto-text-indent="false"/>
    </style:style>
    <style:style style:name="P70" style:family="paragraph" style:parent-style-name="Text_20_body">
      <style:paragraph-properties fo:margin-top="0.1736in" fo:margin-bottom="0in" style:contextual-spacing="false"/>
      <style:text-properties fo:font-size="14pt" fo:font-style="italic" style:font-size-asian="14pt" style:font-style-asian="italic"/>
    </style:style>
    <style:style style:name="P71" style:family="paragraph" style:parent-style-name="Standard">
      <style:paragraph-properties fo:margin-left="0.5984in" fo:margin-right="0in" fo:margin-top="0in" fo:margin-bottom="0in" style:contextual-spacing="false" fo:text-align="left" style:justify-single-word="false" fo:text-indent="0in" style:auto-text-indent="false"/>
    </style:style>
    <style:style style:name="P72" style:family="paragraph" style:parent-style-name="Standard">
      <style:paragraph-properties fo:margin-left="0.6953in" fo:margin-right="0in" fo:margin-top="0.1717in" fo:margin-bottom="0in" style:contextual-spacing="false" fo:text-align="left" style:justify-single-word="false" fo:text-indent="0in" style:auto-text-indent="false"/>
    </style:style>
    <style:style style:name="P73" style:family="paragraph" style:parent-style-name="Standard">
      <style:paragraph-properties fo:margin-left="0.889in" fo:margin-right="1.3236in" fo:margin-top="0.1728in" fo:margin-bottom="0in" style:contextual-spacing="false" fo:line-height="177%" fo:text-align="left" style:justify-single-word="false" fo:text-indent="-0.0972in" style:auto-text-indent="false"/>
    </style:style>
    <style:style style:name="P74" style:family="paragraph" style:parent-style-name="Standard">
      <style:paragraph-properties fo:margin-left="1.0902in" fo:margin-right="2.2673in" fo:margin-top="0in" fo:margin-bottom="0in" style:contextual-spacing="false" fo:line-height="177%" fo:text-align="left" style:justify-single-word="false" fo:text-indent="0.0965in" style:auto-text-indent="false"/>
    </style:style>
    <style:style style:name="P75" style:family="paragraph" style:parent-style-name="Standard">
      <style:paragraph-properties fo:margin-left="0.7437in" fo:margin-right="0in" fo:margin-top="0.002in" fo:margin-bottom="0in" style:contextual-spacing="false" fo:text-align="left" style:justify-single-word="false" fo:text-indent="0in" style:auto-text-indent="false"/>
    </style:style>
    <style:style style:name="P76" style:family="paragraph" style:parent-style-name="Standard">
      <style:paragraph-properties fo:margin-left="0.3in" fo:margin-right="0in" fo:margin-top="0.1717in" fo:margin-bottom="0in" style:contextual-spacing="false" fo:text-align="left" style:justify-single-word="false" fo:text-indent="0in" style:auto-text-indent="false"/>
    </style:style>
    <style:style style:name="P77" style:family="paragraph" style:parent-style-name="Text_20_body">
      <style:text-properties fo:font-size="14pt" fo:font-style="italic" style:font-size-asian="14pt" style:font-style-asian="italic"/>
    </style:style>
    <style:style style:name="P78" style:family="paragraph" style:parent-style-name="Text_20_body">
      <style:paragraph-properties fo:margin-top="0.1209in" fo:margin-bottom="0in" style:contextual-spacing="false"/>
      <style:text-properties fo:font-size="14pt" fo:font-style="italic" style:font-size-asian="14pt" style:font-style-asian="italic"/>
    </style:style>
    <style:style style:name="P79" style:family="paragraph" style:parent-style-name="Heading_20_1" style:master-page-name="Converted5">
      <style:paragraph-properties fo:margin-top="0.0437in" fo:margin-bottom="0in" style:contextual-spacing="false" style:page-number="auto"/>
      <style:text-properties fo:letter-spacing="-0.0016in"/>
    </style:style>
    <style:style style:name="P80" style:family="paragraph" style:parent-style-name="Text_20_body">
      <style:paragraph-properties fo:margin-top="0.0854in" fo:margin-bottom="0in" style:contextual-spacing="false"/>
      <style:text-properties fo:font-size="22pt" fo:font-weight="bold" style:font-size-asian="22pt" style:font-weight-asian="bold"/>
    </style:style>
    <style:style style:name="P81" style:family="paragraph" style:parent-style-name="Standard">
      <style:paragraph-properties fo:margin-left="0.1063in" fo:margin-right="0.3299in" fo:margin-top="0.0008in" fo:margin-bottom="0in" style:contextual-spacing="false" fo:line-height="115%" fo:text-align="left" style:justify-single-word="false" fo:text-indent="0in" style:auto-text-indent="false"/>
    </style:style>
    <style:style style:name="P82" style:family="paragraph" style:parent-style-name="Standard">
      <style:paragraph-properties fo:margin-left="0.1063in" fo:margin-right="0.3118in" fo:margin-top="0.1374in" fo:margin-bottom="0in" style:contextual-spacing="false" fo:line-height="115%" fo:text-align="left" style:justify-single-word="false" fo:text-indent="0in" style:auto-text-indent="false"/>
    </style:style>
    <style:style style:name="P83" style:family="paragraph" style:parent-style-name="Standard">
      <style:paragraph-properties fo:margin-left="0.1063in" fo:margin-right="0.3102in" fo:margin-top="0.1382in" fo:margin-bottom="0in" style:contextual-spacing="false" fo:line-height="115%" fo:text-align="justify" style:justify-single-word="false" fo:text-indent="0in" style:auto-text-indent="false"/>
    </style:style>
    <style:style style:name="P84" style:family="paragraph" style:parent-style-name="Standard">
      <style:paragraph-properties fo:margin-left="0.1063in" fo:margin-right="0.3299in" fo:margin-top="0.1398in" fo:margin-bottom="0in" style:contextual-spacing="false" fo:line-height="115%" fo:text-align="left" style:justify-single-word="false" fo:text-indent="0in" style:auto-text-indent="false"/>
    </style:style>
    <style:style style:name="P85" style:family="paragraph" style:parent-style-name="Heading_20_1" style:master-page-name="Converted6">
      <style:paragraph-properties fo:margin-left="2.2728in" fo:margin-right="2.4693in" fo:margin-top="0.0465in" fo:margin-bottom="0in" style:contextual-spacing="false" style:page-number="auto"/>
    </style:style>
    <style:style style:name="P86" style:family="paragraph" style:parent-style-name="Heading_20_6">
      <style:paragraph-properties fo:margin-top="0.4374in" fo:margin-bottom="0in" style:contextual-spacing="false">
        <style:tab-stops>
          <style:tab-stop style:position="7.3717in" style:type="right" style:leader-style="dotted" style:leader-text="."/>
        </style:tab-stops>
      </style:paragraph-properties>
    </style:style>
    <style:style style:name="P87" style:family="paragraph" style:parent-style-name="Heading_20_6">
      <style:paragraph-properties fo:margin-top="0.1016in" fo:margin-bottom="0in" style:contextual-spacing="false">
        <style:tab-stops>
          <style:tab-stop style:position="7.3717in" style:type="right" style:leader-style="dotted" style:leader-text="."/>
        </style:tab-stops>
      </style:paragraph-properties>
    </style:style>
    <style:style style:name="P88" style:family="paragraph" style:parent-style-name="Heading_20_6">
      <style:paragraph-properties fo:margin-top="0.102in" fo:margin-bottom="0in" style:contextual-spacing="false">
        <style:tab-stops>
          <style:tab-stop style:position="7.3717in" style:type="right" style:leader-style="dotted" style:leader-text="."/>
        </style:tab-stops>
      </style:paragraph-properties>
    </style:style>
    <style:style style:name="P89" style:family="paragraph" style:parent-style-name="Heading_20_6">
      <style:paragraph-properties fo:margin-top="0.1035in" fo:margin-bottom="0in" style:contextual-spacing="false">
        <style:tab-stops>
          <style:tab-stop style:position="7.3717in" style:type="right" style:leader-style="dotted" style:leader-text="."/>
        </style:tab-stops>
      </style:paragraph-properties>
    </style:style>
    <style:style style:name="P90" style:family="paragraph" style:parent-style-name="Heading_20_1" style:master-page-name="Converted7">
      <style:paragraph-properties fo:margin-left="2.2728in" fo:margin-right="2.4673in" fo:margin-top="0.0484in" fo:margin-bottom="0in" style:contextual-spacing="false" style:page-number="auto"/>
    </style:style>
    <style:style style:name="P91" style:family="paragraph" style:parent-style-name="Standard">
      <style:paragraph-properties fo:margin-left="0in" fo:margin-right="0.1984in" fo:margin-top="0.4366in" fo:margin-bottom="0in" style:contextual-spacing="false" fo:text-align="center" style:justify-single-word="false" fo:text-indent="0in" style:auto-text-indent="false">
        <style:tab-stops>
          <style:tab-stop style:position="7.1075in" style:leader-style="dotted" style:leader-text="."/>
        </style:tab-stops>
      </style:paragraph-properties>
    </style:style>
    <style:style style:name="P92" style:family="paragraph" style:parent-style-name="Table_20_Paragraph">
      <style:paragraph-properties fo:margin-left="0in" fo:margin-right="0in" fo:line-height="100%"/>
      <style:text-properties style:font-name="Times New Roman" fo:font-size="12pt" style:font-size-asian="12pt"/>
    </style:style>
    <style:style style:name="P93" style:family="paragraph" style:parent-style-name="Table_20_Paragraph">
      <style:paragraph-properties fo:margin-left="0.3689in" fo:margin-right="0in" fo:line-height="0.3382in"/>
    </style:style>
    <style:style style:name="P94" style:family="paragraph" style:parent-style-name="Table_20_Paragraph">
      <style:paragraph-properties fo:margin-left="0in" fo:margin-right="0in" fo:margin-top="0.0102in" fo:margin-bottom="0in" style:contextual-spacing="false" fo:line-height="100%"/>
      <style:text-properties fo:font-size="12pt" style:font-size-asian="12pt"/>
    </style:style>
    <style:style style:name="P95" style:family="paragraph" style:parent-style-name="Table_20_Paragraph">
      <style:paragraph-properties fo:margin-left="0.0346in" fo:margin-right="0in" fo:line-height="100%"/>
    </style:style>
    <style:style style:name="P96" style:family="paragraph" style:parent-style-name="Table_20_Paragraph">
      <style:paragraph-properties fo:margin-left="0.5252in" fo:margin-right="0in" fo:line-height="100%"/>
    </style:style>
    <style:style style:name="P97" style:family="paragraph" style:parent-style-name="Table_20_Paragraph">
      <style:paragraph-properties fo:margin-left="0.0346in" fo:margin-right="0in" fo:margin-top="0.1075in" fo:margin-bottom="0in" style:contextual-spacing="false" fo:line-height="100%"/>
    </style:style>
    <style:style style:name="P98" style:family="paragraph" style:parent-style-name="Table_20_Paragraph">
      <style:paragraph-properties fo:margin-left="0.5071in" fo:margin-right="0in" fo:margin-top="0.1075in" fo:margin-bottom="0in" style:contextual-spacing="false" fo:line-height="100%"/>
    </style:style>
    <style:style style:name="P99" style:family="paragraph" style:parent-style-name="Table_20_Paragraph">
      <style:paragraph-properties fo:margin-left="0.5252in" fo:margin-right="0in" fo:margin-top="0.1075in" fo:margin-bottom="0in" style:contextual-spacing="false" fo:line-height="100%"/>
    </style:style>
    <style:style style:name="P100" style:family="paragraph" style:parent-style-name="Table_20_Paragraph">
      <style:paragraph-properties fo:margin-left="0.0346in" fo:margin-right="0in" fo:margin-top="0.1091in" fo:margin-bottom="0in" style:contextual-spacing="false" fo:line-height="100%"/>
    </style:style>
    <style:style style:name="P101" style:family="paragraph" style:parent-style-name="Table_20_Paragraph">
      <style:paragraph-properties fo:margin-left="0.5665in" fo:margin-right="0in" fo:margin-top="0.1091in" fo:margin-bottom="0in" style:contextual-spacing="false" fo:line-height="100%"/>
    </style:style>
    <style:style style:name="P102" style:family="paragraph" style:parent-style-name="Table_20_Paragraph">
      <style:paragraph-properties fo:margin-left="0.0409in" fo:margin-right="0in" fo:margin-top="0.1075in" fo:margin-bottom="0in" style:contextual-spacing="false" fo:line-height="100%"/>
    </style:style>
    <style:style style:name="P103" style:family="paragraph" style:parent-style-name="Table_20_Paragraph">
      <style:paragraph-properties fo:margin-left="0.0346in" fo:margin-right="0in" fo:margin-top="0.1083in" fo:margin-bottom="0in" style:contextual-spacing="false" fo:line-height="100%"/>
    </style:style>
    <style:style style:name="P104" style:family="paragraph" style:parent-style-name="Table_20_Paragraph">
      <style:paragraph-properties fo:margin-left="0.5252in" fo:margin-right="0in" fo:margin-top="0.1083in" fo:margin-bottom="0in" style:contextual-spacing="false" fo:line-height="100%"/>
    </style:style>
    <style:style style:name="P105" style:family="paragraph" style:parent-style-name="Table_20_Paragraph">
      <style:paragraph-properties fo:margin-left="0.0346in" fo:margin-right="0in" fo:margin-top="0.0925in" fo:margin-bottom="0in" style:contextual-spacing="false" fo:line-height="100%"/>
    </style:style>
    <style:style style:name="P106" style:family="paragraph" style:parent-style-name="Table_20_Paragraph">
      <style:paragraph-properties fo:margin-left="0.5252in" fo:margin-right="0in" fo:margin-top="0.0925in" fo:margin-bottom="0in" style:contextual-spacing="false" fo:line-height="100%"/>
    </style:style>
    <style:style style:name="P107" style:family="paragraph" style:parent-style-name="Table_20_Paragraph">
      <style:paragraph-properties fo:margin-left="0.5665in" fo:margin-right="0in" fo:margin-top="0.1075in" fo:margin-bottom="0in" style:contextual-spacing="false" fo:line-height="100%"/>
    </style:style>
    <style:style style:name="P108" style:family="paragraph" style:parent-style-name="Table_20_Paragraph">
      <style:paragraph-properties fo:margin-left="0.0764in" fo:margin-right="0in" fo:margin-top="0.1075in" fo:margin-bottom="0in" style:contextual-spacing="false" fo:line-height="100%"/>
    </style:style>
    <style:style style:name="P109" style:family="paragraph" style:parent-style-name="Table_20_Paragraph">
      <style:paragraph-properties fo:margin-left="0.0764in" fo:margin-right="0in" fo:margin-top="0.1083in" fo:margin-bottom="0in" style:contextual-spacing="false" fo:line-height="100%"/>
    </style:style>
    <style:style style:name="P110" style:family="paragraph" style:parent-style-name="Table_20_Paragraph">
      <style:paragraph-properties fo:margin-left="0.5665in" fo:margin-right="0in" fo:margin-top="0.1083in" fo:margin-bottom="0in" style:contextual-spacing="false" fo:line-height="100%"/>
    </style:style>
    <style:style style:name="P111" style:family="paragraph" style:parent-style-name="Table_20_Paragraph">
      <style:paragraph-properties fo:margin-left="0.0764in" fo:margin-right="0in" fo:margin-top="0.1075in" fo:margin-bottom="0in" style:contextual-spacing="false" fo:line-height="0.178in"/>
    </style:style>
    <style:style style:name="P112" style:family="paragraph" style:parent-style-name="Table_20_Paragraph">
      <style:paragraph-properties fo:margin-left="0.5665in" fo:margin-right="0in" fo:margin-top="0.1075in" fo:margin-bottom="0in" style:contextual-spacing="false" fo:line-height="0.178in"/>
    </style:style>
    <style:style style:name="P113" style:family="paragraph" style:parent-style-name="Heading_20_1" style:master-page-name="Converted9">
      <style:paragraph-properties fo:margin-left="0in" fo:margin-right="0.1209in" fo:margin-top="0.0484in" fo:margin-bottom="0in" style:contextual-spacing="false" style:page-number="auto"/>
    </style:style>
    <style:style style:name="P114" style:family="paragraph" style:parent-style-name="Text_20_body">
      <style:paragraph-properties fo:margin-top="0.1638in" fo:margin-bottom="0in" style:contextual-spacing="false"/>
      <style:text-properties fo:font-size="22pt" fo:font-weight="bold" style:font-size-asian="22pt" style:font-weight-asian="bold"/>
    </style:style>
    <style:style style:name="P115" style:family="paragraph" style:parent-style-name="Standard">
      <style:paragraph-properties fo:margin-left="0.1063in" fo:margin-right="0.3299in" fo:margin-top="0.1374in" fo:margin-bottom="0in" style:contextual-spacing="false" fo:line-height="115%" fo:text-align="left" style:justify-single-word="false" fo:text-indent="0in" style:auto-text-indent="false"/>
    </style:style>
    <style:style style:name="P116" style:family="paragraph" style:parent-style-name="Standard">
      <style:paragraph-properties fo:margin-left="0.1063in" fo:margin-right="0.4618in" fo:margin-top="0.1402in" fo:margin-bottom="0in" style:contextual-spacing="false" fo:line-height="115%" fo:text-align="left" style:justify-single-word="false" fo:text-indent="0in" style:auto-text-indent="false"/>
    </style:style>
    <style:style style:name="P117" style:family="paragraph" style:parent-style-name="Standard">
      <style:paragraph-properties fo:margin-left="0.1063in" fo:margin-right="0.3016in" fo:margin-top="0.139in" fo:margin-bottom="0in" style:contextual-spacing="false" fo:line-height="115%" fo:text-align="left" style:justify-single-word="false" fo:text-indent="0in" style:auto-text-indent="false"/>
    </style:style>
    <style:style style:name="P118" style:family="paragraph" style:parent-style-name="Standard">
      <style:paragraph-properties fo:margin-left="0.1063in" fo:margin-right="0.3311in" fo:margin-top="0.1382in" fo:margin-bottom="0in" style:contextual-spacing="false" fo:line-height="115%" fo:text-align="left" style:justify-single-word="false" fo:text-indent="0in" style:auto-text-indent="false"/>
    </style:style>
    <style:style style:name="P119" style:family="paragraph" style:parent-style-name="Heading_20_2" style:master-page-name="Converted10">
      <style:paragraph-properties fo:margin-left="0.7665in" fo:margin-right="0in" fo:margin-top="0.039in" fo:margin-bottom="0in" style:contextual-spacing="false" style:page-number="auto"/>
    </style:style>
    <style:style style:name="P120" style:family="paragraph" style:parent-style-name="Heading_20_3" style:list-style-name="WWNum10">
      <style:paragraph-properties fo:margin-left="0.911in" fo:margin-right="0in" fo:margin-top="0in" fo:margin-bottom="0in" style:contextual-spacing="false" fo:line-height="100%" fo:text-align="left" style:justify-single-word="false" fo:text-indent="-0.3126in" style:auto-text-indent="false">
        <style:tab-stops>
          <style:tab-stop style:position="0.911in"/>
        </style:tab-stops>
      </style:paragraph-properties>
      <style:text-properties fo:letter-spacing="-0.0016in"/>
    </style:style>
    <style:style style:name="P121" style:family="paragraph" style:parent-style-name="Text_20_body">
      <style:paragraph-properties fo:margin-left="0.1063in" fo:margin-right="0.4618in" fo:margin-top="0.228in" fo:margin-bottom="0in" style:contextual-spacing="false" fo:text-indent="0.1665in" style:auto-text-indent="false"/>
    </style:style>
    <style:style style:name="P122" style:family="paragraph" style:parent-style-name="Text_20_body">
      <style:paragraph-properties fo:margin-left="0.1063in" fo:margin-right="0.3299in"/>
    </style:style>
    <style:style style:name="P123" style:family="paragraph" style:parent-style-name="Text_20_body">
      <style:paragraph-properties fo:margin-left="0.1063in" fo:margin-right="0.4618in"/>
    </style:style>
    <style:style style:name="P124" style:family="paragraph" style:parent-style-name="Text_20_body">
      <style:paragraph-properties fo:margin-top="0.0047in" fo:margin-bottom="0in" style:contextual-spacing="false"/>
    </style:style>
    <style:style style:name="P125" style:family="paragraph" style:parent-style-name="Heading_20_3" style:list-style-name="WWNum10">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style>
    <style:style style:name="P126" style:family="paragraph" style:parent-style-name="Text_20_body">
      <style:paragraph-properties fo:margin-left="0.1063in" fo:margin-right="0.4618in" fo:margin-top="0.1181in" fo:margin-bottom="0in" style:contextual-spacing="false" fo:line-height="115%"/>
    </style:style>
    <style:style style:name="P127" style:family="paragraph" style:parent-style-name="List_20_Paragraph" style:list-style-name="WWNum11">
      <style:paragraph-properties fo:margin-left="0.1063in" fo:margin-right="0.6528in" fo:margin-top="0.0846in" fo:margin-bottom="0in" style:contextual-spacing="false" fo:line-height="115%" fo:text-align="left" style:justify-single-word="false" fo:text-indent="0in" style:auto-text-indent="false">
        <style:tab-stops>
          <style:tab-stop style:position="0.2102in"/>
        </style:tab-stops>
      </style:paragraph-properties>
    </style:style>
    <style:style style:name="P128" style:family="paragraph" style:parent-style-name="List_20_Paragraph" style:list-style-name="WWNum11">
      <style:paragraph-properties fo:margin-left="0.1063in" fo:margin-right="0.4602in" fo:margin-top="0.0827in" fo:margin-bottom="0in" style:contextual-spacing="false" fo:line-height="115%" fo:text-align="left" style:justify-single-word="false" fo:text-indent="0in" style:auto-text-indent="false">
        <style:tab-stops>
          <style:tab-stop style:position="0.2102in"/>
        </style:tab-stops>
      </style:paragraph-properties>
    </style:style>
    <style:style style:name="P129" style:family="paragraph" style:parent-style-name="List_20_Paragraph" style:list-style-name="WWNum11">
      <style:paragraph-properties fo:margin-left="0.1063in" fo:margin-right="0.4126in" fo:margin-top="0.0839in" fo:margin-bottom="0in" style:contextual-spacing="false" fo:line-height="115%" fo:text-align="left" style:justify-single-word="false" fo:text-indent="0in" style:auto-text-indent="false">
        <style:tab-stops>
          <style:tab-stop style:position="0.2102in"/>
        </style:tab-stops>
      </style:paragraph-properties>
    </style:style>
    <style:style style:name="P130" style:family="paragraph" style:parent-style-name="Text_20_body">
      <style:paragraph-properties fo:margin-left="0.1063in" fo:margin-right="0in" fo:line-height="0.1902in"/>
    </style:style>
    <style:style style:name="P131" style:family="paragraph" style:parent-style-name="Text_20_body">
      <style:text-properties fo:font-size="10pt" style:font-size-asian="10pt"/>
    </style:style>
    <style:style style:name="P132" style:family="paragraph" style:parent-style-name="Text_20_body">
      <style:paragraph-properties fo:margin-top="0.0161in" fo:margin-bottom="0in" style:contextual-spacing="false"/>
      <style:text-properties fo:font-size="10pt" style:font-size-asian="10pt"/>
    </style:style>
    <style:style style:name="P133" style:family="paragraph" style:parent-style-name="Text_20_body">
      <style:paragraph-properties fo:margin-top="0.1693in" fo:margin-bottom="0in" style:contextual-spacing="false"/>
    </style:style>
    <style:style style:name="P134" style:family="paragraph" style:parent-style-name="Standard">
      <style:paragraph-properties fo:margin-left="2.2728in" fo:margin-right="2.4681in" fo:margin-top="0in" fo:margin-bottom="0in" style:contextual-spacing="false" fo:text-align="center" style:justify-single-word="false" fo:text-indent="0in" style:auto-text-indent="false"/>
    </style:style>
    <style:style style:name="P135" style:family="paragraph" style:parent-style-name="Text_20_body">
      <style:paragraph-properties fo:margin-left="0.1063in" fo:margin-right="0.3299in" fo:margin-top="0.1374in" fo:margin-bottom="0in" style:contextual-spacing="false" fo:line-height="115%"/>
    </style:style>
    <style:style style:name="P136" style:family="paragraph" style:parent-style-name="Text_20_body">
      <style:paragraph-properties fo:margin-left="0.1063in" fo:margin-right="0.3016in" fo:line-height="115%"/>
    </style:style>
    <style:style style:name="P137" style:family="paragraph" style:parent-style-name="Heading_20_3" style:list-style-name="WWNum10">
      <style:paragraph-properties fo:margin-left="0.9118in" fo:margin-right="0in" fo:margin-top="0.1126in" fo:margin-bottom="0in" style:contextual-spacing="false" fo:line-height="100%" fo:text-align="left" style:justify-single-word="false" fo:text-indent="-0.3134in" style:auto-text-indent="false">
        <style:tab-stops>
          <style:tab-stop style:position="0.9118in"/>
        </style:tab-stops>
      </style:paragraph-properties>
    </style:style>
    <style:style style:name="P138" style:family="paragraph" style:parent-style-name="Text_20_body">
      <style:paragraph-properties fo:margin-left="0.1063in" fo:margin-right="0.4618in" fo:margin-top="0.1173in" fo:margin-bottom="0in" style:contextual-spacing="false"/>
    </style:style>
    <style:style style:name="P139" style:family="paragraph" style:parent-style-name="Text_20_body">
      <style:paragraph-properties fo:margin-left="0.1063in" fo:margin-right="0in" fo:margin-top="0in" fo:margin-bottom="0in" style:contextual-spacing="false"/>
    </style:style>
    <style:style style:name="P140" style:family="paragraph" style:parent-style-name="Heading_20_3" style:list-style-name="WWNum10" style:master-page-name="Converted11">
      <style:paragraph-properties fo:margin-left="0.911in" fo:margin-right="0in" fo:margin-top="0.052in" fo:margin-bottom="0in" style:contextual-spacing="false" fo:line-height="100%" fo:text-align="left" style:justify-single-word="false" fo:text-indent="-0.3126in" style:auto-text-indent="false" style:page-number="auto">
        <style:tab-stops>
          <style:tab-stop style:position="0.911in"/>
        </style:tab-stops>
      </style:paragraph-properties>
    </style:style>
    <style:style style:name="P141" style:family="paragraph" style:parent-style-name="Text_20_body">
      <style:paragraph-properties fo:margin-left="0.1063in" fo:margin-right="0.3299in" fo:margin-top="0.2291in" fo:margin-bottom="0in" style:contextual-spacing="false"/>
    </style:style>
    <style:style style:name="P142" style:family="paragraph" style:parent-style-name="Text_20_body">
      <style:paragraph-properties fo:margin-top="0.002in" fo:margin-bottom="0in" style:contextual-spacing="false"/>
    </style:style>
    <style:style style:name="P143" style:family="paragraph" style:parent-style-name="Text_20_body">
      <style:paragraph-properties fo:margin-left="0.1063in" fo:margin-right="0.6445in"/>
    </style:style>
    <style:style style:name="P144" style:family="paragraph" style:parent-style-name="Text_20_body">
      <style:paragraph-properties fo:margin-left="0.1063in" fo:margin-right="0in"/>
    </style:style>
    <style:style style:name="P145" style:family="paragraph" style:parent-style-name="Text_20_body">
      <style:paragraph-properties fo:margin-top="0.0189in" fo:margin-bottom="0in" style:contextual-spacing="false"/>
      <style:text-properties fo:font-size="10pt" style:font-size-asian="10pt"/>
    </style:style>
    <style:style style:name="P146" style:family="paragraph" style:parent-style-name="Standard">
      <style:paragraph-properties fo:margin-left="2.9839in" fo:margin-right="0in" fo:margin-top="0.1835in" fo:margin-bottom="0in" style:contextual-spacing="false" fo:text-align="left" style:justify-single-word="false" fo:text-indent="0in" style:auto-text-indent="false"/>
    </style:style>
    <style:style style:name="P147" style:family="paragraph" style:parent-style-name="Heading_20_3" style:list-style-name="WWNum10">
      <style:paragraph-properties fo:margin-left="0.911in" fo:margin-right="0in" fo:margin-top="0.1382in" fo:margin-bottom="0in" style:contextual-spacing="false" fo:line-height="100%" fo:text-align="left" style:justify-single-word="false" fo:text-indent="-0.3126in" style:auto-text-indent="false">
        <style:tab-stops>
          <style:tab-stop style:position="0.911in"/>
        </style:tab-stops>
      </style:paragraph-properties>
    </style:style>
    <style:style style:name="P148" style:family="paragraph" style:parent-style-name="Standard">
      <style:paragraph-properties fo:margin-left="0.1063in" fo:margin-right="0in" fo:margin-top="0.1209in" fo:margin-bottom="0in" style:contextual-spacing="false" fo:text-align="left" style:justify-single-word="false" fo:text-indent="0in" style:auto-text-indent="false"/>
    </style:style>
    <style:style style:name="P149" style:family="paragraph" style:parent-style-name="Text_20_body">
      <style:text-properties style:font-name="Segoe UI" fo:font-size="11pt" style:font-size-asian="11pt"/>
    </style:style>
    <style:style style:name="P150" style:family="paragraph" style:parent-style-name="Text_20_body">
      <style:paragraph-properties fo:margin-top="0.0626in" fo:margin-bottom="0in" style:contextual-spacing="false"/>
      <style:text-properties style:font-name="Segoe UI" fo:font-size="11pt" style:font-size-asian="11pt"/>
    </style:style>
    <style:style style:name="P151" style:family="paragraph" style:parent-style-name="Standard">
      <style:paragraph-properties fo:margin-left="0in" fo:margin-right="0.5555in" fo:margin-top="0in" fo:margin-bottom="0in" style:contextual-spacing="false" fo:text-align="right" style:justify-single-word="false" fo:text-indent="0in" style:auto-text-indent="false"/>
    </style:style>
    <style:style style:name="P152" style:family="paragraph" style:parent-style-name="Text_20_body">
      <style:text-properties style:font-name="Symbol"/>
    </style:style>
    <style:style style:name="P153" style:family="paragraph" style:parent-style-name="Text_20_body">
      <style:paragraph-properties fo:margin-top="0.0992in" fo:margin-bottom="0in" style:contextual-spacing="false"/>
      <style:text-properties style:font-name="Symbol"/>
    </style:style>
    <style:style style:name="P154" style:family="paragraph" style:parent-style-name="Standard">
      <style:paragraph-properties fo:margin-left="2.9543in" fo:margin-right="0in" fo:margin-top="0.0008in" fo:margin-bottom="0in" style:contextual-spacing="false" fo:text-align="left" style:justify-single-word="false" fo:text-indent="0in" style:auto-text-indent="false"/>
    </style:style>
    <style:style style:name="P155" style:family="paragraph" style:parent-style-name="Text_20_body">
      <style:paragraph-properties fo:margin-top="0.0193in" fo:margin-bottom="0in" style:contextual-spacing="false"/>
      <style:text-properties style:font-name="Calibri" fo:font-size="9pt" fo:font-style="italic" style:font-size-asian="9pt" style:font-style-asian="italic"/>
    </style:style>
    <style:style style:name="P156" style:family="paragraph" style:parent-style-name="Standard">
      <style:paragraph-properties fo:margin-left="0.1063in" fo:margin-right="0in" fo:margin-top="0in" fo:margin-bottom="0in" style:contextual-spacing="false" fo:line-height="0.1917in" fo:text-align="left" style:justify-single-word="false" fo:text-indent="0in" style:auto-text-indent="false"/>
    </style:style>
    <style:style style:name="P157" style:family="paragraph" style:parent-style-name="List_20_Paragraph" style:list-style-name="WWNum12">
      <style:paragraph-properties fo:margin-left="0.3165in" fo:margin-right="0in" fo:margin-top="0in" fo:margin-bottom="0in" style:contextual-spacing="false" fo:line-height="0.2043in" fo:text-align="left" style:justify-single-word="false" fo:text-indent="-0.25in" style:auto-text-indent="false">
        <style:tab-stops>
          <style:tab-stop style:position="0.3165in"/>
        </style:tab-stops>
      </style:paragraph-properties>
    </style:style>
    <style:style style:name="P158" style:family="paragraph" style:parent-style-name="List_20_Paragraph" style:list-style-name="WWNum12" style:master-page-name="Converted12">
      <style:paragraph-properties fo:margin-left="0.3165in" fo:margin-right="0.8555in" fo:margin-top="0.0508in" fo:margin-bottom="0in" style:contextual-spacing="false" fo:line-height="100%" fo:text-align="left" style:justify-single-word="false" fo:text-indent="-0.25in" style:auto-text-indent="false" style:page-number="auto">
        <style:tab-stops>
          <style:tab-stop style:position="0.3165in"/>
        </style:tab-stops>
      </style:paragraph-properties>
    </style:style>
    <style:style style:name="P159" style:family="paragraph" style:parent-style-name="List_20_Paragraph" style:list-style-name="WWNum12">
      <style:paragraph-properties fo:margin-left="0.3165in" fo:margin-right="0in" fo:margin-top="0in" fo:margin-bottom="0in" style:contextual-spacing="false" fo:line-height="0.2028in" fo:text-align="left" style:justify-single-word="false" fo:text-indent="-0.25in" style:auto-text-indent="false">
        <style:tab-stops>
          <style:tab-stop style:position="0.3165in"/>
        </style:tab-stops>
      </style:paragraph-properties>
    </style:style>
    <style:style style:name="P160" style:family="paragraph" style:parent-style-name="List_20_Paragraph" style:list-style-name="WWNum12">
      <style:paragraph-properties fo:margin-left="0.3165in" fo:margin-right="0in" fo:margin-top="0in" fo:margin-bottom="0in" style:contextual-spacing="false" fo:line-height="0.2035in" fo:text-align="left" style:justify-single-word="false" fo:text-indent="-0.25in" style:auto-text-indent="false">
        <style:tab-stops>
          <style:tab-stop style:position="0.3165in"/>
        </style:tab-stops>
      </style:paragraph-properties>
    </style:style>
    <style:style style:name="P161" style:family="paragraph" style:parent-style-name="List_20_Paragraph" style:list-style-name="WWNum12">
      <style:paragraph-properties fo:margin-left="0.3165in" fo:margin-right="0in" fo:margin-top="0in" fo:margin-bottom="0in" style:contextual-spacing="false" fo:line-height="0.1917in" fo:text-align="left" style:justify-single-word="false" fo:text-indent="-0.25in" style:auto-text-indent="false">
        <style:tab-stops>
          <style:tab-stop style:position="0.3165in"/>
        </style:tab-stops>
      </style:paragraph-properties>
    </style:style>
    <style:style style:name="P162" style:family="paragraph" style:parent-style-name="Text_20_body">
      <style:paragraph-properties fo:margin-left="0.1063in" fo:margin-right="0.3299in" fo:margin-top="0.0835in" fo:margin-bottom="0in" style:contextual-spacing="false"/>
    </style:style>
    <style:style style:name="P163" style:family="paragraph" style:parent-style-name="Heading_20_3" style:list-style-name="WWNum10">
      <style:paragraph-properties fo:margin-left="0.911in" fo:margin-right="0in" fo:margin-top="0.0291in" fo:margin-bottom="0in" style:contextual-spacing="false" fo:line-height="100%" fo:text-align="left" style:justify-single-word="false" fo:text-indent="-0.3126in" style:auto-text-indent="false">
        <style:tab-stops>
          <style:tab-stop style:position="0.911in"/>
        </style:tab-stops>
      </style:paragraph-properties>
    </style:style>
    <style:style style:name="P164" style:family="paragraph" style:parent-style-name="Text_20_body">
      <style:paragraph-properties fo:margin-top="0.1193in" fo:margin-bottom="0in" style:contextual-spacing="false"/>
      <style:text-properties fo:font-size="15pt" fo:font-weight="bold" style:font-size-asian="15pt" style:font-weight-asian="bold"/>
    </style:style>
    <style:style style:name="P165" style:family="paragraph" style:parent-style-name="Heading_20_4" style:list-style-name="WWNum10">
      <style:paragraph-properties fo:margin-left="0.852in" fo:margin-right="0in" fo:margin-top="0in" fo:margin-bottom="0in" style:contextual-spacing="false" fo:line-height="100%" fo:text-align="left" style:justify-single-word="false" fo:text-indent="-0.4673in" style:auto-text-indent="false">
        <style:tab-stops>
          <style:tab-stop style:position="0.852in"/>
        </style:tab-stops>
      </style:paragraph-properties>
    </style:style>
    <style:style style:name="P166" style:family="paragraph" style:parent-style-name="List_20_Paragraph" style:list-style-name="WWNum13">
      <style:paragraph-properties fo:margin-left="0.1063in" fo:margin-right="1.1354in" fo:margin-top="0.1457in" fo:margin-bottom="0in" style:contextual-spacing="false" fo:line-height="100%" fo:text-align="left" style:justify-single-word="false" fo:text-indent="0in" style:auto-text-indent="false">
        <style:tab-stops>
          <style:tab-stop style:position="0.2728in"/>
        </style:tab-stops>
      </style:paragraph-properties>
    </style:style>
    <style:style style:name="P167" style:family="paragraph" style:parent-style-name="List_20_Paragraph" style:list-style-name="WWNum13">
      <style:paragraph-properties fo:margin-left="0.1063in" fo:margin-right="0.4555in" fo:margin-top="0.1126in" fo:margin-bottom="0in" style:contextual-spacing="false" fo:line-height="100%" fo:text-align="left" style:justify-single-word="false" fo:text-indent="0in" style:auto-text-indent="false">
        <style:tab-stops>
          <style:tab-stop style:position="0.2728in"/>
        </style:tab-stops>
      </style:paragraph-properties>
    </style:style>
    <style:style style:name="P168" style:family="paragraph" style:parent-style-name="List_20_Paragraph" style:list-style-name="WWNum13">
      <style:paragraph-properties fo:margin-left="0.1063in" fo:margin-right="0.3362in" fo:margin-top="0.1098in" fo:margin-bottom="0in" style:contextual-spacing="false" fo:line-height="100%" fo:text-align="left" style:justify-single-word="false" fo:text-indent="0in" style:auto-text-indent="false">
        <style:tab-stops>
          <style:tab-stop style:position="0.2626in"/>
        </style:tab-stops>
      </style:paragraph-properties>
    </style:style>
    <style:style style:name="P169" style:family="paragraph" style:parent-style-name="Heading_20_4" style:list-style-name="WWNum10">
      <style:paragraph-properties fo:margin-left="0.7083in" fo:margin-right="0in" fo:margin-top="0.1126in" fo:margin-bottom="0in" style:contextual-spacing="false" fo:line-height="100%" fo:text-align="left" style:justify-single-word="false" fo:text-indent="-0.4154in" style:auto-text-indent="false">
        <style:tab-stops>
          <style:tab-stop style:position="0.7083in"/>
        </style:tab-stops>
      </style:paragraph-properties>
    </style:style>
    <style:style style:name="P170" style:family="paragraph" style:parent-style-name="List_20_Paragraph" style:list-style-name="WWNum14">
      <style:paragraph-properties fo:margin-left="0.2728in" fo:margin-right="0in" fo:margin-top="0.1437in" fo:margin-bottom="0in" style:contextual-spacing="false" fo:line-height="100%" fo:text-align="left" style:justify-single-word="false" fo:text-indent="-0.1665in" style:auto-text-indent="false">
        <style:tab-stops>
          <style:tab-stop style:position="0.2728in"/>
        </style:tab-stops>
      </style:paragraph-properties>
    </style:style>
    <style:style style:name="P171" style:family="paragraph" style:parent-style-name="Text_20_body">
      <style:paragraph-properties fo:margin-left="0.1063in" fo:margin-right="0.4618in" fo:margin-top="0.0283in" fo:margin-bottom="0in" style:contextual-spacing="false" fo:line-height="115%"/>
    </style:style>
    <style:style style:name="P172" style:family="paragraph" style:parent-style-name="List_20_Paragraph" style:list-style-name="WWNum14">
      <style:paragraph-properties fo:margin-left="0.2728in" fo:margin-right="0in" fo:margin-top="0.111in" fo:margin-bottom="0in" style:contextual-spacing="false" fo:line-height="100%" fo:text-align="left" style:justify-single-word="false" fo:text-indent="-0.1665in" style:auto-text-indent="false">
        <style:tab-stops>
          <style:tab-stop style:position="0.2728in"/>
        </style:tab-stops>
      </style:paragraph-properties>
    </style:style>
    <style:style style:name="P173" style:family="paragraph" style:parent-style-name="Text_20_body">
      <style:paragraph-properties fo:margin-left="0.1063in" fo:margin-right="0in" fo:margin-top="0.0299in" fo:margin-bottom="0in" style:contextual-spacing="false" fo:line-height="115%"/>
    </style:style>
    <style:style style:name="P174" style:family="paragraph" style:parent-style-name="Text_20_body">
      <style:paragraph-properties fo:margin-left="0.1063in" fo:margin-right="0in" fo:margin-top="0.0283in" fo:margin-bottom="0in" style:contextual-spacing="false" fo:line-height="115%"/>
    </style:style>
    <style:style style:name="P175" style:family="paragraph" style:parent-style-name="Text_20_body">
      <style:paragraph-properties fo:margin-left="0.1063in" fo:margin-right="0.4618in" fo:margin-top="0.111in" fo:margin-bottom="0in" style:contextual-spacing="false" fo:line-height="115%"/>
    </style:style>
    <style:style style:name="P176" style:family="paragraph" style:parent-style-name="Text_20_body">
      <style:paragraph-properties fo:margin-left="0.1063in" fo:margin-right="0in" fo:margin-top="0.0008in" fo:margin-bottom="0in" style:contextual-spacing="false"/>
      <style:text-properties fo:letter-spacing="-0.0016in"/>
    </style:style>
    <style:style style:name="P177" style:family="paragraph" style:parent-style-name="Heading_20_3" style:list-style-name="WWNum10">
      <style:paragraph-properties fo:margin-left="0.9626in" fo:margin-right="0in" fo:margin-top="0.1398in" fo:margin-bottom="0in" style:contextual-spacing="false" fo:line-height="100%" fo:text-align="left" style:justify-single-word="false" fo:text-indent="-0.3126in" style:auto-text-indent="false">
        <style:tab-stops>
          <style:tab-stop style:position="0.9626in"/>
        </style:tab-stops>
      </style:paragraph-properties>
      <style:text-properties fo:letter-spacing="-0.0016in"/>
    </style:style>
    <style:style style:name="P178" style:family="paragraph" style:parent-style-name="Text_20_body">
      <style:paragraph-properties fo:margin-left="0.1063in" fo:margin-right="0.372in" fo:margin-top="0.1201in" fo:margin-bottom="0in" style:contextual-spacing="false" fo:line-height="115%" fo:text-indent="0.4917in" style:auto-text-indent="false"/>
    </style:style>
    <style:style style:name="P179" style:family="paragraph" style:parent-style-name="Heading_20_2" style:master-page-name="Converted13">
      <style:paragraph-properties fo:margin-left="3.1339in" fo:margin-right="0in" fo:margin-top="0.0508in" fo:margin-bottom="0in" style:contextual-spacing="false" fo:line-height="101%" fo:text-indent="-2.4307in" style:auto-text-indent="false" style:page-number="auto"/>
    </style:style>
    <style:style style:name="P180" style:family="paragraph" style:parent-style-name="Text_20_body">
      <style:paragraph-properties fo:margin-top="0.1417in" fo:margin-bottom="0in" style:contextual-spacing="false"/>
      <style:text-properties fo:font-size="15pt" fo:font-weight="bold" style:font-size-asian="15pt" style:font-weight-asian="bold"/>
    </style:style>
    <style:style style:name="P181" style:family="paragraph" style:parent-style-name="Heading_20_3" style:list-style-name="WWNum15">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text-properties fo:letter-spacing="-0.0016in"/>
    </style:style>
    <style:style style:name="P182" style:family="paragraph" style:parent-style-name="Text_20_body">
      <style:paragraph-properties fo:margin-left="0.1063in" fo:margin-right="0.3154in" fo:margin-top="0.0346in" fo:margin-bottom="0in" style:contextual-spacing="false" fo:line-height="115%" fo:text-indent="0.2083in" style:auto-text-indent="false"/>
    </style:style>
    <style:style style:name="P183" style:family="paragraph" style:parent-style-name="Heading_20_3" style:list-style-name="WWNum15">
      <style:paragraph-properties fo:margin-left="0.911in" fo:margin-right="0in" fo:margin-top="0.1409in" fo:margin-bottom="0in" style:contextual-spacing="false" fo:line-height="100%" fo:text-align="left" style:justify-single-word="false" fo:text-indent="-0.3126in" style:auto-text-indent="false">
        <style:tab-stops>
          <style:tab-stop style:position="0.911in"/>
        </style:tab-stops>
      </style:paragraph-properties>
    </style:style>
    <style:style style:name="P184" style:family="paragraph" style:parent-style-name="List_20_Paragraph" style:list-style-name="WWNum16">
      <style:paragraph-properties fo:margin-left="0.6071in" fo:margin-right="0in" fo:margin-top="0.2291in" fo:margin-bottom="0in" style:contextual-spacing="false" fo:line-height="100%" fo:text-align="left" style:justify-single-word="false" fo:text-indent="-0.25in" style:auto-text-indent="false">
        <style:tab-stops>
          <style:tab-stop style:position="0.6071in"/>
        </style:tab-stops>
      </style:paragraph-properties>
    </style:style>
    <style:style style:name="P185" style:family="paragraph" style:parent-style-name="Text_20_body">
      <style:paragraph-properties fo:margin-top="0.0075in" fo:margin-bottom="0in" style:contextual-spacing="false"/>
      <style:text-properties style:font-name="Calibri" fo:font-size="11pt" fo:font-weight="bold" style:font-size-asian="11pt" style:font-weight-asian="bold"/>
    </style:style>
    <style:style style:name="P186" style:family="paragraph" style:parent-style-name="Text_20_body">
      <style:paragraph-properties fo:margin-left="0.1063in" fo:margin-right="0.372in"/>
    </style:style>
    <style:style style:name="P187" style:family="paragraph" style:parent-style-name="Standard">
      <style:paragraph-properties fo:margin-left="2.2736in" fo:margin-right="2.4665in" fo:margin-top="0.1673in" fo:margin-bottom="0in" style:contextual-spacing="false" fo:text-align="center" style:justify-single-word="false" fo:text-indent="0in" style:auto-text-indent="false"/>
    </style:style>
    <style:style style:name="P188" style:family="paragraph" style:parent-style-name="Text_20_body">
      <style:paragraph-properties fo:margin-top="0.0402in" fo:margin-bottom="0in" style:contextual-spacing="false"/>
      <style:text-properties style:font-name="Calibri" fo:font-size="9pt" fo:font-style="italic" style:font-size-asian="9pt" style:font-style-asian="italic"/>
    </style:style>
    <style:style style:name="P189" style:family="paragraph" style:parent-style-name="Heading_20_6" style:list-style-name="WWNum16">
      <style:paragraph-properties fo:margin-left="0.6071in" fo:margin-right="0in" fo:margin-top="0in" fo:margin-bottom="0in" style:contextual-spacing="false" fo:line-height="100%" fo:text-align="left" style:justify-single-word="false" fo:text-indent="-0.25in" style:auto-text-indent="false">
        <style:tab-stops>
          <style:tab-stop style:position="0.6071in"/>
        </style:tab-stops>
      </style:paragraph-properties>
    </style:style>
    <style:style style:name="P190" style:family="paragraph" style:parent-style-name="Text_20_body">
      <style:paragraph-properties fo:margin-top="0.0035in" fo:margin-bottom="0in" style:contextual-spacing="false"/>
      <style:text-properties fo:font-weight="bold" style:font-weight-asian="bold"/>
    </style:style>
    <style:style style:name="P191" style:family="paragraph" style:parent-style-name="Standard">
      <style:paragraph-properties fo:margin-left="0.1063in" fo:margin-right="0in" fo:margin-top="0in" fo:margin-bottom="0in" style:contextual-spacing="false" fo:text-align="left" style:justify-single-word="false" fo:text-indent="0in" style:auto-text-indent="false"/>
    </style:style>
    <style:style style:name="P192" style:family="paragraph" style:parent-style-name="Text_20_body">
      <style:paragraph-properties fo:margin-top="0.1283in" fo:margin-bottom="0in" style:contextual-spacing="false"/>
      <style:text-properties style:font-name="Calibri" fo:font-size="10pt" style:font-size-asian="10pt"/>
    </style:style>
    <style:style style:name="P193" style:family="paragraph" style:parent-style-name="Standard">
      <style:paragraph-properties fo:margin-left="0in" fo:margin-right="2.4681in" fo:margin-top="0in" fo:margin-bottom="0in" style:contextual-spacing="false" fo:text-align="center" style:justify-single-word="false" fo:text-indent="0in" style:auto-text-indent="false"/>
    </style:style>
    <style:style style:name="P194" style:family="paragraph" style:parent-style-name="Heading_20_6" style:master-page-name="Converted14">
      <style:paragraph-properties fo:margin-left="0.1063in" fo:margin-right="2.528in" fo:margin-top="0.0508in" fo:margin-bottom="0in" style:contextual-spacing="false" fo:line-height="202%" style:page-number="auto"/>
    </style:style>
    <style:style style:name="P195" style:family="paragraph" style:parent-style-name="List_20_Paragraph" style:list-style-name="WWNum16">
      <style:paragraph-properties fo:margin-left="0.6071in" fo:margin-right="0in" fo:margin-top="0in" fo:margin-bottom="0in" style:contextual-spacing="false" fo:line-height="0.1898in" fo:text-align="left" style:justify-single-word="false" fo:text-indent="-0.25in" style:auto-text-indent="false">
        <style:tab-stops>
          <style:tab-stop style:position="0.6071in"/>
        </style:tab-stops>
      </style:paragraph-properties>
    </style:style>
    <style:style style:name="P196" style:family="paragraph" style:parent-style-name="List_20_Paragraph" style:list-style-name="WWNum16">
      <style:paragraph-properties fo:margin-left="0.6071in" fo:margin-right="0in" fo:margin-top="0in" fo:margin-bottom="0in" style:contextual-spacing="false" fo:line-height="100%" fo:text-align="left" style:justify-single-word="false" fo:text-indent="-0.25in" style:auto-text-indent="false">
        <style:tab-stops>
          <style:tab-stop style:position="0.6071in"/>
        </style:tab-stops>
      </style:paragraph-properties>
    </style:style>
    <style:style style:name="P197" style:family="paragraph" style:parent-style-name="Text_20_body">
      <style:paragraph-properties fo:margin-top="0.0035in" fo:margin-bottom="0in" style:contextual-spacing="false"/>
    </style:style>
    <style:style style:name="P198" style:family="paragraph" style:parent-style-name="Text_20_body">
      <style:paragraph-properties fo:margin-top="0.139in" fo:margin-bottom="0in" style:contextual-spacing="false"/>
      <style:text-properties fo:font-size="10pt" style:font-size-asian="10pt"/>
    </style:style>
    <style:style style:name="P199" style:family="paragraph" style:parent-style-name="Text_20_body">
      <style:paragraph-properties fo:margin-top="0.1602in" fo:margin-bottom="0in" style:contextual-spacing="false"/>
    </style:style>
    <style:style style:name="P200" style:family="paragraph" style:parent-style-name="Text_20_body">
      <style:paragraph-properties fo:margin-top="0.0398in" fo:margin-bottom="0in" style:contextual-spacing="false"/>
      <style:text-properties style:font-name="Calibri" fo:font-size="9pt" fo:font-style="italic" style:font-size-asian="9pt" style:font-style-asian="italic"/>
    </style:style>
    <style:style style:name="P201" style:family="paragraph" style:parent-style-name="Text_20_body">
      <style:paragraph-properties fo:margin-left="0.1063in" fo:margin-right="0.4618in" fo:margin-top="0.0008in" fo:margin-bottom="0in" style:contextual-spacing="false"/>
    </style:style>
    <style:style style:name="P202" style:family="paragraph" style:parent-style-name="Text_20_body">
      <style:paragraph-properties fo:margin-top="0.0043in" fo:margin-bottom="0in" style:contextual-spacing="false"/>
    </style:style>
    <style:style style:name="P203" style:family="paragraph" style:parent-style-name="Heading_20_3" style:list-style-name="WWNum15">
      <style:paragraph-properties fo:margin-left="0.911in" fo:margin-right="0in" fo:margin-top="0in" fo:margin-bottom="0in" style:contextual-spacing="false" fo:line-height="100%" fo:text-align="left" style:justify-single-word="false" fo:text-indent="-0.3126in" style:auto-text-indent="false">
        <style:tab-stops>
          <style:tab-stop style:position="0.911in"/>
        </style:tab-stops>
      </style:paragraph-properties>
    </style:style>
    <style:style style:name="P204" style:family="paragraph" style:parent-style-name="Text_20_body">
      <style:paragraph-properties fo:margin-left="0.1063in" fo:margin-right="0.4618in" fo:margin-top="0.2299in" fo:margin-bottom="0in" style:contextual-spacing="false"/>
    </style:style>
    <style:style style:name="P205" style:family="paragraph" style:parent-style-name="Text_20_body">
      <style:paragraph-properties fo:margin-top="0.0016in" fo:margin-bottom="0in" style:contextual-spacing="false"/>
    </style:style>
    <style:style style:name="P206" style:family="paragraph" style:parent-style-name="List_20_Paragraph" style:list-style-name="WWNum17">
      <style:paragraph-properties fo:margin-left="0.6071in" fo:margin-right="0in" fo:margin-top="0in" fo:margin-bottom="0in" style:contextual-spacing="false" fo:line-height="100%" fo:text-align="left" style:justify-single-word="false" fo:text-indent="-0.25in" style:auto-text-indent="false">
        <style:tab-stops>
          <style:tab-stop style:position="0.6071in"/>
        </style:tab-stops>
      </style:paragraph-properties>
    </style:style>
    <style:style style:name="P207" style:family="paragraph" style:parent-style-name="List_20_Paragraph" style:list-style-name="WWNum17">
      <style:paragraph-properties fo:margin-left="1.1063in" fo:margin-right="0in" fo:margin-top="0in" fo:margin-bottom="0in" style:contextual-spacing="false" fo:line-height="0.1866in" fo:text-align="left" style:justify-single-word="false" fo:text-indent="-0.2492in" style:auto-text-indent="false">
        <style:tab-stops>
          <style:tab-stop style:position="1.1063in"/>
        </style:tab-stops>
      </style:paragraph-properties>
    </style:style>
    <style:style style:name="P208" style:family="paragraph" style:parent-style-name="Heading_20_6" style:list-style-name="WWNum17">
      <style:paragraph-properties fo:margin-left="0.6071in" fo:margin-right="0in" fo:margin-top="0in" fo:margin-bottom="0in" style:contextual-spacing="false" fo:line-height="0.1917in" fo:text-align="left" style:justify-single-word="false" fo:text-indent="-0.25in" style:auto-text-indent="false">
        <style:tab-stops>
          <style:tab-stop style:position="0.6071in"/>
        </style:tab-stops>
      </style:paragraph-properties>
    </style:style>
    <style:style style:name="P209" style:family="paragraph" style:parent-style-name="Text_20_body">
      <style:paragraph-properties fo:margin-top="0.0071in" fo:margin-bottom="0in" style:contextual-spacing="false"/>
      <style:text-properties style:font-name="Calibri" fo:font-size="11pt" style:font-size-asian="11pt"/>
    </style:style>
    <style:style style:name="P210" style:family="paragraph" style:parent-style-name="List_20_Paragraph" style:list-style-name="WWNum18">
      <style:paragraph-properties fo:margin-left="0.6071in" fo:margin-right="0in" fo:margin-top="0in" fo:margin-bottom="0in" style:contextual-spacing="false" fo:line-height="100%" fo:text-align="left" style:justify-single-word="false" fo:text-indent="-0.25in" style:auto-text-indent="false">
        <style:tab-stops>
          <style:tab-stop style:position="0.6071in"/>
        </style:tab-stops>
      </style:paragraph-properties>
    </style:style>
    <style:style style:name="P211" style:family="paragraph" style:parent-style-name="List_20_Paragraph" style:list-style-name="WWNum18">
      <style:paragraph-properties fo:margin-left="1.1063in" fo:margin-right="0in" fo:margin-top="0in" fo:margin-bottom="0in" style:contextual-spacing="false" fo:line-height="0.1866in" fo:text-align="left" style:justify-single-word="false" fo:text-indent="-0.2492in" style:auto-text-indent="false">
        <style:tab-stops>
          <style:tab-stop style:position="1.1063in"/>
        </style:tab-stops>
      </style:paragraph-properties>
    </style:style>
    <style:style style:name="P212" style:family="paragraph" style:parent-style-name="Heading_20_6" style:list-style-name="WWNum18">
      <style:paragraph-properties fo:margin-left="0.6071in" fo:margin-right="0in" fo:margin-top="0in" fo:margin-bottom="0in" style:contextual-spacing="false" fo:line-height="0.1917in" fo:text-align="left" style:justify-single-word="false" fo:text-indent="-0.25in" style:auto-text-indent="false">
        <style:tab-stops>
          <style:tab-stop style:position="0.6071in"/>
        </style:tab-stops>
      </style:paragraph-properties>
    </style:style>
    <style:style style:name="P213" style:family="paragraph" style:parent-style-name="List_20_Paragraph" style:list-style-name="WWNum18">
      <style:paragraph-properties fo:margin-left="1.1063in" fo:margin-right="0in" fo:margin-top="0in" fo:margin-bottom="0in" style:contextual-spacing="false" fo:line-height="0.1862in" fo:text-align="left" style:justify-single-word="false" fo:text-indent="-0.2492in" style:auto-text-indent="false">
        <style:tab-stops>
          <style:tab-stop style:position="1.1063in"/>
        </style:tab-stops>
      </style:paragraph-properties>
    </style:style>
    <style:style style:name="P214" style:family="paragraph" style:parent-style-name="List_20_Paragraph" style:list-style-name="WWNum18">
      <style:paragraph-properties fo:margin-left="1.1063in" fo:margin-right="0in" fo:margin-top="0in" fo:margin-bottom="0in" style:contextual-spacing="false" fo:line-height="0.1854in" fo:text-align="left" style:justify-single-word="false" fo:text-indent="-0.2492in" style:auto-text-indent="false">
        <style:tab-stops>
          <style:tab-stop style:position="1.1063in"/>
        </style:tab-stops>
      </style:paragraph-properties>
    </style:style>
    <style:style style:name="P215" style:family="paragraph" style:parent-style-name="List_20_Paragraph" style:list-style-name="WWNum18">
      <style:paragraph-properties fo:margin-left="1.1063in" fo:margin-right="0in" fo:margin-top="0in" fo:margin-bottom="0in" style:contextual-spacing="false" fo:line-height="100%" fo:text-align="left" style:justify-single-word="false" fo:text-indent="-0.2492in" style:auto-text-indent="false">
        <style:tab-stops>
          <style:tab-stop style:position="1.1063in"/>
        </style:tab-stops>
      </style:paragraph-properties>
    </style:style>
    <style:style style:name="P216" style:family="paragraph" style:parent-style-name="Heading_20_6" style:list-style-name="WWNum18" style:master-page-name="Converted15">
      <style:paragraph-properties fo:margin-left="0.6071in" fo:margin-right="0in" fo:margin-top="0.0508in" fo:margin-bottom="0in" style:contextual-spacing="false" fo:line-height="100%" fo:text-align="left" style:justify-single-word="false" fo:text-indent="-0.25in" style:auto-text-indent="false" style:page-number="auto">
        <style:tab-stops>
          <style:tab-stop style:position="0.6071in"/>
        </style:tab-stops>
      </style:paragraph-properties>
    </style:style>
    <style:style style:name="P217" style:family="paragraph" style:parent-style-name="List_20_Paragraph" style:list-style-name="WWNum18">
      <style:paragraph-properties fo:margin-left="1.1063in" fo:margin-right="0in" fo:margin-top="0.0008in" fo:margin-bottom="0in" style:contextual-spacing="false" fo:line-height="100%" fo:text-align="left" style:justify-single-word="false" fo:text-indent="-0.2492in" style:auto-text-indent="false">
        <style:tab-stops>
          <style:tab-stop style:position="1.1063in"/>
        </style:tab-stops>
      </style:paragraph-properties>
    </style:style>
    <style:style style:name="P218" style:family="paragraph" style:parent-style-name="Heading_20_3" style:list-style-name="WWNum15">
      <style:paragraph-properties fo:margin-left="0.911in" fo:margin-right="0in" fo:margin-top="0.0008in" fo:margin-bottom="0in" style:contextual-spacing="false" fo:line-height="100%" fo:text-align="left" style:justify-single-word="false" fo:text-indent="-0.3126in" style:auto-text-indent="false">
        <style:tab-stops>
          <style:tab-stop style:position="0.911in"/>
        </style:tab-stops>
      </style:paragraph-properties>
    </style:style>
    <style:style style:name="P219" style:family="paragraph" style:parent-style-name="Text_20_body">
      <style:paragraph-properties fo:margin-left="0.1063in" fo:margin-right="0in" fo:margin-top="0.0354in" fo:margin-bottom="0in" style:contextual-spacing="false"/>
    </style:style>
    <style:style style:name="P220" style:family="paragraph" style:parent-style-name="Heading_20_6">
      <style:paragraph-properties fo:margin-top="0.1665in" fo:margin-bottom="0in" style:contextual-spacing="false"/>
    </style:style>
    <style:style style:name="P221" style:family="paragraph" style:parent-style-name="List_20_Paragraph" style:list-style-name="WWNum19">
      <style:paragraph-properties fo:margin-left="0.202in" fo:margin-right="0in" fo:margin-top="0.1689in" fo:margin-bottom="0in" style:contextual-spacing="false" fo:line-height="100%" fo:text-align="left" style:justify-single-word="false" fo:text-indent="-0.0957in" style:auto-text-indent="false">
        <style:tab-stops>
          <style:tab-stop style:position="0.202in"/>
        </style:tab-stops>
      </style:paragraph-properties>
    </style:style>
    <style:style style:name="P222" style:family="paragraph" style:parent-style-name="List_20_Paragraph" style:list-style-name="WWNum19">
      <style:paragraph-properties fo:margin-left="0.1063in" fo:margin-right="0.489in" fo:margin-top="0.1118in" fo:margin-bottom="0in" style:contextual-spacing="false" fo:line-height="115%" fo:text-align="left" style:justify-single-word="false" fo:text-indent="0in" style:auto-text-indent="false">
        <style:tab-stops>
          <style:tab-stop style:position="0.2035in"/>
        </style:tab-stops>
      </style:paragraph-properties>
    </style:style>
    <style:style style:name="P223" style:family="paragraph" style:parent-style-name="Heading_20_6">
      <style:paragraph-properties fo:margin-top="0.0839in" fo:margin-bottom="0in" style:contextual-spacing="false"/>
    </style:style>
    <style:style style:name="P224" style:family="paragraph" style:parent-style-name="List_20_Paragraph" style:list-style-name="WWNum19">
      <style:paragraph-properties fo:margin-left="0.202in" fo:margin-right="0in" fo:margin-top="0.1673in" fo:margin-bottom="0in" style:contextual-spacing="false" fo:line-height="100%" fo:text-align="left" style:justify-single-word="false" fo:text-indent="-0.0957in" style:auto-text-indent="false">
        <style:tab-stops>
          <style:tab-stop style:position="0.202in"/>
        </style:tab-stops>
      </style:paragraph-properties>
    </style:style>
    <style:style style:name="P225" style:family="paragraph" style:parent-style-name="List_20_Paragraph" style:list-style-name="WWNum19">
      <style:paragraph-properties fo:margin-left="0.202in" fo:margin-right="0in" fo:margin-top="0.111in" fo:margin-bottom="0in" style:contextual-spacing="false" fo:line-height="100%" fo:text-align="left" style:justify-single-word="false" fo:text-indent="-0.0957in" style:auto-text-indent="false">
        <style:tab-stops>
          <style:tab-stop style:position="0.202in"/>
        </style:tab-stops>
      </style:paragraph-properties>
    </style:style>
    <style:style style:name="P226" style:family="paragraph" style:parent-style-name="List_20_Paragraph" style:list-style-name="WWNum19">
      <style:paragraph-properties fo:margin-left="0.202in" fo:margin-right="0in" fo:margin-top="0.1138in" fo:margin-bottom="0in" style:contextual-spacing="false" fo:line-height="100%" fo:text-align="left" style:justify-single-word="false" fo:text-indent="-0.0957in" style:auto-text-indent="false">
        <style:tab-stops>
          <style:tab-stop style:position="0.202in"/>
        </style:tab-stops>
      </style:paragraph-properties>
    </style:style>
    <style:style style:name="P227" style:family="paragraph" style:parent-style-name="Heading_20_3" style:list-style-name="WWNum15">
      <style:paragraph-properties fo:margin-left="0.911in" fo:margin-right="0in" fo:margin-top="0.1402in" fo:margin-bottom="0in" style:contextual-spacing="false" fo:line-height="100%" fo:text-align="left" style:justify-single-word="false" fo:text-indent="-0.3126in" style:auto-text-indent="false">
        <style:tab-stops>
          <style:tab-stop style:position="0.911in"/>
        </style:tab-stops>
      </style:paragraph-properties>
      <style:text-properties fo:letter-spacing="-0.0016in"/>
    </style:style>
    <style:style style:name="P228" style:family="paragraph" style:parent-style-name="Text_20_body">
      <style:paragraph-properties fo:margin-left="0.1063in" fo:margin-right="0.3016in" fo:margin-top="0.0346in" fo:margin-bottom="0in" style:contextual-spacing="false" fo:line-height="115%" fo:text-indent="0.25in" style:auto-text-indent="false"/>
    </style:style>
    <style:style style:name="P229" style:family="paragraph" style:parent-style-name="Heading_20_2" style:master-page-name="Converted16">
      <style:paragraph-properties fo:margin-left="0.4937in" fo:margin-right="0in" style:page-number="auto"/>
    </style:style>
    <style:style style:name="P230" style:family="paragraph" style:parent-style-name="Heading_20_3" style:list-style-name="WWNum14">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text-properties fo:letter-spacing="-0.0016in"/>
    </style:style>
    <style:style style:name="P231" style:family="paragraph" style:parent-style-name="Text_20_body">
      <style:paragraph-properties fo:margin-left="0.1063in" fo:margin-right="0.4618in" fo:margin-top="0.0339in" fo:margin-bottom="0in" style:contextual-spacing="false" fo:line-height="115%" fo:text-indent="0.1917in" style:auto-text-indent="false"/>
    </style:style>
    <style:style style:name="P232" style:family="paragraph" style:parent-style-name="Text_20_body">
      <style:paragraph-properties fo:margin-left="0.1063in" fo:margin-right="0.4618in" fo:line-height="115%"/>
    </style:style>
    <style:style style:name="P233" style:family="paragraph" style:parent-style-name="Heading_20_3" style:list-style-name="WWNum14">
      <style:paragraph-properties fo:margin-left="0.9118in" fo:margin-right="0in" fo:margin-top="0.1693in" fo:margin-bottom="0in" style:contextual-spacing="false" fo:line-height="100%" fo:text-align="left" style:justify-single-word="false" fo:text-indent="-0.3134in" style:auto-text-indent="false">
        <style:tab-stops>
          <style:tab-stop style:position="0.9118in"/>
        </style:tab-stops>
      </style:paragraph-properties>
    </style:style>
    <style:style style:name="P234" style:family="paragraph" style:parent-style-name="Standard">
      <style:paragraph-properties fo:margin-left="0.1063in" fo:margin-right="0in" fo:margin-top="0.0362in" fo:margin-bottom="0in" style:contextual-spacing="false" fo:text-align="left" style:justify-single-word="false" fo:text-indent="0in" style:auto-text-indent="false"/>
    </style:style>
    <style:style style:name="P235" style:family="paragraph" style:parent-style-name="Text_20_body">
      <style:paragraph-properties fo:margin-top="0.0008in" fo:margin-bottom="0in" style:contextual-spacing="false"/>
      <style:text-properties style:font-name="Cambria" fo:font-size="9pt" style:font-size-asian="9pt"/>
    </style:style>
    <style:style style:name="P236" style:family="paragraph" style:parent-style-name="Standard">
      <style:paragraph-properties fo:margin-left="2.2728in" fo:margin-right="2.4689in" fo:margin-top="0.1543in" fo:margin-bottom="0in" style:contextual-spacing="false" fo:text-align="center" style:justify-single-word="false" fo:text-indent="0in" style:auto-text-indent="false"/>
    </style:style>
    <style:style style:name="P237" style:family="paragraph" style:parent-style-name="Text_20_body">
      <style:paragraph-properties fo:margin-top="0.0945in" fo:margin-bottom="0in" style:contextual-spacing="false"/>
      <style:text-properties style:font-name="Calibri" fo:font-size="9pt" fo:font-style="italic" style:font-size-asian="9pt" style:font-style-asian="italic"/>
    </style:style>
    <style:style style:name="P238" style:family="paragraph" style:parent-style-name="List_20_Paragraph" style:list-style-name="WWNum20">
      <style:paragraph-properties fo:margin-left="0.2756in" fo:margin-right="0in" fo:margin-top="0in" fo:margin-bottom="0in" style:contextual-spacing="false" fo:line-height="100%" fo:text-align="left" style:justify-single-word="false" fo:text-indent="-0.2472in" style:auto-text-indent="false">
        <style:tab-stops>
          <style:tab-stop style:position="0.2756in"/>
        </style:tab-stops>
      </style:paragraph-properties>
    </style:style>
    <style:style style:name="P239" style:family="paragraph" style:parent-style-name="Text_20_body">
      <style:paragraph-properties fo:margin-left="0.2764in" fo:margin-right="0.3299in" fo:margin-top="0.0008in" fo:margin-bottom="0in" style:contextual-spacing="false"/>
    </style:style>
    <style:style style:name="P240" style:family="paragraph" style:parent-style-name="List_20_Paragraph" style:list-style-name="WWNum20">
      <style:paragraph-properties fo:margin-left="0.2764in" fo:margin-right="0.4071in" fo:margin-top="0.1917in" fo:margin-bottom="0in" style:contextual-spacing="false" fo:line-height="100%" fo:text-align="left" style:justify-single-word="false" fo:text-indent="-0.2484in" style:auto-text-indent="false">
        <style:tab-stops>
          <style:tab-stop style:position="0.2752in"/>
          <style:tab-stop style:position="0.2764in"/>
        </style:tab-stops>
      </style:paragraph-properties>
    </style:style>
    <style:style style:name="P241" style:family="paragraph" style:parent-style-name="List_20_Paragraph" style:list-style-name="WWNum20">
      <style:paragraph-properties fo:margin-left="0.2756in" fo:margin-right="0in" fo:margin-top="0.1917in" fo:margin-bottom="0in" style:contextual-spacing="false" fo:line-height="100%" fo:text-align="left" style:justify-single-word="false" fo:text-indent="-0.2472in" style:auto-text-indent="false">
        <style:tab-stops>
          <style:tab-stop style:position="0.2756in"/>
        </style:tab-stops>
      </style:paragraph-properties>
    </style:style>
    <style:style style:name="P242" style:family="paragraph" style:parent-style-name="Text_20_body">
      <style:paragraph-properties fo:margin-left="0.2764in" fo:margin-right="0in"/>
    </style:style>
    <style:style style:name="P243" style:family="paragraph" style:parent-style-name="List_20_Paragraph" style:list-style-name="WWNum20">
      <style:paragraph-properties fo:margin-left="0.2764in" fo:margin-right="0.3398in" fo:margin-top="0in" fo:margin-bottom="0in" style:contextual-spacing="false" fo:line-height="100%" fo:text-align="left" style:justify-single-word="false" fo:text-indent="-0.2484in" style:auto-text-indent="false">
        <style:tab-stops>
          <style:tab-stop style:position="0.2752in"/>
          <style:tab-stop style:position="0.2764in"/>
        </style:tab-stops>
      </style:paragraph-properties>
    </style:style>
    <style:style style:name="P244" style:family="paragraph" style:parent-style-name="List_20_Paragraph" style:list-style-name="WWNum20">
      <style:paragraph-properties fo:margin-left="0.2764in" fo:margin-right="0.4437in" fo:margin-top="0in" fo:margin-bottom="0in" style:contextual-spacing="false" fo:line-height="100%" fo:text-align="left" style:justify-single-word="false" fo:text-indent="-0.2484in" style:auto-text-indent="false">
        <style:tab-stops>
          <style:tab-stop style:position="0.2752in"/>
          <style:tab-stop style:position="0.2764in"/>
        </style:tab-stops>
      </style:paragraph-properties>
    </style:style>
    <style:style style:name="P245" style:family="paragraph" style:parent-style-name="Heading_20_3" style:list-style-name="WWNum14">
      <style:paragraph-properties fo:margin-left="0.911in" fo:margin-right="0in" fo:margin-top="0.0299in" fo:margin-bottom="0in" style:contextual-spacing="false" fo:line-height="100%" fo:text-align="left" style:justify-single-word="false" fo:text-indent="-0.3126in" style:auto-text-indent="false">
        <style:tab-stops>
          <style:tab-stop style:position="0.911in"/>
        </style:tab-stops>
      </style:paragraph-properties>
    </style:style>
    <style:style style:name="P246" style:family="paragraph" style:parent-style-name="Text_20_body">
      <style:paragraph-properties fo:margin-left="0.1063in" fo:margin-right="0.3299in" fo:margin-top="0.0346in" fo:margin-bottom="0in" style:contextual-spacing="false" fo:line-height="115%"/>
    </style:style>
    <style:style style:name="P247" style:family="paragraph" style:parent-style-name="Text_20_body">
      <style:paragraph-properties fo:margin-top="0.0681in" fo:margin-bottom="0in" style:contextual-spacing="false"/>
      <style:text-properties fo:font-size="10pt" style:font-size-asian="10pt"/>
    </style:style>
    <style:style style:name="P248" style:family="paragraph" style:parent-style-name="Text_20_body">
      <style:paragraph-properties fo:margin-top="0.1209in" fo:margin-bottom="0in" style:contextual-spacing="false"/>
    </style:style>
    <style:style style:name="P249" style:family="paragraph" style:parent-style-name="Standard">
      <style:paragraph-properties fo:margin-left="2.2736in" fo:margin-right="2.4665in" fo:margin-top="0in" fo:margin-bottom="0in" style:contextual-spacing="false" fo:text-align="center" style:justify-single-word="false" fo:text-indent="0in" style:auto-text-indent="false"/>
    </style:style>
    <style:style style:name="P250" style:family="paragraph" style:parent-style-name="Text_20_body">
      <style:paragraph-properties fo:margin-left="0.1063in" fo:margin-right="0.4618in" fo:margin-top="0.1362in" fo:margin-bottom="0in" style:contextual-spacing="false" fo:line-height="115%"/>
    </style:style>
    <style:style style:name="P251" style:family="paragraph" style:parent-style-name="Standard">
      <style:paragraph-properties fo:margin-left="0.1063in" fo:margin-right="0in" fo:margin-top="0.1398in" fo:margin-bottom="0in" style:contextual-spacing="false" fo:text-align="left" style:justify-single-word="false" fo:text-indent="0in" style:auto-text-indent="false"/>
    </style:style>
    <style:style style:name="P252" style:family="paragraph" style:parent-style-name="Text_20_body">
      <style:paragraph-properties fo:margin-left="0.1063in" fo:margin-right="0.4618in" fo:margin-top="0.0307in" fo:margin-bottom="0in" style:contextual-spacing="false" fo:line-height="115%"/>
    </style:style>
    <style:style style:name="P253" style:family="paragraph" style:parent-style-name="Text_20_body">
      <style:paragraph-properties fo:margin-left="0.1063in" fo:margin-right="0in" fo:margin-top="0.1374in" fo:margin-bottom="0in" style:contextual-spacing="false"/>
    </style:style>
    <style:style style:name="P254" style:family="paragraph" style:parent-style-name="Text_20_body">
      <style:paragraph-properties fo:margin-left="0.1063in" fo:margin-right="0in" fo:margin-top="0.0307in" fo:margin-bottom="0in" style:contextual-spacing="false" fo:line-height="115%"/>
    </style:style>
    <style:style style:name="P255" style:family="paragraph" style:parent-style-name="Text_20_body">
      <style:paragraph-properties fo:margin-left="0.1063in" fo:margin-right="0.3299in" fo:margin-top="0.1398in" fo:margin-bottom="0in" style:contextual-spacing="false" fo:line-height="115%"/>
    </style:style>
    <style:style style:name="P256" style:family="paragraph" style:parent-style-name="Text_20_body">
      <style:paragraph-properties fo:margin-left="0.1063in" fo:margin-right="0in" fo:margin-top="0.1382in" fo:margin-bottom="0in" style:contextual-spacing="false" fo:line-height="115%"/>
    </style:style>
    <style:style style:name="P257" style:family="paragraph" style:parent-style-name="Heading_20_3" style:list-style-name="WWNum14">
      <style:paragraph-properties fo:margin-left="0.911in" fo:margin-right="0in" fo:margin-top="0.1409in" fo:margin-bottom="0in" style:contextual-spacing="false" fo:line-height="100%" fo:text-align="left" style:justify-single-word="false" fo:text-indent="-0.3126in" style:auto-text-indent="false">
        <style:tab-stops>
          <style:tab-stop style:position="0.911in"/>
        </style:tab-stops>
      </style:paragraph-properties>
    </style:style>
    <style:style style:name="P258" style:family="paragraph" style:parent-style-name="Text_20_body">
      <style:paragraph-properties fo:margin-left="0.1063in" fo:margin-right="0in" fo:margin-top="0.0339in" fo:margin-bottom="0in" style:contextual-spacing="false"/>
    </style:style>
    <style:style style:name="P259" style:family="paragraph" style:parent-style-name="Text_20_body">
      <style:paragraph-properties fo:margin-left="0.1063in" fo:margin-right="0in" fo:margin-top="0.1398in" fo:margin-bottom="0in" style:contextual-spacing="false"/>
    </style:style>
    <style:style style:name="P260" style:family="paragraph" style:parent-style-name="Standard" style:master-page-name="Converted18">
      <style:paragraph-properties fo:margin-left="2.2728in" fo:margin-right="2.4681in" fo:margin-top="0.0252in" fo:margin-bottom="0in" style:contextual-spacing="false" fo:text-align="center" style:justify-single-word="false" fo:text-indent="0in" style:auto-text-indent="false" style:page-number="auto"/>
    </style:style>
    <style:style style:name="P261" style:family="paragraph" style:parent-style-name="Text_20_body">
      <style:paragraph-properties fo:margin-top="0.0063in" fo:margin-bottom="0in" style:contextual-spacing="false"/>
      <style:text-properties style:font-name="Calibri" fo:font-size="9.5pt" fo:font-style="italic" style:font-size-asian="9.5pt" style:font-style-asian="italic"/>
    </style:style>
    <style:style style:name="P262" style:family="paragraph" style:parent-style-name="Table_20_Paragraph">
      <style:paragraph-properties fo:margin-left="0.0744in" fo:margin-right="0in" fo:line-height="0.1563in"/>
    </style:style>
    <style:style style:name="P263" style:family="paragraph" style:parent-style-name="Table_20_Paragraph">
      <style:paragraph-properties fo:margin-left="0.0799in" fo:margin-right="0in" fo:line-height="0.1563in"/>
    </style:style>
    <style:style style:name="P264" style:family="paragraph" style:parent-style-name="Table_20_Paragraph">
      <style:paragraph-properties fo:margin-left="0.1752in" fo:margin-right="0in" fo:line-height="0.1563in"/>
    </style:style>
    <style:style style:name="P265" style:family="paragraph" style:parent-style-name="Table_20_Paragraph">
      <style:paragraph-properties fo:margin-left="0.0744in" fo:margin-right="0in" fo:line-height="0.1701in"/>
    </style:style>
    <style:style style:name="P266" style:family="paragraph" style:parent-style-name="Table_20_Paragraph">
      <style:paragraph-properties fo:margin-left="0.0799in" fo:margin-right="0in"/>
    </style:style>
    <style:style style:name="P267" style:family="paragraph" style:parent-style-name="Table_20_Paragraph">
      <style:paragraph-properties fo:margin-left="0.1752in" fo:margin-right="0in"/>
    </style:style>
    <style:style style:name="P268" style:family="paragraph" style:parent-style-name="Table_20_Paragraph">
      <style:paragraph-properties fo:line-height="0.1728in"/>
    </style:style>
    <style:style style:name="P269" style:family="paragraph" style:parent-style-name="Table_20_Paragraph">
      <style:paragraph-properties fo:line-height="0.1839in"/>
    </style:style>
    <style:style style:name="P270" style:family="paragraph" style:parent-style-name="Table_20_Paragraph">
      <style:paragraph-properties fo:margin-left="0.0799in" fo:margin-right="0in" fo:line-height="0.1839in"/>
    </style:style>
    <style:style style:name="P271" style:family="paragraph" style:parent-style-name="Table_20_Paragraph">
      <style:paragraph-properties fo:margin-left="0.1752in" fo:margin-right="0in" fo:line-height="0.1839in"/>
    </style:style>
    <style:style style:name="P272" style:family="paragraph" style:parent-style-name="Table_20_Paragraph">
      <style:paragraph-properties fo:margin-left="0.0799in" fo:margin-right="0in" fo:line-height="0.1728in"/>
    </style:style>
    <style:style style:name="P273" style:family="paragraph" style:parent-style-name="Table_20_Paragraph">
      <style:paragraph-properties fo:margin-left="0.1752in" fo:margin-right="0in" fo:line-height="0.1728in"/>
    </style:style>
    <style:style style:name="P274" style:family="paragraph" style:parent-style-name="Table_20_Paragraph">
      <style:paragraph-properties fo:line-height="100%"/>
    </style:style>
    <style:style style:name="P275" style:family="paragraph" style:parent-style-name="Table_20_Paragraph">
      <style:paragraph-properties fo:margin-left="0.0799in" fo:margin-right="0in" fo:line-height="100%"/>
    </style:style>
    <style:style style:name="P276" style:family="paragraph" style:parent-style-name="Table_20_Paragraph">
      <style:paragraph-properties fo:margin-left="0.1752in" fo:margin-right="0in" fo:line-height="100%"/>
    </style:style>
    <style:style style:name="P277" style:family="paragraph" style:parent-style-name="Table_20_Paragraph">
      <style:paragraph-properties fo:line-height="0.1898in"/>
    </style:style>
    <style:style style:name="P278" style:family="paragraph" style:parent-style-name="Text_20_body">
      <style:text-properties style:font-name="Calibri" fo:font-size="10pt" fo:font-style="italic" style:font-size-asian="10pt" style:font-style-asian="italic"/>
    </style:style>
    <style:style style:name="P279" style:family="paragraph" style:parent-style-name="Text_20_body">
      <style:paragraph-properties fo:margin-top="0.0236in" fo:margin-bottom="0in" style:contextual-spacing="false"/>
      <style:text-properties style:font-name="Calibri" fo:font-size="10pt" fo:font-style="italic" style:font-size-asian="10pt" style:font-style-asian="italic"/>
    </style:style>
    <style:style style:name="P280" style:family="paragraph" style:parent-style-name="Heading_20_3" style:list-style-name="WWNum14">
      <style:paragraph-properties fo:margin-left="0.911in" fo:margin-right="0in" fo:margin-top="0in" fo:margin-bottom="0in" style:contextual-spacing="false" fo:line-height="100%" fo:text-align="left" style:justify-single-word="false" fo:text-indent="-0.3126in" style:auto-text-indent="false">
        <style:tab-stops>
          <style:tab-stop style:position="0.911in"/>
        </style:tab-stops>
      </style:paragraph-properties>
    </style:style>
    <style:style style:name="P281" style:family="paragraph" style:parent-style-name="Standard">
      <style:paragraph-properties fo:margin-left="0.1063in" fo:margin-right="0in" fo:margin-top="0.2043in" fo:margin-bottom="0in" style:contextual-spacing="false" fo:text-align="left" style:justify-single-word="false" fo:text-indent="0in" style:auto-text-indent="false"/>
    </style:style>
    <style:style style:name="P282" style:family="paragraph" style:parent-style-name="Text_20_body">
      <style:paragraph-properties fo:margin-left="0.1063in" fo:margin-right="0in" fo:margin-top="0.0272in" fo:margin-bottom="0in" style:contextual-spacing="false"/>
    </style:style>
    <style:style style:name="P283" style:family="paragraph" style:parent-style-name="Text_20_body">
      <style:paragraph-properties fo:margin-left="0.1063in" fo:margin-right="0in" fo:margin-top="0.0283in" fo:margin-bottom="0in" style:contextual-spacing="false"/>
    </style:style>
    <style:style style:name="P284" style:family="paragraph" style:parent-style-name="List_20_Paragraph" style:list-style-name="WWNum21">
      <style:paragraph-properties fo:margin-left="0.2764in" fo:margin-right="0.4516in" fo:margin-top="0.1681in" fo:margin-bottom="0in" style:contextual-spacing="false" fo:line-height="100%" fo:text-align="left" style:justify-single-word="false" fo:text-indent="-0.2484in" style:auto-text-indent="false">
        <style:tab-stops>
          <style:tab-stop style:position="0.2764in"/>
        </style:tab-stops>
      </style:paragraph-properties>
    </style:style>
    <style:style style:name="P285" style:family="paragraph" style:parent-style-name="Text_20_body">
      <style:paragraph-properties fo:margin-left="0.2764in" fo:margin-right="0.4618in"/>
    </style:style>
    <style:style style:name="P286" style:family="paragraph" style:parent-style-name="List_20_Paragraph" style:list-style-name="WWNum21">
      <style:paragraph-properties fo:margin-left="0.2764in" fo:margin-right="0in" fo:margin-top="0in" fo:margin-bottom="0in" style:contextual-spacing="false" fo:line-height="0.2043in" fo:text-align="left" style:justify-single-word="false" fo:text-indent="-0.248in" style:auto-text-indent="false">
        <style:tab-stops>
          <style:tab-stop style:position="0.2764in"/>
        </style:tab-stops>
      </style:paragraph-properties>
    </style:style>
    <style:style style:name="P287" style:family="paragraph" style:parent-style-name="List_20_Paragraph" style:list-style-name="WWNum21">
      <style:paragraph-properties fo:margin-left="0.2764in" fo:margin-right="0.3453in" fo:margin-top="0in" fo:margin-bottom="0in" style:contextual-spacing="false" fo:line-height="100%" fo:text-align="left" style:justify-single-word="false" fo:text-indent="-0.2484in" style:auto-text-indent="false">
        <style:tab-stops>
          <style:tab-stop style:position="0.2764in"/>
        </style:tab-stops>
      </style:paragraph-properties>
    </style:style>
    <style:style style:name="P288" style:family="paragraph" style:parent-style-name="List_20_Paragraph" style:list-style-name="WWNum21">
      <style:paragraph-properties fo:margin-left="0.2764in" fo:margin-right="0.6862in" fo:margin-top="0in" fo:margin-bottom="0in" style:contextual-spacing="false" fo:line-height="100%" fo:text-align="left" style:justify-single-word="false" fo:text-indent="-0.2484in" style:auto-text-indent="false">
        <style:tab-stops>
          <style:tab-stop style:position="0.2764in"/>
        </style:tab-stops>
      </style:paragraph-properties>
    </style:style>
    <style:style style:name="P289" style:family="paragraph" style:parent-style-name="List_20_Paragraph" style:list-style-name="WWNum21">
      <style:paragraph-properties fo:margin-left="0.2764in" fo:margin-right="0in" fo:margin-top="0.0016in" fo:margin-bottom="0in" style:contextual-spacing="false" fo:line-height="0.2043in" fo:text-align="left" style:justify-single-word="false" fo:text-indent="-0.248in" style:auto-text-indent="false">
        <style:tab-stops>
          <style:tab-stop style:position="0.2764in"/>
        </style:tab-stops>
      </style:paragraph-properties>
    </style:style>
    <style:style style:name="P290" style:family="paragraph" style:parent-style-name="Text_20_body">
      <style:paragraph-properties fo:margin-left="0.2764in" fo:margin-right="0.3299in"/>
    </style:style>
    <style:style style:name="P291" style:family="paragraph" style:parent-style-name="Text_20_body">
      <style:paragraph-properties fo:margin-top="0.1126in" fo:margin-bottom="0in" style:contextual-spacing="false"/>
    </style:style>
    <style:style style:name="P292" style:family="paragraph" style:parent-style-name="Text_20_body">
      <style:paragraph-properties fo:margin-top="0.0307in" fo:margin-bottom="0in" style:contextual-spacing="false"/>
      <style:text-properties style:font-name="Arial" fo:font-weight="bold" style:font-weight-asian="bold"/>
    </style:style>
    <style:style style:name="P293" style:family="paragraph" style:parent-style-name="Text_20_body">
      <style:paragraph-properties fo:margin-top="0.0016in" fo:margin-bottom="0in" style:contextual-spacing="false"/>
      <style:text-properties fo:font-weight="bold" style:font-weight-asian="bold"/>
    </style:style>
    <style:style style:name="P294" style:family="paragraph" style:parent-style-name="List_20_Paragraph" style:list-style-name="WWNum22">
      <style:paragraph-properties fo:margin-left="0.6071in" fo:margin-right="0in" fo:margin-top="0.0008in" fo:margin-bottom="0in" style:contextual-spacing="false" fo:line-height="100%" fo:text-align="left" style:justify-single-word="false" fo:text-indent="-0.25in" style:auto-text-indent="false">
        <style:tab-stops>
          <style:tab-stop style:position="0.6071in"/>
        </style:tab-stops>
      </style:paragraph-properties>
    </style:style>
    <style:style style:name="P295" style:family="paragraph" style:parent-style-name="List_20_Paragraph" style:list-style-name="WWNum22">
      <style:paragraph-properties fo:margin-left="0.6071in" fo:margin-right="0.4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296" style:family="paragraph" style:parent-style-name="List_20_Paragraph" style:list-style-name="WWNum22">
      <style:paragraph-properties fo:margin-left="0.6071in" fo:margin-right="0.4543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297" style:family="paragraph" style:parent-style-name="List_20_Paragraph" style:list-style-name="WWNum23">
      <style:paragraph-properties fo:margin-left="0.6071in" fo:margin-right="0.9382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298" style:family="paragraph" style:parent-style-name="List_20_Paragraph" style:list-style-name="WWNum23">
      <style:paragraph-properties fo:margin-left="0.6071in" fo:margin-right="0.7335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299" style:family="paragraph" style:parent-style-name="List_20_Paragraph" style:list-style-name="WWNum23">
      <style:paragraph-properties fo:margin-left="0.6071in" fo:margin-right="0in" fo:margin-top="0.0008in" fo:margin-bottom="0in" style:contextual-spacing="false" fo:line-height="100%" fo:text-align="left" style:justify-single-word="false" fo:text-indent="-0.25in" style:auto-text-indent="false">
        <style:tab-stops>
          <style:tab-stop style:position="0.6071in"/>
        </style:tab-stops>
      </style:paragraph-properties>
    </style:style>
    <style:style style:name="P300" style:family="paragraph" style:parent-style-name="List_20_Paragraph" style:list-style-name="WWNum23">
      <style:paragraph-properties fo:margin-left="0.6071in" fo:margin-right="0.7008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01" style:family="paragraph" style:parent-style-name="List_20_Paragraph" style:list-style-name="WWNum23">
      <style:paragraph-properties fo:margin-left="0.6071in" fo:margin-right="0.4465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02" style:family="paragraph" style:parent-style-name="List_20_Paragraph" style:list-style-name="WWNum23">
      <style:paragraph-properties fo:margin-left="0.6071in" fo:margin-right="0.5457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03" style:family="paragraph" style:parent-style-name="List_20_Paragraph" style:list-style-name="WWNum23">
      <style:paragraph-properties fo:margin-left="0.6071in" fo:margin-right="0.4209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04" style:family="paragraph" style:parent-style-name="Heading_20_6">
      <style:paragraph-properties fo:margin-top="0.0008in" fo:margin-bottom="0in" style:contextual-spacing="false"/>
    </style:style>
    <style:style style:name="P305" style:family="paragraph" style:parent-style-name="Text_20_body">
      <style:paragraph-properties fo:margin-top="0.0028in" fo:margin-bottom="0in" style:contextual-spacing="false"/>
      <style:text-properties fo:font-weight="bold" style:font-weight-asian="bold"/>
    </style:style>
    <style:style style:name="P306" style:family="paragraph" style:parent-style-name="Text_20_body">
      <style:paragraph-properties fo:margin-left="0.1063in" fo:margin-right="0.4618in" fo:margin-top="0in" fo:margin-bottom="0in" style:contextual-spacing="false"/>
      <style:text-properties officeooo:paragraph-rsid="00193b6c"/>
    </style:style>
    <style:style style:name="P307" style:family="paragraph" style:parent-style-name="Heading_20_6">
      <style:paragraph-properties fo:margin-left="0.3571in" fo:margin-right="0in" fo:margin-top="0.2291in" fo:margin-bottom="0in" style:contextual-spacing="false"/>
    </style:style>
    <style:style style:name="P308" style:family="paragraph" style:parent-style-name="List_20_Paragraph" style:list-style-name="WWNum24">
      <style:paragraph-properties fo:margin-left="0.6071in" fo:margin-right="0.3709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09" style:family="paragraph" style:parent-style-name="Text_20_body">
      <style:paragraph-properties fo:margin-top="0.0173in" fo:margin-bottom="0in" style:contextual-spacing="false"/>
      <style:text-properties fo:font-size="10pt" style:font-size-asian="10pt"/>
    </style:style>
    <style:style style:name="P310" style:family="paragraph" style:parent-style-name="Standard">
      <style:paragraph-properties fo:margin-left="2.2728in" fo:margin-right="2.4673in" fo:margin-top="0.111in" fo:margin-bottom="0in" style:contextual-spacing="false" fo:text-align="center" style:justify-single-word="false" fo:text-indent="0in" style:auto-text-indent="false"/>
    </style:style>
    <style:style style:name="P311" style:family="paragraph" style:parent-style-name="List_20_Paragraph" style:list-style-name="WWNum24">
      <style:paragraph-properties fo:margin-left="0.6071in" fo:margin-right="0.4882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12" style:family="paragraph" style:parent-style-name="Text_20_body">
      <style:paragraph-properties fo:margin-top="0.0181in" fo:margin-bottom="0in" style:contextual-spacing="false"/>
      <style:text-properties fo:font-size="10pt" style:font-size-asian="10pt"/>
    </style:style>
    <style:style style:name="P313" style:family="paragraph" style:parent-style-name="Text_20_body">
      <style:paragraph-properties fo:margin-top="0.0008in" fo:margin-bottom="0in" style:contextual-spacing="false"/>
      <style:text-properties fo:font-size="3pt" style:font-size-asian="3pt"/>
    </style:style>
    <style:style style:name="P314" style:family="paragraph" style:parent-style-name="Text_20_body">
      <style:paragraph-properties fo:margin-top="0.0661in" fo:margin-bottom="0in" style:contextual-spacing="false"/>
      <style:text-properties fo:font-size="15pt" style:font-size-asian="15pt"/>
    </style:style>
    <style:style style:name="P315" style:family="paragraph" style:parent-style-name="Standard">
      <style:paragraph-properties fo:margin-left="0.5984in" fo:margin-right="0in" fo:margin-top="0.0138in" fo:margin-bottom="0in" style:contextual-spacing="false" fo:text-align="left" style:justify-single-word="false" fo:text-indent="0in" style:auto-text-indent="false" fo:break-before="column"/>
    </style:style>
    <style:style style:name="P316" style:family="paragraph" style:parent-style-name="Text_20_body">
      <style:paragraph-properties fo:margin-left="0.1063in" fo:margin-right="0.3299in" fo:margin-top="0.0346in" fo:margin-bottom="0in" style:contextual-spacing="false" fo:text-indent="0.25in" style:auto-text-indent="false"/>
      <style:text-properties officeooo:paragraph-rsid="00193b6c"/>
    </style:style>
    <style:style style:name="P317" style:family="paragraph" style:parent-style-name="Heading_20_2" style:master-page-name="Converted16">
      <style:paragraph-properties fo:margin-left="0.4937in" fo:margin-right="0in" fo:line-height="100%" fo:text-align="left" style:justify-single-word="false" fo:orphans="0" fo:widows="0" style:page-number="auto" style:writing-mode="lr-tb"/>
      <style:text-properties fo:letter-spacing="-0.0016in" style:text-underline-style="solid" style:text-underline-width="auto" style:text-underline-color="font-color"/>
    </style:style>
    <style:style style:name="P318" style:family="paragraph" style:parent-style-name="Text_20_body">
      <style:paragraph-properties fo:margin-top="0.0583in" fo:margin-bottom="0in" style:contextual-spacing="false"/>
      <style:text-properties fo:font-size="15pt" fo:font-weight="bold" style:font-size-asian="15pt" style:font-weight-asian="bold"/>
    </style:style>
    <style:style style:name="P319" style:family="paragraph" style:parent-style-name="Heading_20_3" style:list-style-name="WWNum25">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text-properties fo:letter-spacing="-0.0016in"/>
    </style:style>
    <style:style style:name="P320" style:family="paragraph" style:parent-style-name="Text_20_body">
      <style:paragraph-properties fo:margin-left="0.1063in" fo:margin-right="0.4618in" fo:margin-top="0.0346in" fo:margin-bottom="0in" style:contextual-spacing="false" fo:line-height="115%" fo:text-indent="0.1917in" style:auto-text-indent="false"/>
    </style:style>
    <style:style style:name="P321" style:family="paragraph" style:parent-style-name="Text_20_body">
      <style:paragraph-properties fo:margin-left="0.1063in" fo:margin-right="0in" fo:margin-top="0.0008in" fo:margin-bottom="0in" style:contextual-spacing="false"/>
    </style:style>
    <style:style style:name="P322" style:family="paragraph" style:parent-style-name="Text_20_body">
      <style:paragraph-properties fo:margin-left="0.1063in" fo:margin-right="0in" fo:line-height="0.1909in"/>
    </style:style>
    <style:style style:name="P323" style:family="paragraph" style:parent-style-name="Heading_20_3" style:list-style-name="WWNum25">
      <style:paragraph-properties fo:margin-left="0.9118in" fo:margin-right="0in" fo:margin-top="0.1693in" fo:margin-bottom="0in" style:contextual-spacing="false" fo:line-height="100%" fo:text-align="left" style:justify-single-word="false" fo:text-indent="-0.3134in" style:auto-text-indent="false">
        <style:tab-stops>
          <style:tab-stop style:position="0.9118in"/>
        </style:tab-stops>
      </style:paragraph-properties>
    </style:style>
    <style:style style:name="P324" style:family="paragraph" style:parent-style-name="Text_20_body">
      <style:paragraph-properties fo:margin-left="0.1063in" fo:margin-right="0.4618in" fo:margin-top="0.2299in" fo:margin-bottom="0in" style:contextual-spacing="false" fo:text-indent="0.2083in" style:auto-text-indent="false"/>
    </style:style>
    <style:style style:name="P325" style:family="paragraph" style:parent-style-name="Heading_20_3" style:list-style-name="WWNum25">
      <style:paragraph-properties fo:margin-left="1.0661in" fo:margin-right="0in" fo:margin-top="0.0008in" fo:margin-bottom="0in" style:contextual-spacing="false" fo:line-height="100%" fo:text-align="left" style:justify-single-word="false" fo:text-indent="-0.3126in" style:auto-text-indent="false">
        <style:tab-stops>
          <style:tab-stop style:position="1.0661in"/>
        </style:tab-stops>
      </style:paragraph-properties>
    </style:style>
    <style:style style:name="P326" style:family="paragraph" style:parent-style-name="Text_20_body">
      <style:paragraph-properties fo:margin-left="0.1063in" fo:margin-right="0.4193in" fo:margin-top="0.2291in" fo:margin-bottom="0in" style:contextual-spacing="false" fo:text-align="justify" style:justify-single-word="false" fo:text-indent="0.2083in" style:auto-text-indent="false"/>
    </style:style>
    <style:style style:name="P327" style:family="paragraph" style:parent-style-name="Text_20_body">
      <style:paragraph-properties fo:margin-left="0.1063in" fo:margin-right="0.3882in" fo:text-align="justify" style:justify-single-word="false"/>
    </style:style>
    <style:style style:name="P328" style:family="paragraph" style:parent-style-name="Text_20_body">
      <style:paragraph-properties fo:margin-top="0.0346in" fo:margin-bottom="0in" style:contextual-spacing="false"/>
    </style:style>
    <style:style style:name="P329" style:family="paragraph" style:parent-style-name="Heading_20_3" style:list-style-name="WWNum26">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style>
    <style:style style:name="P330" style:family="paragraph" style:parent-style-name="Standard">
      <style:paragraph-properties fo:margin-left="0.1063in" fo:margin-right="0.4618in" fo:margin-top="0.2209in" fo:margin-bottom="0in" style:contextual-spacing="false" fo:text-align="left" style:justify-single-word="false" fo:text-indent="0.25in" style:auto-text-indent="false"/>
    </style:style>
    <style:style style:name="P331" style:family="paragraph" style:parent-style-name="List_20_Paragraph" style:list-style-name="WWNum24">
      <style:paragraph-properties fo:margin-left="0.6071in" fo:margin-right="0in" fo:margin-top="0.0862in" fo:margin-bottom="0in" style:contextual-spacing="false" fo:line-height="100%" fo:text-align="left" style:justify-single-word="false" fo:text-indent="-0.25in" style:auto-text-indent="false">
        <style:tab-stops>
          <style:tab-stop style:position="0.6071in"/>
        </style:tab-stops>
      </style:paragraph-properties>
    </style:style>
    <style:style style:name="P332" style:family="paragraph" style:parent-style-name="Text_20_body">
      <style:paragraph-properties fo:margin-left="0.1063in" fo:margin-right="0.3299in" fo:margin-top="0.1083in" fo:margin-bottom="0in" style:contextual-spacing="false"/>
    </style:style>
    <style:style style:name="P333" style:family="paragraph" style:parent-style-name="Text_20_body" style:master-page-name="Converted22">
      <style:paragraph-properties fo:margin-left="1.2339in" fo:margin-right="0in" style:page-number="auto"/>
    </style:style>
    <style:style style:name="P334" style:family="paragraph" style:parent-style-name="Standard">
      <style:paragraph-properties fo:margin-left="2.2744in" fo:margin-right="2.4665in" fo:margin-top="0.0898in" fo:margin-bottom="0in" style:contextual-spacing="false" fo:text-align="center" style:justify-single-word="false" fo:text-indent="0in" style:auto-text-indent="false"/>
    </style:style>
    <style:style style:name="P335" style:family="paragraph" style:parent-style-name="Text_20_body">
      <style:text-properties style:font-name="Calibri" fo:font-size="9pt" fo:font-style="italic" style:font-size-asian="9pt" style:font-style-asian="italic"/>
    </style:style>
    <style:style style:name="P336" style:family="paragraph" style:parent-style-name="Text_20_body">
      <style:paragraph-properties fo:margin-top="0.0181in" fo:margin-bottom="0in" style:contextual-spacing="false"/>
      <style:text-properties style:font-name="Calibri" fo:font-size="9pt" fo:font-style="italic" style:font-size-asian="9pt" style:font-style-asian="italic"/>
    </style:style>
    <style:style style:name="P337" style:family="paragraph" style:parent-style-name="Standard">
      <style:paragraph-properties fo:margin-left="0.1063in" fo:margin-right="0.3299in" fo:margin-top="0in" fo:margin-bottom="0in" style:contextual-spacing="false" fo:text-align="left" style:justify-single-word="false" fo:text-indent="0.25in" style:auto-text-indent="false"/>
    </style:style>
    <style:style style:name="P338" style:family="paragraph" style:parent-style-name="Text_20_body">
      <style:paragraph-properties fo:margin-top="0.0008in" fo:margin-bottom="0in" style:contextual-spacing="false"/>
      <style:text-properties style:font-name="Calibri" fo:font-size="10pt" style:font-size-asian="10pt"/>
    </style:style>
    <style:style style:name="P339" style:family="paragraph" style:parent-style-name="List_20_Paragraph" style:list-style-name="WWNum24">
      <style:paragraph-properties fo:margin-left="0.6071in" fo:margin-right="0in" fo:margin-top="0.0811in" fo:margin-bottom="0in" style:contextual-spacing="false" fo:line-height="100%" fo:text-align="left" style:justify-single-word="false" fo:text-indent="-0.25in" style:auto-text-indent="false">
        <style:tab-stops>
          <style:tab-stop style:position="0.6071in"/>
        </style:tab-stops>
      </style:paragraph-properties>
    </style:style>
    <style:style style:name="P340" style:family="paragraph" style:parent-style-name="Text_20_body">
      <style:paragraph-properties fo:margin-top="0.0417in" fo:margin-bottom="0in" style:contextual-spacing="false"/>
      <style:text-properties style:font-name="Cambria" fo:font-size="11pt" fo:font-weight="bold" style:font-size-asian="11pt" style:font-weight-asian="bold"/>
    </style:style>
    <style:style style:name="P341" style:family="paragraph" style:parent-style-name="Text_20_body">
      <style:paragraph-properties fo:margin-top="0.0791in" fo:margin-bottom="0in" style:contextual-spacing="false"/>
      <style:text-properties fo:font-size="10pt" style:font-size-asian="10pt"/>
    </style:style>
    <style:style style:name="P342" style:family="paragraph" style:parent-style-name="Text_20_body">
      <style:paragraph-properties fo:margin-top="0.0071in" fo:margin-bottom="0in" style:contextual-spacing="false"/>
    </style:style>
    <style:style style:name="P343" style:family="paragraph" style:parent-style-name="Text_20_body" style:list-style-name="L1">
      <style:paragraph-properties fo:margin-top="0in" fo:margin-bottom="0in" style:contextual-spacing="false"/>
      <style:text-properties officeooo:paragraph-rsid="00193b6c"/>
    </style:style>
    <style:style style:name="P344" style:family="paragraph" style:parent-style-name="Text_20_body" style:list-style-name="L1">
      <style:paragraph-properties fo:margin-top="0in" fo:margin-bottom="0in" style:contextual-spacing="false"/>
      <style:text-properties fo:letter-spacing="-0.0016in" officeooo:paragraph-rsid="00193b6c"/>
    </style:style>
    <style:style style:name="P345" style:family="paragraph" style:parent-style-name="Heading_20_5" style:list-style-name="WWNum28">
      <style:paragraph-properties fo:margin-right="0in" fo:line-height="100%" fo:text-align="left" style:justify-single-word="false" fo:orphans="0" fo:widows="0" style:writing-mode="lr-tb">
        <style:tab-stops>
          <style:tab-stop style:position="0.4346in"/>
        </style:tab-stops>
      </style:paragraph-properties>
    </style:style>
    <style:style style:name="P346" style:family="paragraph" style:parent-style-name="Text_20_body">
      <style:paragraph-properties fo:margin-left="0.1063in" fo:margin-right="0.4618in" fo:margin-top="0.2209in" fo:margin-bottom="0in" style:contextual-spacing="false" fo:text-indent="0.25in" style:auto-text-indent="false"/>
    </style:style>
    <style:style style:name="P347" style:family="paragraph" style:parent-style-name="Heading_20_5" style:list-style-name="WWNum28">
      <style:paragraph-properties fo:margin-left="0.4346in" fo:margin-right="0in" fo:margin-top="0.0846in" fo:margin-bottom="0in" style:contextual-spacing="false" fo:line-height="100%" fo:text-align="left" style:justify-single-word="false" fo:text-indent="-0.25in" style:auto-text-indent="false">
        <style:tab-stops>
          <style:tab-stop style:position="0.4346in"/>
        </style:tab-stops>
      </style:paragraph-properties>
    </style:style>
    <style:style style:name="P348" style:family="paragraph" style:parent-style-name="Text_20_body">
      <style:paragraph-properties fo:margin-left="0.1063in" fo:margin-right="0.4618in" fo:margin-top="0.0827in" fo:margin-bottom="0in" style:contextual-spacing="false" fo:text-indent="0.25in" style:auto-text-indent="false"/>
    </style:style>
    <style:style style:name="P349" style:family="paragraph" style:parent-style-name="Text_20_body">
      <style:paragraph-properties fo:margin-left="0.1063in" fo:margin-right="0in" fo:text-indent="0.25in" style:auto-text-indent="false"/>
    </style:style>
    <style:style style:name="P350" style:family="paragraph" style:parent-style-name="Heading_20_5" style:list-style-name="WWNum28">
      <style:paragraph-properties fo:margin-left="0.4346in" fo:margin-right="0in" fo:margin-top="0.0854in" fo:margin-bottom="0in" style:contextual-spacing="false" fo:line-height="100%" fo:text-align="left" style:justify-single-word="false" fo:text-indent="-0.25in" style:auto-text-indent="false">
        <style:tab-stops>
          <style:tab-stop style:position="0.4346in"/>
        </style:tab-stops>
      </style:paragraph-properties>
    </style:style>
    <style:style style:name="P351" style:family="paragraph" style:parent-style-name="Text_20_body">
      <style:paragraph-properties fo:margin-left="0.3571in" fo:margin-right="0in" fo:margin-top="0.0807in" fo:margin-bottom="0in" style:contextual-spacing="false"/>
    </style:style>
    <style:style style:name="P352" style:family="paragraph" style:parent-style-name="List_20_Paragraph" style:list-style-name="WWNum28">
      <style:paragraph-properties fo:margin-left="0.4528in" fo:margin-right="0in" fo:margin-top="0in" fo:margin-bottom="0in" style:contextual-spacing="false" fo:line-height="100%" fo:text-align="left" style:justify-single-word="false" fo:text-indent="-0.0957in" style:auto-text-indent="false">
        <style:tab-stops>
          <style:tab-stop style:position="0.4528in"/>
        </style:tab-stops>
      </style:paragraph-properties>
    </style:style>
    <style:style style:name="P353" style:family="paragraph" style:parent-style-name="List_20_Paragraph" style:list-style-name="WWNum28">
      <style:paragraph-properties fo:margin-left="0.4945in" fo:margin-right="0in" fo:margin-top="0in" fo:margin-bottom="0in" style:contextual-spacing="false" fo:line-height="100%" fo:text-align="left" style:justify-single-word="false" fo:text-indent="-0.0957in" style:auto-text-indent="false">
        <style:tab-stops>
          <style:tab-stop style:position="0.4945in"/>
        </style:tab-stops>
      </style:paragraph-properties>
    </style:style>
    <style:style style:name="P354" style:family="paragraph" style:parent-style-name="Text_20_body">
      <style:paragraph-properties fo:margin-left="0.3571in" fo:margin-right="0in" fo:margin-top="0.0819in" fo:margin-bottom="0in" style:contextual-spacing="false"/>
    </style:style>
    <style:style style:name="P355" style:family="paragraph" style:parent-style-name="Standard">
      <style:paragraph-properties fo:margin-left="0.3571in" fo:margin-right="0in" fo:margin-top="0in" fo:margin-bottom="0.0362in" style:contextual-spacing="false" fo:line-height="0.1862in" fo:text-align="left" style:justify-single-word="false" fo:text-indent="0in" style:auto-text-indent="false"/>
    </style:style>
    <style:style style:name="P356" style:family="paragraph" style:parent-style-name="Text_20_body">
      <style:paragraph-properties fo:margin-left="0.7311in" fo:margin-right="0in"/>
    </style:style>
    <style:style style:name="P357" style:family="paragraph" style:parent-style-name="Text_20_body">
      <style:paragraph-properties fo:margin-top="0.0508in" fo:margin-bottom="0in" style:contextual-spacing="false"/>
      <style:text-properties style:font-name="Calibri" fo:font-size="15pt" style:font-size-asian="15pt"/>
    </style:style>
    <style:style style:name="P358" style:family="paragraph" style:parent-style-name="Heading_20_3" style:list-style-name="WWNum29">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text-properties fo:letter-spacing="-0.0016in"/>
    </style:style>
    <style:style style:name="P359" style:family="paragraph" style:parent-style-name="Text_20_body">
      <style:paragraph-properties fo:margin-top="0.0717in" fo:margin-bottom="0in" style:contextual-spacing="false"/>
      <style:text-properties style:font-name="Calibri" fo:font-style="italic" style:font-style-asian="italic"/>
    </style:style>
    <style:style style:name="P360" style:family="paragraph" style:parent-style-name="Text_20_body">
      <style:text-properties style:font-name="Calibri"/>
    </style:style>
    <style:style style:name="P361" style:family="paragraph" style:parent-style-name="Text_20_body">
      <style:paragraph-properties fo:margin-left="0.1063in" fo:margin-right="0.4618in" fo:margin-top="0in" fo:margin-bottom="0in" style:contextual-spacing="false" fo:text-indent="0.25in" style:auto-text-indent="false"/>
    </style:style>
    <style:style style:name="P362" style:family="paragraph" style:parent-style-name="Text_20_body" style:master-page-name="Converted24">
      <style:paragraph-properties fo:margin-left="0.3571in" fo:margin-right="-0.0201in" style:page-number="auto"/>
    </style:style>
    <style:style style:name="P363" style:family="paragraph" style:parent-style-name="Standard">
      <style:paragraph-properties fo:margin-left="2.2728in" fo:margin-right="2.4673in" fo:margin-top="0in" fo:margin-bottom="0in" style:contextual-spacing="false" fo:text-align="center" style:justify-single-word="false" fo:text-indent="0in" style:auto-text-indent="false"/>
    </style:style>
    <style:style style:name="P364" style:family="paragraph" style:parent-style-name="Standard">
      <style:paragraph-properties fo:margin-left="0.1063in" fo:margin-right="0.4618in" fo:margin-top="0.128in" fo:margin-bottom="0in" style:contextual-spacing="false" fo:text-align="left" style:justify-single-word="false" fo:text-indent="0in" style:auto-text-indent="false"/>
    </style:style>
    <style:style style:name="P365" style:family="paragraph" style:parent-style-name="Text_20_body">
      <style:paragraph-properties fo:margin-top="0.0071in" fo:margin-bottom="0in" style:contextual-spacing="false"/>
      <style:text-properties style:font-name="Calibri" fo:font-size="3.5pt" style:font-size-asian="3.5pt"/>
    </style:style>
    <style:style style:name="P366" style:family="paragraph" style:parent-style-name="Standard">
      <style:paragraph-properties fo:margin-left="2.2728in" fo:margin-right="2.4665in" fo:margin-top="0.011in" fo:margin-bottom="0in" style:contextual-spacing="false" fo:text-align="center" style:justify-single-word="false" fo:text-indent="0in" style:auto-text-indent="false"/>
    </style:style>
    <style:style style:name="P367" style:family="paragraph" style:parent-style-name="Text_20_body">
      <style:paragraph-properties fo:margin-top="0.0382in" fo:margin-bottom="0in" style:contextual-spacing="false"/>
      <style:text-properties style:font-name="Calibri" fo:font-size="9pt" fo:font-style="italic" style:font-size-asian="9pt" style:font-style-asian="italic"/>
    </style:style>
    <style:style style:name="P368" style:family="paragraph" style:parent-style-name="Text_20_body">
      <style:paragraph-properties fo:margin-left="0.1063in" fo:margin-right="0.372in" fo:margin-top="0.0008in" fo:margin-bottom="0in" style:contextual-spacing="false"/>
    </style:style>
    <style:style style:name="P369" style:family="paragraph" style:parent-style-name="Text_20_body">
      <style:paragraph-properties fo:margin-left="0.1063in" fo:margin-right="0.372in" fo:margin-top="0.1957in" fo:margin-bottom="0in" style:contextual-spacing="false" fo:text-indent="0.1146in" style:auto-text-indent="false"/>
    </style:style>
    <style:style style:name="P370" style:family="paragraph" style:parent-style-name="Heading_20_3" style:list-style-name="WWNum29" style:master-page-name="Converted25">
      <style:paragraph-properties fo:margin-left="0.911in" fo:margin-right="0in" fo:margin-top="0.052in" fo:margin-bottom="0in" style:contextual-spacing="false" fo:line-height="100%" fo:text-align="left" style:justify-single-word="false" fo:text-indent="-0.3126in" style:auto-text-indent="false" style:page-number="auto">
        <style:tab-stops>
          <style:tab-stop style:position="0.911in"/>
        </style:tab-stops>
      </style:paragraph-properties>
    </style:style>
    <style:style style:name="P371" style:family="paragraph" style:parent-style-name="Text_20_body">
      <style:paragraph-properties fo:margin-left="0.1063in" fo:margin-right="0.4618in" fo:margin-top="0.2291in" fo:margin-bottom="0in" style:contextual-spacing="false"/>
    </style:style>
    <style:style style:name="P372" style:family="paragraph" style:parent-style-name="List_20_Paragraph" style:list-style-name="WWNum30">
      <style:paragraph-properties fo:margin-left="0.6071in" fo:margin-right="0.5457in" fo:margin-top="0.0008in" fo:margin-bottom="0in" style:contextual-spacing="false" fo:line-height="99%" fo:text-align="left" style:justify-single-word="false" fo:text-indent="-0.2508in" style:auto-text-indent="false">
        <style:tab-stops>
          <style:tab-stop style:position="0.6071in"/>
        </style:tab-stops>
      </style:paragraph-properties>
    </style:style>
    <style:style style:name="P373" style:family="paragraph" style:parent-style-name="List_20_Paragraph" style:list-style-name="WWNum30">
      <style:paragraph-properties fo:margin-left="0.6071in" fo:margin-right="0in" fo:margin-top="0.0008in" fo:margin-bottom="0in" style:contextual-spacing="false" fo:line-height="100%" fo:text-align="left" style:justify-single-word="false" fo:text-indent="-0.25in" style:auto-text-indent="false">
        <style:tab-stops>
          <style:tab-stop style:position="0.6071in"/>
        </style:tab-stops>
      </style:paragraph-properties>
    </style:style>
    <style:style style:name="P374" style:family="paragraph" style:parent-style-name="List_20_Paragraph" style:list-style-name="WWNum30">
      <style:paragraph-properties fo:margin-left="0.6071in" fo:margin-right="0in" fo:margin-top="0in" fo:margin-bottom="0in" style:contextual-spacing="false" fo:line-height="100%" fo:text-align="left" style:justify-single-word="false" fo:text-indent="-0.25in" style:auto-text-indent="false">
        <style:tab-stops>
          <style:tab-stop style:position="0.6071in"/>
        </style:tab-stops>
      </style:paragraph-properties>
    </style:style>
    <style:style style:name="P375" style:family="paragraph" style:parent-style-name="List_20_Paragraph" style:list-style-name="WWNum30">
      <style:paragraph-properties fo:margin-left="0.6071in" fo:margin-right="0.3508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76" style:family="paragraph" style:parent-style-name="List_20_Paragraph" style:list-style-name="WWNum30">
      <style:paragraph-properties fo:margin-left="0.6071in" fo:margin-right="0.3311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77" style:family="paragraph" style:parent-style-name="Text_20_body">
      <style:paragraph-properties fo:margin-top="0.0028in" fo:margin-bottom="0in" style:contextual-spacing="false"/>
    </style:style>
    <style:style style:name="P378" style:family="paragraph" style:parent-style-name="Heading_20_3" style:list-style-name="WWNum29">
      <style:paragraph-properties fo:margin-left="0.911in" fo:margin-right="0in" fo:margin-top="0.0008in" fo:margin-bottom="0in" style:contextual-spacing="false" fo:line-height="100%" fo:text-align="left" style:justify-single-word="false" fo:text-indent="-0.3126in" style:auto-text-indent="false">
        <style:tab-stops>
          <style:tab-stop style:position="0.911in"/>
        </style:tab-stops>
      </style:paragraph-properties>
      <style:text-properties fo:letter-spacing="-0.0016in"/>
    </style:style>
    <style:style style:name="P379" style:family="paragraph" style:parent-style-name="Heading_20_2" style:master-page-name="Converted26">
      <style:paragraph-properties fo:margin-left="0.4929in" fo:margin-right="0.1965in" fo:text-align="center" style:justify-single-word="false" style:page-number="auto"/>
    </style:style>
    <style:style style:name="P380" style:family="paragraph" style:parent-style-name="Text_20_body">
      <style:paragraph-properties fo:margin-top="0.2244in" fo:margin-bottom="0in" style:contextual-spacing="false"/>
      <style:text-properties fo:font-size="15pt" fo:font-weight="bold" style:font-size-asian="15pt" style:font-weight-asian="bold"/>
    </style:style>
    <style:style style:name="P381" style:family="paragraph" style:parent-style-name="Heading_20_3" style:list-style-name="WWNum30">
      <style:paragraph-properties fo:margin-left="0.9118in" fo:margin-right="0in" fo:margin-top="0in" fo:margin-bottom="0in" style:contextual-spacing="false" fo:line-height="100%" fo:text-align="left" style:justify-single-word="false" fo:text-indent="-0.3134in" style:auto-text-indent="false">
        <style:tab-stops>
          <style:tab-stop style:position="0.9118in"/>
        </style:tab-stops>
      </style:paragraph-properties>
      <style:text-properties fo:letter-spacing="-0.0016in"/>
    </style:style>
    <style:style style:name="P382" style:family="paragraph" style:parent-style-name="Standard">
      <style:paragraph-properties fo:margin-left="0.1063in" fo:margin-right="0.3016in" fo:margin-top="0.0346in" fo:margin-bottom="0in" style:contextual-spacing="false" fo:line-height="115%" fo:text-align="left" style:justify-single-word="false" fo:text-indent="0.1917in" style:auto-text-indent="false"/>
    </style:style>
    <style:style style:name="P383" style:family="paragraph" style:parent-style-name="Heading_20_3" style:list-style-name="WWNum30">
      <style:paragraph-properties fo:margin-left="0.911in" fo:margin-right="0in" fo:margin-top="0.1398in" fo:margin-bottom="0in" style:contextual-spacing="false" fo:line-height="100%" fo:text-align="left" style:justify-single-word="false" fo:text-indent="-0.3126in" style:auto-text-indent="false">
        <style:tab-stops>
          <style:tab-stop style:position="0.911in"/>
        </style:tab-stops>
      </style:paragraph-properties>
      <style:text-properties fo:letter-spacing="-0.0016in"/>
    </style:style>
    <style:style style:name="P384" style:family="paragraph" style:parent-style-name="Standard">
      <style:paragraph-properties fo:margin-left="0.1063in" fo:margin-right="0.4618in" fo:margin-top="0.0362in" fo:margin-bottom="0in" style:contextual-spacing="false" fo:line-height="115%" fo:text-align="left" style:justify-single-word="false" fo:text-indent="0in" style:auto-text-indent="false"/>
    </style:style>
    <style:style style:name="P385" style:family="paragraph" style:parent-style-name="Text_20_body">
      <style:paragraph-properties fo:margin-top="0.0035in" fo:margin-bottom="0in" style:contextual-spacing="false"/>
      <style:text-properties style:font-name="Calibri" fo:font-size="7pt" style:font-size-asian="7pt"/>
    </style:style>
    <style:style style:name="P386" style:family="paragraph" style:parent-style-name="Standard">
      <style:paragraph-properties fo:margin-left="2.2736in" fo:margin-right="2.4665in" fo:margin-top="0.0299in" fo:margin-bottom="0in" style:contextual-spacing="false" fo:line-height="0.152in" fo:text-align="center" style:justify-single-word="false" fo:text-indent="0in" style:auto-text-indent="false"/>
    </style:style>
    <style:style style:name="P387" style:family="paragraph" style:parent-style-name="Standard">
      <style:paragraph-properties fo:margin-left="0.1063in" fo:margin-right="0.4445in" fo:margin-top="0in" fo:margin-bottom="0in" style:contextual-spacing="false" fo:line-height="115%" fo:text-align="justify" style:justify-single-word="false" fo:text-indent="0in" style:auto-text-indent="false"/>
    </style:style>
    <style:style style:name="P388" style:family="paragraph" style:parent-style-name="Standard">
      <style:paragraph-properties fo:margin-left="2.2728in" fo:margin-right="2.4681in" fo:margin-top="0.0618in" fo:margin-bottom="0in" style:contextual-spacing="false" fo:text-align="center" style:justify-single-word="false" fo:text-indent="0in" style:auto-text-indent="false"/>
    </style:style>
    <style:style style:name="P389" style:family="paragraph" style:parent-style-name="Heading_20_3" style:list-style-name="WWNum30">
      <style:paragraph-properties fo:margin-left="0.9626in" fo:margin-right="0in" fo:margin-top="0.052in" fo:margin-bottom="0in" style:contextual-spacing="false" fo:line-height="100%" fo:text-align="left" style:justify-single-word="false" fo:text-indent="-0.3638in" style:auto-text-indent="false">
        <style:tab-stops>
          <style:tab-stop style:position="0.9626in"/>
        </style:tab-stops>
      </style:paragraph-properties>
      <style:text-properties fo:letter-spacing="-0.0016in"/>
    </style:style>
    <style:style style:name="P390" style:family="paragraph" style:parent-style-name="Text_20_body">
      <style:paragraph-properties fo:margin-left="0.1063in" fo:margin-right="0.3299in" fo:margin-top="0.2291in" fo:margin-bottom="0in" style:contextual-spacing="false" fo:text-indent="0.4917in" style:auto-text-indent="false"/>
    </style:style>
    <style:style style:name="P391" style:family="paragraph" style:parent-style-name="List_20_Paragraph" style:list-style-name="WWNum31">
      <style:paragraph-properties fo:margin-left="0.6071in" fo:margin-right="0.4346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92" style:family="paragraph" style:parent-style-name="List_20_Paragraph" style:list-style-name="WWNum31">
      <style:paragraph-properties fo:margin-left="0.6071in" fo:margin-right="0.4283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93" style:family="paragraph" style:parent-style-name="List_20_Paragraph" style:list-style-name="WWNum31">
      <style:paragraph-properties fo:margin-left="0.6071in" fo:margin-right="0.3535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394" style:family="paragraph" style:parent-style-name="Heading_20_3" style:list-style-name="WWNum30">
      <style:paragraph-properties fo:margin-left="0.911in" fo:margin-right="0in" fo:margin-top="0in" fo:margin-bottom="0in" style:contextual-spacing="false" fo:line-height="100%" fo:text-align="left" style:justify-single-word="false" fo:text-indent="-0.3126in" style:auto-text-indent="false">
        <style:tab-stops>
          <style:tab-stop style:position="0.911in"/>
        </style:tab-stops>
      </style:paragraph-properties>
    </style:style>
    <style:style style:name="P395" style:family="paragraph" style:parent-style-name="Text_20_body">
      <style:paragraph-properties fo:margin-left="0.1063in" fo:margin-right="0in" fo:margin-top="0.2291in" fo:margin-bottom="0in" style:contextual-spacing="false"/>
    </style:style>
    <style:style style:name="P396" style:family="paragraph" style:parent-style-name="Text_20_body">
      <style:paragraph-properties fo:margin-top="0.0846in" fo:margin-bottom="0in" style:contextual-spacing="false"/>
      <style:text-properties fo:font-size="10pt" style:font-size-asian="10pt"/>
    </style:style>
    <style:style style:name="P397" style:family="paragraph" style:parent-style-name="Text_20_body">
      <style:paragraph-properties fo:margin-left="0.2681in" fo:margin-right="0in"/>
    </style:style>
    <style:style style:name="P398" style:family="paragraph" style:parent-style-name="Text_20_body">
      <style:paragraph-properties fo:margin-top="0.0772in" fo:margin-bottom="0in" style:contextual-spacing="false"/>
      <style:text-properties fo:font-size="15pt" style:font-size-asian="15pt"/>
    </style:style>
    <style:style style:name="P399" style:family="paragraph" style:parent-style-name="Heading_20_3" style:list-style-name="WWNum32">
      <style:paragraph-properties fo:margin-left="0.911in" fo:margin-right="0in" fo:margin-top="0in" fo:margin-bottom="0in" style:contextual-spacing="false" fo:line-height="100%" fo:text-align="left" style:justify-single-word="false" fo:text-indent="-0.3126in" style:auto-text-indent="false">
        <style:tab-stops>
          <style:tab-stop style:position="0.911in"/>
        </style:tab-stops>
      </style:paragraph-properties>
      <style:text-properties fo:letter-spacing="-0.0016in"/>
    </style:style>
    <style:style style:name="P400" style:family="paragraph" style:parent-style-name="Standard">
      <style:paragraph-properties fo:margin-left="0.3701in" fo:margin-right="0in" fo:margin-top="0.0252in" fo:margin-bottom="0in" style:contextual-spacing="false" fo:text-align="left" style:justify-single-word="false" fo:text-indent="0in" style:auto-text-indent="false" fo:break-before="column"/>
    </style:style>
    <style:style style:name="P401" style:family="paragraph" style:parent-style-name="Text_20_body">
      <style:paragraph-properties fo:margin-top="0.0256in" fo:margin-bottom="0in" style:contextual-spacing="false"/>
      <style:text-properties style:font-name="Calibri" fo:font-style="italic" style:font-style-asian="italic"/>
    </style:style>
    <style:style style:name="P402" style:family="paragraph" style:parent-style-name="Text_20_body">
      <style:paragraph-properties fo:margin-left="0.2319in" fo:margin-right="0in"/>
    </style:style>
    <style:style style:name="P403" style:family="paragraph" style:parent-style-name="List_20_Paragraph" style:list-style-name="WWNum31">
      <style:paragraph-properties fo:margin-left="0.6071in" fo:margin-right="0.9228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404" style:family="paragraph" style:parent-style-name="List_20_Paragraph" style:list-style-name="WWNum31" style:master-page-name="Converted28">
      <style:paragraph-properties fo:margin-left="0.6071in" fo:margin-right="0.5102in" fo:margin-top="0.0508in" fo:margin-bottom="0in" style:contextual-spacing="false" fo:line-height="100%" fo:text-align="left" style:justify-single-word="false" fo:text-indent="-0.2508in" style:auto-text-indent="false" style:page-number="auto">
        <style:tab-stops>
          <style:tab-stop style:position="0.6071in"/>
        </style:tab-stops>
      </style:paragraph-properties>
    </style:style>
    <style:style style:name="P405" style:family="paragraph" style:parent-style-name="List_20_Paragraph" style:list-style-name="WWNum31">
      <style:paragraph-properties fo:margin-left="0.6071in" fo:margin-right="0.6264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406" style:family="paragraph" style:parent-style-name="Heading_20_3" style:list-style-name="WWNum32">
      <style:paragraph-properties fo:margin-left="0.911in" fo:margin-right="0in" fo:margin-top="0in" fo:margin-bottom="0in" style:contextual-spacing="false" fo:line-height="100%" fo:text-align="left" style:justify-single-word="false" fo:text-indent="-0.3126in" style:auto-text-indent="false">
        <style:tab-stops>
          <style:tab-stop style:position="0.911in"/>
        </style:tab-stops>
      </style:paragraph-properties>
    </style:style>
    <style:style style:name="P407" style:family="paragraph" style:parent-style-name="Text_20_body">
      <style:paragraph-properties fo:margin-left="0.1902in" fo:margin-right="0in" fo:margin-top="0.2291in" fo:margin-bottom="0in" style:contextual-spacing="false"/>
    </style:style>
    <style:style style:name="P408" style:family="paragraph" style:parent-style-name="List_20_Paragraph" style:list-style-name="WWNum31">
      <style:paragraph-properties fo:margin-left="0.6071in" fo:margin-right="0.4862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409" style:family="paragraph" style:parent-style-name="List_20_Paragraph" style:list-style-name="WWNum31">
      <style:paragraph-properties fo:margin-left="0.6071in" fo:margin-right="0.939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410" style:family="paragraph" style:parent-style-name="List_20_Paragraph" style:list-style-name="WWNum31">
      <style:paragraph-properties fo:margin-left="0.6071in" fo:margin-right="0.7571in" fo:margin-top="0in" fo:margin-bottom="0in" style:contextual-spacing="false" fo:line-height="100%" fo:text-align="left" style:justify-single-word="false" fo:text-indent="-0.2508in" style:auto-text-indent="false">
        <style:tab-stops>
          <style:tab-stop style:position="0.6071in"/>
        </style:tab-stops>
      </style:paragraph-properties>
    </style:style>
    <style:style style:name="P411" style:family="paragraph" style:parent-style-name="List_20_Paragraph" style:list-style-name="WWNum31">
      <style:paragraph-properties fo:margin-left="0.6071in" fo:margin-right="0.3252in" fo:margin-top="0.0008in" fo:margin-bottom="0in" style:contextual-spacing="false" fo:line-height="100%" fo:text-align="left" style:justify-single-word="false" fo:text-indent="-0.2508in" style:auto-text-indent="false">
        <style:tab-stops>
          <style:tab-stop style:position="0.6071in"/>
        </style:tab-stops>
      </style:paragraph-properties>
    </style:style>
    <style:style style:name="P412" style:family="paragraph" style:parent-style-name="Text_20_body">
      <style:paragraph-properties fo:margin-left="0.1063in" fo:margin-right="0.322in" fo:margin-top="0.2291in" fo:margin-bottom="0in" style:contextual-spacing="false"/>
    </style:style>
    <style:style style:name="P413" style:family="paragraph" style:parent-style-name="Heading_20_1" style:master-page-name="Converted29">
      <style:paragraph-properties fo:margin-left="1.7484in" fo:margin-right="1.9417in" style:page-number="auto"/>
    </style:style>
    <style:style style:name="P414" style:family="paragraph" style:parent-style-name="Text_20_body">
      <style:paragraph-properties fo:margin-top="0.1425in" fo:margin-bottom="0in" style:contextual-spacing="false"/>
      <style:text-properties fo:font-size="22pt" fo:font-weight="bold" style:font-size-asian="22pt" style:font-weight-asian="bold"/>
    </style:style>
    <style:style style:name="P415" style:family="paragraph" style:parent-style-name="Standard">
      <style:paragraph-properties fo:margin-left="0.1063in" fo:margin-right="0.4618in" fo:margin-top="0.0008in" fo:margin-bottom="0in" style:contextual-spacing="false" fo:line-height="100%" fo:text-align="left" style:justify-single-word="false" fo:text-indent="0in" style:auto-text-indent="false"/>
    </style:style>
    <style:style style:name="P416" style:family="paragraph" style:parent-style-name="Standard">
      <style:paragraph-properties fo:margin-left="0.1063in" fo:margin-right="0.3299in" fo:margin-top="0.1945in" fo:margin-bottom="0in" style:contextual-spacing="false" fo:line-height="100%" fo:text-align="left" style:justify-single-word="false" fo:text-indent="0in" style:auto-text-indent="false"/>
    </style:style>
    <style:style style:name="P417" style:family="paragraph" style:parent-style-name="List_20_Paragraph" style:list-style-name="WWNum33">
      <style:paragraph-properties fo:margin-left="0.6071in" fo:margin-right="0.3807in" fo:margin-top="0.1953in" fo:margin-bottom="0in" style:contextual-spacing="false" fo:line-height="100%" fo:text-align="justify" style:justify-single-word="false" fo:text-indent="-0.2508in" style:auto-text-indent="false">
        <style:tab-stops>
          <style:tab-stop style:position="0.6055in"/>
          <style:tab-stop style:position="0.6071in"/>
        </style:tab-stops>
      </style:paragraph-properties>
    </style:style>
    <style:style style:name="P418" style:family="paragraph" style:parent-style-name="List_20_Paragraph" style:list-style-name="WWNum33">
      <style:paragraph-properties fo:margin-left="0.6071in" fo:margin-right="0.728in" fo:margin-top="0in" fo:margin-bottom="0in" style:contextual-spacing="false" fo:line-height="100%" fo:text-align="left" style:justify-single-word="false" fo:text-indent="-0.2508in" style:auto-text-indent="false">
        <style:tab-stops>
          <style:tab-stop style:position="0.6055in"/>
          <style:tab-stop style:position="0.6071in"/>
        </style:tab-stops>
      </style:paragraph-properties>
    </style:style>
    <style:style style:name="P419" style:family="paragraph" style:parent-style-name="List_20_Paragraph" style:list-style-name="WWNum33">
      <style:paragraph-properties fo:margin-left="0.6071in" fo:margin-right="0.6598in" fo:margin-top="0.0008in" fo:margin-bottom="0in" style:contextual-spacing="false" fo:line-height="100%" fo:text-align="left" style:justify-single-word="false" fo:text-indent="-0.2508in" style:auto-text-indent="false">
        <style:tab-stops>
          <style:tab-stop style:position="0.6055in"/>
          <style:tab-stop style:position="0.6071in"/>
        </style:tab-stops>
      </style:paragraph-properties>
    </style:style>
    <style:style style:name="P420" style:family="paragraph" style:parent-style-name="List_20_Paragraph" style:list-style-name="WWNum33">
      <style:paragraph-properties fo:margin-left="0.6071in" fo:margin-right="0.8701in" fo:margin-top="0in" fo:margin-bottom="0in" style:contextual-spacing="false" fo:line-height="100%" fo:text-align="left" style:justify-single-word="false" fo:text-indent="-0.2508in" style:auto-text-indent="false">
        <style:tab-stops>
          <style:tab-stop style:position="0.6055in"/>
          <style:tab-stop style:position="0.6071in"/>
        </style:tab-stops>
      </style:paragraph-properties>
    </style:style>
    <style:style style:name="P421" style:family="paragraph" style:parent-style-name="List_20_Paragraph" style:list-style-name="WWNum33">
      <style:paragraph-properties fo:margin-left="0.6071in" fo:margin-right="0.4425in" fo:margin-top="0in" fo:margin-bottom="0in" style:contextual-spacing="false" fo:line-height="100%" fo:text-align="left" style:justify-single-word="false" fo:text-indent="-0.2508in" style:auto-text-indent="false">
        <style:tab-stops>
          <style:tab-stop style:position="0.6055in"/>
          <style:tab-stop style:position="0.6071in"/>
        </style:tab-stops>
      </style:paragraph-properties>
    </style:style>
    <style:style style:name="P422" style:family="paragraph" style:parent-style-name="Standard">
      <style:paragraph-properties fo:margin-left="0.1063in" fo:margin-right="0.4618in" fo:margin-top="0.1945in" fo:margin-bottom="0in" style:contextual-spacing="false" fo:text-align="left" style:justify-single-word="false" fo:text-indent="0in" style:auto-text-indent="false"/>
    </style:style>
    <style:style style:name="P423" style:family="paragraph" style:parent-style-name="Heading_20_1" style:master-page-name="Converted30">
      <style:paragraph-properties fo:margin-left="1.7465in" fo:margin-right="1.9437in" style:page-number="auto"/>
    </style:style>
    <style:style style:name="P424" style:family="paragraph" style:parent-style-name="Standard">
      <style:paragraph-properties fo:margin-left="0.1063in" fo:margin-right="0in" fo:margin-top="0.1953in" fo:margin-bottom="0in" style:contextual-spacing="false" fo:text-align="left" style:justify-single-word="false" fo:text-indent="0in" style:auto-text-indent="false"/>
    </style:style>
    <style:style style:name="P425" style:family="paragraph" style:parent-style-name="List_20_Paragraph" style:list-style-name="WWNum34">
      <style:paragraph-properties fo:margin-left="0.6063in" fo:margin-right="0in" fo:margin-top="0.1929in" fo:margin-bottom="0in" style:contextual-spacing="false" fo:line-height="100%" fo:text-align="left" style:justify-single-word="false" fo:text-indent="-0.2492in" style:auto-text-indent="false">
        <style:tab-stops>
          <style:tab-stop style:position="0.6063in"/>
        </style:tab-stops>
      </style:paragraph-properties>
    </style:style>
    <style:style style:name="P426" style:family="paragraph" style:parent-style-name="List_20_Paragraph" style:list-style-name="WWNum34">
      <style:paragraph-properties fo:margin-left="0.6063in" fo:margin-right="0in" fo:margin-top="0.0016in" fo:margin-bottom="0in" style:contextual-spacing="false" fo:line-height="0.2201in" fo:text-align="left" style:justify-single-word="false" fo:text-indent="-0.2492in" style:auto-text-indent="false">
        <style:tab-stops>
          <style:tab-stop style:position="0.6063in"/>
        </style:tab-stops>
      </style:paragraph-properties>
    </style:style>
    <style:style style:name="P427" style:family="paragraph" style:parent-style-name="List_20_Paragraph" style:list-style-name="WWNum34">
      <style:paragraph-properties fo:margin-left="0.6063in" fo:margin-right="0in" fo:margin-top="0in" fo:margin-bottom="0in" style:contextual-spacing="false" fo:line-height="0.2201in" fo:text-align="left" style:justify-single-word="false" fo:text-indent="-0.2492in" style:auto-text-indent="false">
        <style:tab-stops>
          <style:tab-stop style:position="0.6063in"/>
        </style:tab-stops>
      </style:paragraph-properties>
    </style:style>
    <style:style style:name="P428" style:family="paragraph" style:parent-style-name="List_20_Paragraph" style:list-style-name="WWNum34">
      <style:paragraph-properties fo:margin-left="0.6063in" fo:margin-right="0in" fo:margin-top="0.0008in" fo:margin-bottom="0in" style:contextual-spacing="false" fo:line-height="100%" fo:text-align="left" style:justify-single-word="false" fo:text-indent="-0.2492in" style:auto-text-indent="false">
        <style:tab-stops>
          <style:tab-stop style:position="0.6063in"/>
        </style:tab-stops>
      </style:paragraph-properties>
    </style:style>
    <style:style style:name="P429" style:family="paragraph" style:parent-style-name="List_20_Paragraph" style:list-style-name="WWNum34">
      <style:paragraph-properties fo:margin-left="0.6055in" fo:margin-right="0in" fo:margin-top="0.0016in" fo:margin-bottom="0in" style:contextual-spacing="false" fo:line-height="0.2201in" fo:text-align="left" style:justify-single-word="false" fo:text-indent="-0.2484in" style:auto-text-indent="false">
        <style:tab-stops>
          <style:tab-stop style:position="0.6055in"/>
        </style:tab-stops>
      </style:paragraph-properties>
    </style:style>
    <style:style style:name="P430" style:family="paragraph" style:parent-style-name="List_20_Paragraph" style:list-style-name="WWNum34">
      <style:paragraph-properties fo:margin-left="0.6055in" fo:margin-right="0in" fo:margin-top="0in" fo:margin-bottom="0in" style:contextual-spacing="false" fo:line-height="0.2201in" fo:text-align="left" style:justify-single-word="false" fo:text-indent="-0.2484in" style:auto-text-indent="false">
        <style:tab-stops>
          <style:tab-stop style:position="0.6055in"/>
        </style:tab-stops>
      </style:paragraph-properties>
    </style:style>
    <style:style style:name="P431" style:family="paragraph" style:parent-style-name="List_20_Paragraph" style:list-style-name="WWNum34">
      <style:paragraph-properties fo:margin-left="0.6055in" fo:margin-right="0in" fo:margin-top="0in" fo:margin-bottom="0in" style:contextual-spacing="false" fo:line-height="100%" fo:text-align="left" style:justify-single-word="false" fo:text-indent="-0.2484in" style:auto-text-indent="false">
        <style:tab-stops>
          <style:tab-stop style:position="0.6055in"/>
        </style:tab-stops>
      </style:paragraph-properties>
    </style:style>
    <style:style style:name="P432" style:family="paragraph" style:parent-style-name="Standard">
      <style:paragraph-properties fo:margin-left="0.1063in" fo:margin-right="0.4618in" fo:margin-top="0.1945in" fo:margin-bottom="0in" style:contextual-spacing="false" fo:line-height="115%" fo:text-align="left" style:justify-single-word="false" fo:text-indent="0in" style:auto-text-indent="false"/>
    </style:style>
    <style:style style:name="P433" style:family="paragraph" style:parent-style-name="Frame_20_contents">
      <style:paragraph-properties fo:margin-left="0.0138in" fo:margin-right="0in" fo:margin-top="0in" fo:margin-bottom="0in" style:contextual-spacing="false" fo:line-height="0.1701in" fo:text-align="left" style:justify-single-word="false" fo:text-indent="0in" style:auto-text-indent="false"/>
    </style:style>
    <style:style style:name="T1" style:family="text">
      <style:text-properties fo:font-size="8pt" style:font-size-asian="8pt"/>
    </style:style>
    <style:style style:name="T2" style:family="text">
      <style:text-properties style:font-name="Arial" fo:font-size="8pt" fo:font-weight="bold" style:font-size-asian="8pt" style:font-weight-asian="bold"/>
    </style:style>
    <style:style style:name="T3" style:family="text">
      <style:text-properties style:font-name="Arial" fo:font-size="8pt" fo:letter-spacing="-0.0028in" fo:font-weight="bold" style:font-size-asian="8pt" style:font-weight-asian="bold"/>
    </style:style>
    <style:style style:name="T4" style:family="text">
      <style:text-properties style:font-name="Arial" fo:font-size="8pt" fo:letter-spacing="-0.0016in" fo:font-weight="bold" style:font-size-asian="8pt" style:font-weight-asian="bold"/>
    </style:style>
    <style:style style:name="T5" style:family="text">
      <style:text-properties style:font-name="Arial" fo:font-size="3pt" fo:font-weight="bold" style:font-size-asian="3pt" style:font-weight-asian="bold"/>
    </style:style>
    <style:style style:name="T6" style:family="text">
      <style:text-properties style:font-name="Arial" fo:font-size="18pt" fo:font-weight="bold" style:font-size-asian="18pt" style:font-weight-asian="bold"/>
    </style:style>
    <style:style style:name="T7" style:family="text">
      <style:text-properties style:font-name="Calibri" fo:font-size="18pt" fo:font-weight="bold" style:font-size-asian="18pt" style:font-weight-asian="bold"/>
    </style:style>
    <style:style style:name="T8" style:family="text">
      <style:text-properties style:font-name="Calibri" fo:font-size="18pt" fo:letter-spacing="-0.0035in" fo:font-weight="bold" style:font-size-asian="18pt" style:font-weight-asian="bold"/>
    </style:style>
    <style:style style:name="T9" style:family="text">
      <style:text-properties style:font-name="Calibri" fo:font-size="18pt" fo:letter-spacing="-0.0047in" fo:font-weight="bold" style:font-size-asian="18pt" style:font-weight-asian="bold"/>
    </style:style>
    <style:style style:name="T10" style:family="text">
      <style:text-properties style:font-name="Calibri" fo:font-size="10pt" fo:font-weight="bold" style:font-size-asian="10pt" style:font-weight-asian="bold"/>
    </style:style>
    <style:style style:name="T11" style:family="text">
      <style:text-properties fo:color="#000000" loext:opacity="100%" fo:font-family="Georgia" style:font-family-generic="roman" style:font-pitch="variable" fo:font-size="35pt" fo:font-weight="bold" style:font-size-asian="35pt" style:font-weight-asian="bold"/>
    </style:style>
    <style:style style:name="T12" style:family="text">
      <style:text-properties fo:color="#000000" loext:opacity="100%" fo:font-family="Georgia" style:font-family-generic="roman" style:font-pitch="variable" fo:font-size="35pt" fo:letter-spacing="-0.0016in" fo:font-weight="bold" style:font-size-asian="35pt" style:font-weight-asian="bold"/>
    </style:style>
    <style:style style:name="T13" style:family="text">
      <style:text-properties fo:color="#000000" loext:opacity="100%" fo:font-family="Georgia" style:font-family-generic="roman" style:font-pitch="variable" fo:font-size="35pt" fo:letter-spacing="-0.0189in" fo:font-weight="bold" style:font-size-asian="35pt" style:font-weight-asian="bold"/>
    </style:style>
    <style:style style:name="T14" style:family="text">
      <style:text-properties style:text-scale="70%"/>
    </style:style>
    <style:style style:name="T15" style:family="text">
      <style:text-properties fo:letter-spacing="-0.0102in"/>
    </style:style>
    <style:style style:name="T16" style:family="text">
      <style:text-properties fo:letter-spacing="-0.0083in"/>
    </style:style>
    <style:style style:name="T17" style:family="text">
      <style:text-properties fo:letter-spacing="-0.0071in" style:text-scale="70%"/>
    </style:style>
    <style:style style:name="T18" style:family="text">
      <style:text-properties style:font-name="Trebuchet MS" fo:font-size="22pt" style:font-size-asian="22pt"/>
    </style:style>
    <style:style style:name="T19" style:family="text">
      <style:text-properties style:font-name="Trebuchet MS" fo:font-size="22pt" officeooo:rsid="0010e7de" style:font-size-asian="22pt" style:text-scale="65%"/>
    </style:style>
    <style:style style:name="T20" style:family="text">
      <style:text-properties style:font-name="Trebuchet MS" fo:font-size="22pt" style:font-size-asian="22pt" style:text-scale="65%"/>
    </style:style>
    <style:style style:name="T21" style:family="text">
      <style:text-properties style:font-name="Trebuchet MS" fo:font-size="22pt" fo:letter-spacing="0.0083in" style:font-size-asian="22pt"/>
    </style:style>
    <style:style style:name="T22" style:family="text">
      <style:text-properties style:font-name="Trebuchet MS" fo:font-size="22pt" fo:letter-spacing="0.0091in" style:font-size-asian="22pt"/>
    </style:style>
    <style:style style:name="T23" style:family="text">
      <style:text-properties style:font-name="Trebuchet MS" fo:font-size="22pt" fo:letter-spacing="-0.0016in" style:font-size-asian="22pt" style:text-scale="65%"/>
    </style:style>
    <style:style style:name="T24" style:family="text">
      <style:text-properties fo:letter-spacing="0.011in"/>
    </style:style>
    <style:style style:name="T25" style:family="text">
      <style:text-properties fo:letter-spacing="0.0091in"/>
    </style:style>
    <style:style style:name="T26" style:family="text">
      <style:text-properties style:font-name="Trebuchet MS" fo:font-size="22pt" fo:font-weight="bold" style:font-size-asian="22pt" style:font-weight-asian="bold" style:font-weight-complex="bold" style:text-scale="65%"/>
    </style:style>
    <style:style style:name="T27" style:family="text">
      <style:text-properties style:font-name="Trebuchet MS" fo:font-size="22pt" fo:letter-spacing="-0.0134in" fo:font-weight="bold" style:font-size-asian="22pt" style:font-weight-asian="bold" style:font-weight-complex="bold"/>
    </style:style>
    <style:style style:name="T28" style:family="text">
      <style:text-properties style:font-name="Trebuchet MS" fo:font-size="22pt" fo:letter-spacing="-0.0134in" fo:font-weight="bold" officeooo:rsid="0010e7de" style:font-size-asian="22pt" style:font-weight-asian="bold" style:font-weight-complex="bold" style:text-scale="65%"/>
    </style:style>
    <style:style style:name="T29" style:family="text">
      <style:text-properties style:font-name="Trebuchet MS" fo:font-size="14pt" style:font-size-asian="14pt"/>
    </style:style>
    <style:style style:name="T30" style:family="text">
      <style:text-properties style:font-name="Calibri"/>
    </style:style>
    <style:style style:name="T31" style:family="text">
      <style:text-properties style:font-name="Calibri" fo:letter-spacing="-0.0043in"/>
    </style:style>
    <style:style style:name="T32" style:family="text">
      <style:text-properties style:font-name="Calibri" fo:letter-spacing="-0.0035in"/>
    </style:style>
    <style:style style:name="T33" style:family="text">
      <style:text-properties style:font-name="Calibri" fo:letter-spacing="-0.0063in"/>
    </style:style>
    <style:style style:name="T34" style:family="text">
      <style:text-properties style:font-name="Calibri" officeooo:rsid="0012602b"/>
    </style:style>
    <style:style style:name="T35" style:family="text">
      <style:text-properties style:font-name="Calibri" fo:letter-spacing="-0.0028in"/>
    </style:style>
    <style:style style:name="T36" style:family="text">
      <style:text-properties style:font-name="Calibri" fo:letter-spacing="-0.0028in" officeooo:rsid="0012602b"/>
    </style:style>
    <style:style style:name="T37" style:family="text">
      <style:text-properties style:font-name="Cambria" fo:font-size="9pt" fo:font-weight="bold" style:font-size-asian="9pt" style:font-weight-asian="bold"/>
    </style:style>
    <style:style style:name="T38" style:family="text">
      <style:text-properties fo:letter-spacing="-0.0063in"/>
    </style:style>
    <style:style style:name="T39" style:family="text">
      <style:text-properties fo:letter-spacing="-0.0016in"/>
    </style:style>
    <style:style style:name="T40" style:family="text">
      <style:text-properties fo:letter-spacing="-0.002in"/>
    </style:style>
    <style:style style:name="T41" style:family="text">
      <style:text-properties fo:letter-spacing="-0.0071in"/>
    </style:style>
    <style:style style:name="T42" style:family="text">
      <style:text-properties fo:letter-spacing="-0.0008in"/>
    </style:style>
    <style:style style:name="T43" style:family="text">
      <style:text-properties fo:letter-spacing="-0.0035in"/>
    </style:style>
    <style:style style:name="T44" style:family="text">
      <style:text-properties fo:letter-spacing="-0.0055in"/>
    </style:style>
    <style:style style:name="T45" style:family="text">
      <style:text-properties fo:letter-spacing="-0.0047in"/>
    </style:style>
    <style:style style:name="T46" style:family="text">
      <style:text-properties fo:letter-spacing="-0.0043in"/>
    </style:style>
    <style:style style:name="T47" style:family="text">
      <style:text-properties fo:letter-spacing="-0.0028in"/>
    </style:style>
    <style:style style:name="T48" style:family="text">
      <style:text-properties fo:letter-spacing="-0.0075in"/>
    </style:style>
    <style:style style:name="T49" style:family="text">
      <style:text-properties fo:letter-spacing="-0.011in"/>
    </style:style>
    <style:style style:name="T50" style:family="text">
      <style:text-properties fo:font-size="22pt" fo:font-weight="bold" style:font-size-asian="22pt" style:font-weight-asian="bold"/>
    </style:style>
    <style:style style:name="T51" style:family="text">
      <style:text-properties style:font-name="Cambria" fo:font-size="16pt" style:font-size-asian="16pt"/>
    </style:style>
    <style:style style:name="T52" style:family="text">
      <style:text-properties style:font-name="Cambria" fo:font-size="16pt" fo:letter-spacing="-0.0071in" style:font-size-asian="16pt"/>
    </style:style>
    <style:style style:name="T53" style:family="text">
      <style:text-properties style:font-name="Cambria" fo:font-size="16pt" fo:letter-spacing="-0.0138in" style:font-size-asian="16pt"/>
    </style:style>
    <style:style style:name="T54" style:family="text">
      <style:text-properties style:font-name="Cambria" fo:font-size="16pt" fo:letter-spacing="-0.0146in" style:font-size-asian="16pt"/>
    </style:style>
    <style:style style:name="T55" style:family="text">
      <style:text-properties style:font-name="Cambria" fo:font-size="16pt" fo:letter-spacing="-0.0071in" officeooo:rsid="0010e7de" style:font-size-asian="16pt"/>
    </style:style>
    <style:style style:name="T56" style:family="text">
      <style:text-properties style:font-name="Cambria" fo:font-size="16pt" fo:letter-spacing="-0.0102in" style:font-size-asian="16pt"/>
    </style:style>
    <style:style style:name="T57" style:family="text">
      <style:text-properties style:font-name="Cambria" fo:font-size="16pt" fo:letter-spacing="-0.0091in" style:font-size-asian="16pt"/>
    </style:style>
    <style:style style:name="T58" style:family="text">
      <style:text-properties style:font-name="Cambria" fo:font-size="16pt" fo:letter-spacing="-0.0055in" style:font-size-asian="16pt"/>
    </style:style>
    <style:style style:name="T59" style:family="text">
      <style:text-properties style:font-name="Cambria" fo:font-size="16pt" fo:letter-spacing="-0.0126in" style:font-size-asian="16pt"/>
    </style:style>
    <style:style style:name="T60" style:family="text">
      <style:text-properties style:font-name="Cambria" fo:font-size="16pt" fo:letter-spacing="-0.0134in" style:font-size-asian="16pt"/>
    </style:style>
    <style:style style:name="T61" style:family="text">
      <style:text-properties style:font-name="Cambria" fo:font-size="16pt" fo:letter-spacing="-0.0055in" officeooo:rsid="0010e7de" style:font-size-asian="16pt"/>
    </style:style>
    <style:style style:name="T62" style:family="text">
      <style:text-properties style:font-name="Cambria" fo:font-size="16pt" fo:letter-spacing="-0.0083in" style:font-size-asian="16pt"/>
    </style:style>
    <style:style style:name="T63" style:family="text">
      <style:text-properties style:font-name="Cambria" fo:font-size="16pt" fo:letter-spacing="-0.0083in" officeooo:rsid="0010e7de" style:font-size-asian="16pt"/>
    </style:style>
    <style:style style:name="T64" style:family="text">
      <style:text-properties style:font-name="Cambria" fo:font-size="16pt" fo:letter-spacing="-0.0118in" style:font-size-asian="16pt"/>
    </style:style>
    <style:style style:name="T65" style:family="text">
      <style:text-properties style:font-name="Cambria" fo:font-size="16pt" fo:letter-spacing="-0.0472in" officeooo:rsid="0010e7de" style:font-size-asian="16pt"/>
    </style:style>
    <style:style style:name="T66" style:family="text">
      <style:text-properties style:font-name="Cambria" fo:font-size="16pt" fo:letter-spacing="-0.0472in" style:font-size-asian="16pt"/>
    </style:style>
    <style:style style:name="T67" style:family="text">
      <style:text-properties style:font-name="Cambria" fo:font-size="16pt" fo:letter-spacing="0.0154in" style:font-size-asian="16pt"/>
    </style:style>
    <style:style style:name="T68" style:family="text">
      <style:text-properties style:font-name="Cambria" fo:font-size="16pt" fo:letter-spacing="-0.0016in" style:font-size-asian="16pt"/>
    </style:style>
    <style:style style:name="T69" style:family="text">
      <style:text-properties style:font-name="Cambria" fo:font-size="16pt" fo:letter-spacing="0.0118in" style:font-size-asian="16pt"/>
    </style:style>
    <style:style style:name="T70" style:family="text">
      <style:text-properties style:font-name="Cambria" fo:font-size="16pt" fo:letter-spacing="-0.011in" style:font-size-asian="16pt"/>
    </style:style>
    <style:style style:name="T71" style:family="text">
      <style:text-properties style:font-name="Cambria" fo:font-size="16pt" fo:letter-spacing="0.0209in" style:font-size-asian="16pt"/>
    </style:style>
    <style:style style:name="T72" style:family="text">
      <style:text-properties style:font-name="Cambria" fo:font-size="16pt" fo:letter-spacing="-0.0098in" style:font-size-asian="16pt"/>
    </style:style>
    <style:style style:name="T73" style:family="text">
      <style:text-properties style:text-underline-style="none"/>
    </style:style>
    <style:style style:name="T74" style:family="text">
      <style:text-properties fo:letter-spacing="-0.0016in" style:text-underline-style="none"/>
    </style:style>
    <style:style style:name="T75" style:family="text">
      <style:text-properties fo:font-size="20pt" fo:font-weight="bold" style:font-size-asian="20pt" style:font-weight-asian="bold"/>
    </style:style>
    <style:style style:name="T76" style:family="text">
      <style:text-properties style:font-name="Cambria" fo:font-size="16pt" fo:letter-spacing="-0.0075in" style:font-size-asian="16pt"/>
    </style:style>
    <style:style style:name="T77" style:family="text">
      <style:text-properties style:font-name="Cambria" fo:font-size="16pt" fo:letter-spacing="-0.0063in" style:font-size-asian="16pt"/>
    </style:style>
    <style:style style:name="T78" style:family="text">
      <style:text-properties fo:font-size="14pt" fo:font-style="italic" style:font-size-asian="14pt" style:font-style-asian="italic"/>
    </style:style>
    <style:style style:name="T79" style:family="text">
      <style:text-properties fo:font-size="14pt" fo:letter-spacing="-0.0047in" fo:font-style="italic" style:font-size-asian="14pt" style:font-style-asian="italic"/>
    </style:style>
    <style:style style:name="T80" style:family="text">
      <style:text-properties fo:font-size="14pt" fo:letter-spacing="-0.0043in" fo:font-style="italic" style:font-size-asian="14pt" style:font-style-asian="italic"/>
    </style:style>
    <style:style style:name="T81" style:family="text">
      <style:text-properties fo:font-size="14pt" fo:letter-spacing="-0.0055in" fo:font-style="italic" style:font-size-asian="14pt" style:font-style-asian="italic"/>
    </style:style>
    <style:style style:name="T82" style:family="text">
      <style:text-properties fo:font-size="14pt" fo:letter-spacing="-0.0028in" fo:font-style="italic" style:font-size-asian="14pt" style:font-style-asian="italic"/>
    </style:style>
    <style:style style:name="T83" style:family="text">
      <style:text-properties fo:font-size="14pt" fo:letter-spacing="-0.0035in" fo:font-style="italic" style:font-size-asian="14pt" style:font-style-asian="italic"/>
    </style:style>
    <style:style style:name="T84" style:family="text">
      <style:text-properties fo:font-size="14pt" fo:letter-spacing="-0.0016in" fo:font-style="italic" style:font-size-asian="14pt" style:font-style-asian="italic"/>
    </style:style>
    <style:style style:name="T85" style:family="text">
      <style:text-properties fo:font-size="14pt" fo:letter-spacing="-0.002in" fo:font-style="italic" style:font-size-asian="14pt" style:font-style-asian="italic"/>
    </style:style>
    <style:style style:name="T86" style:family="text">
      <style:text-properties fo:font-size="14pt" fo:letter-spacing="-0.0071in" fo:font-style="italic" style:font-size-asian="14pt" style:font-style-asian="italic"/>
    </style:style>
    <style:style style:name="T87" style:family="text">
      <style:text-properties fo:font-size="14pt" fo:letter-spacing="0.028in" fo:font-style="italic" style:font-size-asian="14pt" style:font-style-asian="italic"/>
    </style:style>
    <style:style style:name="T88" style:family="text">
      <style:text-properties fo:font-size="14pt" fo:letter-spacing="-0.0008in" fo:font-style="italic" style:font-size-asian="14pt" style:font-style-asian="italic"/>
    </style:style>
    <style:style style:name="T89" style:family="text">
      <style:text-properties style:font-name="Calibri" fo:font-size="15pt" style:font-size-asian="15pt"/>
    </style:style>
    <style:style style:name="T90" style:family="text">
      <style:text-properties style:font-name="Calibri" fo:font-size="15pt" fo:letter-spacing="-0.0016in" style:font-size-asian="15pt"/>
    </style:style>
    <style:style style:name="T91" style:family="text">
      <style:text-properties style:font-name="Calibri" fo:font-size="15pt" fo:letter-spacing="-0.002in" style:font-size-asian="15pt"/>
    </style:style>
    <style:style style:name="T92" style:family="text">
      <style:text-properties style:font-name="Calibri" fo:font-size="15pt" fo:letter-spacing="-0.0035in" style:font-size-asian="15pt"/>
    </style:style>
    <style:style style:name="T93" style:family="text">
      <style:text-properties style:font-name="Calibri" fo:font-size="15pt" fo:letter-spacing="-0.0028in" style:font-size-asian="15pt"/>
    </style:style>
    <style:style style:name="T94" style:family="text">
      <style:text-properties style:font-name="Calibri" fo:font-size="15pt" fo:letter-spacing="-0.0016in" officeooo:rsid="00177ca8" style:font-size-asian="15pt"/>
    </style:style>
    <style:style style:name="T95" style:family="text">
      <style:text-properties style:font-name="Calibri" fo:font-size="15pt" fo:letter-spacing="0.028in" style:font-size-asian="15pt"/>
    </style:style>
    <style:style style:name="T96" style:family="text">
      <style:text-properties style:font-name="Calibri" fo:font-size="15pt" fo:letter-spacing="-0.0043in" style:font-size-asian="15pt"/>
    </style:style>
    <style:style style:name="T97" style:family="text">
      <style:text-properties style:font-name="Calibri" fo:letter-spacing="-0.0016in"/>
    </style:style>
    <style:style style:name="T98" style:family="text">
      <style:text-properties style:font-name="Calibri" fo:letter-spacing="-0.0008in"/>
    </style:style>
    <style:style style:name="T99" style:family="text">
      <style:text-properties style:font-name="Calibri" fo:letter-spacing="0.0008in"/>
    </style:style>
    <style:style style:name="T100" style:family="text">
      <style:text-properties style:font-name="Calibri" fo:letter-spacing="-0.002in"/>
    </style:style>
    <style:style style:name="T101" style:family="text">
      <style:text-properties style:font-name="Calibri" fo:letter-spacing="0.0016in"/>
    </style:style>
    <style:style style:name="T102" style:family="text">
      <style:text-properties fo:font-weight="normal" style:font-weight-asian="normal"/>
    </style:style>
    <style:style style:name="T103" style:family="text">
      <style:text-properties style:font-name="Calibri" fo:letter-spacing="0.0366in"/>
    </style:style>
    <style:style style:name="T104" style:family="text">
      <style:text-properties style:font-name="Calibri" fo:font-size="11pt" style:font-size-asian="11pt"/>
    </style:style>
    <style:style style:name="T105" style:family="text">
      <style:text-properties style:font-name="Calibri" fo:font-size="11pt" fo:letter-spacing="-0.0047in" style:font-size-asian="11pt"/>
    </style:style>
    <style:style style:name="T106" style:family="text">
      <style:text-properties style:font-name="Calibri" fo:font-size="11pt" fo:letter-spacing="-0.0035in" style:font-size-asian="11pt"/>
    </style:style>
    <style:style style:name="T107" style:family="text">
      <style:text-properties style:font-name="Calibri" fo:font-size="11pt" fo:letter-spacing="-0.0028in" style:font-size-asian="11pt"/>
    </style:style>
    <style:style style:name="T108" style:family="text">
      <style:text-properties style:font-name="Calibri" fo:font-size="11pt" fo:letter-spacing="-0.0043in" style:font-size-asian="11pt"/>
    </style:style>
    <style:style style:name="T109" style:family="text">
      <style:text-properties style:font-name="Calibri" fo:font-size="11pt" fo:letter-spacing="-0.0016in" style:font-size-asian="11pt"/>
    </style:style>
    <style:style style:name="T110" style:family="text">
      <style:text-properties style:font-name="Times New Roman" fo:font-size="12pt" style:font-size-asian="12pt"/>
    </style:style>
    <style:style style:name="T111" style:family="text">
      <style:text-properties style:font-name="Times New Roman" fo:font-size="22pt" fo:font-weight="bold" style:font-size-asian="22pt" style:font-weight-asian="bold"/>
    </style:style>
    <style:style style:name="T112" style:family="text">
      <style:text-properties style:font-name="Times New Roman" fo:font-size="22pt" fo:letter-spacing="-0.0016in" fo:font-weight="bold" style:font-size-asian="22pt" style:font-weight-asian="bold"/>
    </style:style>
    <style:style style:name="T113" style:family="text">
      <style:text-properties fo:font-size="12pt" style:font-size-asian="12pt"/>
    </style:style>
    <style:style style:name="T114" style:family="text">
      <style:text-properties style:font-name="Times New Roman" fo:font-size="12pt" fo:font-weight="bold" style:font-size-asian="12pt" style:font-weight-asian="bold"/>
    </style:style>
    <style:style style:name="T115" style:family="text">
      <style:text-properties style:font-name="Times New Roman" fo:font-size="12pt" fo:letter-spacing="-0.0035in" fo:font-weight="bold" style:font-size-asian="12pt" style:font-weight-asian="bold"/>
    </style:style>
    <style:style style:name="T116" style:family="text">
      <style:text-properties style:font-name="Times New Roman" fo:font-size="12pt" fo:letter-spacing="-0.0016in" style:font-size-asian="12pt"/>
    </style:style>
    <style:style style:name="T117" style:family="text">
      <style:text-properties style:font-name="Times New Roman" fo:font-size="12pt" fo:letter-spacing="-0.0016in" fo:font-weight="bold" style:font-size-asian="12pt" style:font-weight-asian="bold"/>
    </style:style>
    <style:style style:name="T118" style:family="text">
      <style:text-properties style:font-name="Times New Roman" fo:font-size="12pt" fo:letter-spacing="-0.0028in" style:font-size-asian="12pt"/>
    </style:style>
    <style:style style:name="T119" style:family="text">
      <style:text-properties style:font-name="Times New Roman" fo:font-size="12pt" fo:letter-spacing="-0.0008in" style:font-size-asian="12pt"/>
    </style:style>
    <style:style style:name="T120" style:family="text">
      <style:text-properties style:font-name="Times New Roman" fo:font-size="12pt" fo:letter-spacing="-0.002in" style:font-size-asian="12pt"/>
    </style:style>
    <style:style style:name="T121" style:family="text">
      <style:text-properties style:font-name="Times New Roman" fo:font-size="12pt" fo:letter-spacing="0.0008in" style:font-size-asian="12pt"/>
    </style:style>
    <style:style style:name="T122" style:family="text">
      <style:text-properties style:font-name="Times New Roman" fo:font-size="12pt" fo:letter-spacing="-0.0028in" fo:font-weight="bold" style:font-size-asian="12pt" style:font-weight-asian="bold"/>
    </style:style>
    <style:style style:name="T123" style:family="text">
      <style:text-properties style:font-name="Times New Roman" fo:font-size="12pt" fo:letter-spacing="-0.0035in" style:font-size-asian="12pt"/>
    </style:style>
    <style:style style:name="T124" style:family="text">
      <style:text-properties fo:letter-spacing="-0.0165in"/>
    </style:style>
    <style:style style:name="T125" style:family="text">
      <style:text-properties style:font-name="Calibri" fo:font-size="15pt" fo:letter-spacing="-0.0008in" style:font-size-asian="15pt"/>
    </style:style>
    <style:style style:name="T126" style:family="text">
      <style:text-properties style:text-underline-style="solid" style:text-underline-width="auto" style:text-underline-color="font-color"/>
    </style:style>
    <style:style style:name="T127" style:family="text">
      <style:text-properties fo:letter-spacing="-0.0083in" style:text-underline-style="solid" style:text-underline-width="auto" style:text-underline-color="font-color"/>
    </style:style>
    <style:style style:name="T128" style:family="text">
      <style:text-properties fo:letter-spacing="-0.0063in" style:text-underline-style="solid" style:text-underline-width="auto" style:text-underline-color="font-color"/>
    </style:style>
    <style:style style:name="T129" style:family="text">
      <style:text-properties fo:letter-spacing="-0.0043in" style:text-underline-style="solid" style:text-underline-width="auto" style:text-underline-color="font-color"/>
    </style:style>
    <style:style style:name="T130" style:family="text">
      <style:text-properties fo:letter-spacing="-0.0016in" style:text-underline-style="solid" style:text-underline-width="auto" style:text-underline-color="font-color"/>
    </style:style>
    <style:style style:name="T131" style:family="text">
      <style:text-properties fo:letter-spacing="-0.0098in"/>
    </style:style>
    <style:style style:name="T132" style:family="text">
      <style:text-properties fo:color="#0e233d" loext:opacity="100%" fo:font-size="13pt" style:font-size-asian="13pt"/>
    </style:style>
    <style:style style:name="T133" style:family="text">
      <style:text-properties fo:color="#0e233d" loext:opacity="100%" fo:font-size="13pt" fo:letter-spacing="-0.002in" style:font-size-asian="13pt"/>
    </style:style>
    <style:style style:name="T134" style:family="text">
      <style:text-properties fo:color="#0e233d" loext:opacity="100%" fo:font-size="13pt" fo:letter-spacing="-0.0016in" style:font-size-asian="13pt"/>
    </style:style>
    <style:style style:name="T135" style:family="text">
      <style:text-properties fo:color="#0e233d" loext:opacity="100%" fo:font-size="13pt" fo:letter-spacing="-0.0047in" style:font-size-asian="13pt"/>
    </style:style>
    <style:style style:name="T136" style:family="text">
      <style:text-properties fo:font-size="12pt" fo:letter-spacing="-0.002in" style:font-size-asian="12pt"/>
    </style:style>
    <style:style style:name="T137" style:family="text">
      <style:text-properties fo:font-size="12pt" fo:letter-spacing="-0.0016in" style:font-size-asian="12pt"/>
    </style:style>
    <style:style style:name="T138" style:family="text">
      <style:text-properties fo:font-size="12pt" fo:letter-spacing="-0.0008in" style:font-size-asian="12pt"/>
    </style:style>
    <style:style style:name="T139" style:family="text">
      <style:text-properties fo:font-size="12pt" fo:letter-spacing="-0.0028in" style:font-size-asian="12pt"/>
    </style:style>
    <style:style style:name="T140" style:family="text">
      <style:text-properties fo:font-size="12pt" fo:letter-spacing="-0.0035in" style:font-size-asian="12pt"/>
    </style:style>
    <style:style style:name="T141" style:family="text">
      <style:text-properties fo:color="#0e233d" loext:opacity="100%" fo:font-size="13pt" fo:letter-spacing="-0.0028in" style:font-size-asian="13pt"/>
    </style:style>
    <style:style style:name="T142" style:family="text">
      <style:text-properties fo:color="#0e233d" loext:opacity="100%" fo:font-size="13pt" fo:letter-spacing="-0.0043in" style:font-size-asian="13pt"/>
    </style:style>
    <style:style style:name="T143" style:family="text">
      <style:text-properties fo:font-size="10pt" style:font-size-asian="10pt"/>
    </style:style>
    <style:style style:name="T144" style:family="text">
      <style:text-properties style:font-name="Calibri" fo:font-size="9pt" fo:font-style="italic" style:font-size-asian="9pt" style:font-style-asian="italic"/>
    </style:style>
    <style:style style:name="T145" style:family="text">
      <style:text-properties fo:color="#1f487c" loext:opacity="100%" style:font-name="Calibri" fo:font-size="9pt" fo:font-style="italic" style:font-size-asian="9pt" style:font-style-asian="italic"/>
    </style:style>
    <style:style style:name="T146" style:family="text">
      <style:text-properties fo:color="#1f487c" loext:opacity="100%" style:font-name="Calibri" fo:font-size="9pt" fo:letter-spacing="-0.0008in" fo:font-style="italic" style:font-size-asian="9pt" style:font-style-asian="italic"/>
    </style:style>
    <style:style style:name="T147" style:family="text">
      <style:text-properties fo:color="#1f487c" loext:opacity="100%" style:font-name="Calibri" fo:font-size="9pt" fo:letter-spacing="-0.002in" fo:font-style="italic" style:font-size-asian="9pt" style:font-style-asian="italic"/>
    </style:style>
    <style:style style:name="T148" style:family="text">
      <style:text-properties fo:color="#1f487c" loext:opacity="100%" style:font-name="Calibri" fo:font-size="9pt" fo:letter-spacing="-0.0016in" fo:font-style="italic" style:font-size-asian="9pt" style:font-style-asian="italic"/>
    </style:style>
    <style:style style:name="T149" style:family="text">
      <style:text-properties style:font-name="Segoe UI" fo:font-size="11pt" style:font-size-asian="11pt"/>
    </style:style>
    <style:style style:name="T150" style:family="text">
      <style:text-properties fo:color="#0d0d0d" loext:opacity="100%" style:font-name="Segoe UI" fo:font-size="11pt" style:font-size-asian="11pt"/>
    </style:style>
    <style:style style:name="T151" style:family="text">
      <style:text-properties fo:color="#0d0d0d" loext:opacity="100%" style:font-name="Segoe UI" fo:font-size="11pt" fo:letter-spacing="-0.0047in" style:font-size-asian="11pt"/>
    </style:style>
    <style:style style:name="T152" style:family="text">
      <style:text-properties fo:color="#0d0d0d" loext:opacity="100%" style:font-name="Segoe UI" fo:font-size="11pt" fo:letter-spacing="-0.0035in" style:font-size-asian="11pt"/>
    </style:style>
    <style:style style:name="T153" style:family="text">
      <style:text-properties fo:color="#0d0d0d" loext:opacity="100%" style:font-name="Segoe UI" fo:font-size="11pt" fo:letter-spacing="-0.0028in" style:font-size-asian="11pt"/>
    </style:style>
    <style:style style:name="T154" style:family="text">
      <style:text-properties fo:color="#0d0d0d" loext:opacity="100%" style:font-name="Segoe UI" fo:font-size="11pt" fo:letter-spacing="-0.002in" style:font-size-asian="11pt"/>
    </style:style>
    <style:style style:name="T155" style:family="text">
      <style:text-properties fo:color="#0d0d0d" loext:opacity="100%" style:font-name="Segoe UI" fo:font-size="11pt" fo:letter-spacing="-0.0071in" style:font-size-asian="11pt"/>
    </style:style>
    <style:style style:name="T156" style:family="text">
      <style:text-properties style:font-name="Symbol" fo:font-size="12pt" style:font-size-asian="12pt"/>
    </style:style>
    <style:style style:name="T157" style:family="text">
      <style:text-properties style:font-name="Symbol" fo:font-size="12pt" fo:letter-spacing="-0.0071in" style:font-size-asian="12pt"/>
    </style:style>
    <style:style style:name="T158" style:family="text">
      <style:text-properties style:font-name="Symbol"/>
    </style:style>
    <style:style style:name="T159" style:family="text">
      <style:text-properties fo:color="#1f487c" loext:opacity="100%" style:font-name="Calibri" fo:font-size="9pt" fo:letter-spacing="-0.0035in" fo:font-style="italic" style:font-size-asian="9pt" style:font-style-asian="italic"/>
    </style:style>
    <style:style style:name="T160" style:family="text">
      <style:text-properties fo:font-size="12pt" fo:font-weight="bold" style:font-size-asian="12pt" style:font-weight-asian="bold"/>
    </style:style>
    <style:style style:name="T161" style:family="text">
      <style:text-properties fo:font-size="12pt" fo:letter-spacing="-0.0008in" fo:font-weight="bold" style:font-size-asian="12pt" style:font-weight-asian="bold"/>
    </style:style>
    <style:style style:name="T162" style:family="text">
      <style:text-properties fo:font-size="12pt" fo:letter-spacing="-0.0016in" fo:font-weight="bold" style:font-size-asian="12pt" style:font-weight-asian="bold"/>
    </style:style>
    <style:style style:name="T163" style:family="text">
      <style:text-properties fo:font-size="12pt" fo:letter-spacing="-0.0035in" fo:font-weight="bold" style:font-size-asian="12pt" style:font-weight-asian="bold"/>
    </style:style>
    <style:style style:name="T164" style:family="text">
      <style:text-properties fo:font-size="12pt" fo:letter-spacing="-0.002in" fo:font-weight="bold" style:font-size-asian="12pt" style:font-weight-asian="bold"/>
    </style:style>
    <style:style style:name="T165" style:family="text">
      <style:text-properties fo:font-size="12pt" fo:letter-spacing="-0.0028in" fo:font-weight="bold" style:font-size-asian="12pt" style:font-weight-asian="bold"/>
    </style:style>
    <style:style style:name="T166" style:family="text">
      <style:text-properties fo:font-size="12pt" fo:letter-spacing="0.0008in" style:font-size-asian="12pt"/>
    </style:style>
    <style:style style:name="T167" style:family="text">
      <style:text-properties fo:color="#0d0d0d" loext:opacity="100%" style:font-name="Symbol" fo:font-size="11pt" style:font-size-asian="11pt"/>
    </style:style>
    <style:style style:name="T168" style:family="text">
      <style:text-properties fo:font-size="15pt" fo:font-weight="bold" style:font-size-asian="15pt" style:font-weight-asian="bold"/>
    </style:style>
    <style:style style:name="T169" style:family="text">
      <style:text-properties fo:font-size="15pt" style:font-size-asian="15pt"/>
    </style:style>
    <style:style style:name="T170" style:family="text">
      <style:text-properties fo:font-size="15pt" fo:letter-spacing="-0.0071in" style:font-size-asian="15pt"/>
    </style:style>
    <style:style style:name="T171" style:family="text">
      <style:text-properties fo:color="#1f1f1f" loext:opacity="100%" style:font-name="Arial" fo:font-size="12pt" style:font-size-asian="12pt"/>
    </style:style>
    <style:style style:name="T172" style:family="text">
      <style:text-properties fo:font-size="12pt" fo:letter-spacing="0.0008in" fo:font-weight="bold" style:font-size-asian="12pt" style:font-weight-asian="bold"/>
    </style:style>
    <style:style style:name="T173" style:family="text">
      <style:text-properties fo:font-size="12pt" fo:letter-spacing="-0.0043in" fo:font-weight="bold" style:font-size-asian="12pt" style:font-weight-asian="bold"/>
    </style:style>
    <style:style style:name="T174" style:family="text">
      <style:text-properties fo:font-family="'Arial MT'" style:font-family-generic="swiss" style:font-pitch="variable"/>
    </style:style>
    <style:style style:name="T175" style:family="text">
      <style:text-properties fo:color="#1f1f1f" loext:opacity="100%" fo:font-family="'Arial MT'" style:font-family-generic="swiss" style:font-pitch="variable"/>
    </style:style>
    <style:style style:name="T176" style:family="text">
      <style:text-properties fo:color="#1f1f1f" loext:opacity="100%" fo:font-family="'Arial MT'" style:font-family-generic="swiss" style:font-pitch="variable" fo:letter-spacing="-0.002in"/>
    </style:style>
    <style:style style:name="T177" style:family="text">
      <style:text-properties fo:color="#1f1f1f" loext:opacity="100%" fo:font-family="'Arial MT'" style:font-family-generic="swiss" style:font-pitch="variable" fo:letter-spacing="-0.0008in"/>
    </style:style>
    <style:style style:name="T178" style:family="text">
      <style:text-properties fo:color="#1f1f1f" loext:opacity="100%" fo:font-family="'Arial MT'" style:font-family-generic="swiss" style:font-pitch="variable" fo:letter-spacing="-0.0016in"/>
    </style:style>
    <style:style style:name="T179" style:family="text">
      <style:text-properties fo:color="#1f1f1f" loext:opacity="100%" fo:font-family="'Arial MT'" style:font-family-generic="swiss" style:font-pitch="variable" fo:letter-spacing="-0.0028in"/>
    </style:style>
    <style:style style:name="T180" style:family="text">
      <style:text-properties fo:color="#1f1f1f" loext:opacity="100%" fo:font-family="'Arial MT'" style:font-family-generic="swiss" style:font-pitch="variable" fo:letter-spacing="-0.0035in"/>
    </style:style>
    <style:style style:name="T181" style:family="text">
      <style:text-properties fo:letter-spacing="-0.0075in" style:text-underline-style="solid" style:text-underline-width="auto" style:text-underline-color="font-color"/>
    </style:style>
    <style:style style:name="T182" style:family="text">
      <style:text-properties fo:letter-spacing="-0.0071in" style:text-underline-style="solid" style:text-underline-width="auto" style:text-underline-color="font-color"/>
    </style:style>
    <style:style style:name="T183" style:family="text">
      <style:text-properties fo:letter-spacing="0.028in"/>
    </style:style>
    <style:style style:name="T184" style:family="text">
      <style:text-properties style:font-name="Calibri" fo:font-size="11pt" fo:font-weight="bold" style:font-size-asian="11pt" style:font-weight-asian="bold"/>
    </style:style>
    <style:style style:name="T185" style:family="text">
      <style:text-properties style:font-name="Calibri" fo:font-size="11pt" fo:letter-spacing="-0.0016in" fo:font-weight="bold" style:font-size-asian="11pt" style:font-weight-asian="bold"/>
    </style:style>
    <style:style style:name="T186" style:family="text">
      <style:text-properties style:font-name="Calibri" fo:font-size="11pt" fo:letter-spacing="-0.0008in" fo:font-weight="bold" style:font-size-asian="11pt" style:font-weight-asian="bold"/>
    </style:style>
    <style:style style:name="T187" style:family="text">
      <style:text-properties fo:font-weight="bold" style:font-weight-asian="bold"/>
    </style:style>
    <style:style style:name="T188" style:family="text">
      <style:text-properties style:font-name="Calibri" fo:font-size="11pt" fo:letter-spacing="-0.002in" style:font-size-asian="11pt"/>
    </style:style>
    <style:style style:name="T189" style:family="text">
      <style:text-properties style:font-name="Calibri" fo:font-size="10pt" style:font-size-asian="10pt"/>
    </style:style>
    <style:style style:name="T190" style:family="text">
      <style:text-properties fo:letter-spacing="-0.0071in" fo:font-weight="normal" style:font-weight-asian="normal"/>
    </style:style>
    <style:style style:name="T191" style:family="text">
      <style:text-properties fo:font-size="12pt" fo:letter-spacing="0.0016in" style:font-size-asian="12pt"/>
    </style:style>
    <style:style style:name="T192" style:family="text">
      <style:text-properties fo:font-size="12pt" fo:letter-spacing="0.002in" fo:font-weight="bold" style:font-size-asian="12pt" style:font-weight-asian="bold"/>
    </style:style>
    <style:style style:name="T193" style:family="text">
      <style:text-properties fo:font-size="12pt" fo:letter-spacing="-0.0071in" style:font-size-asian="12pt"/>
    </style:style>
    <style:style style:name="T194" style:family="text">
      <style:text-properties fo:letter-spacing="0.0016in"/>
    </style:style>
    <style:style style:name="T195" style:family="text">
      <style:text-properties style:font-name="Calibri" fo:font-size="11pt" fo:letter-spacing="-0.0055in" style:font-size-asian="11pt"/>
    </style:style>
    <style:style style:name="T196" style:family="text">
      <style:text-properties fo:letter-spacing="-0.0047in" style:text-underline-style="solid" style:text-underline-width="auto" style:text-underline-color="font-color"/>
    </style:style>
    <style:style style:name="T197" style:family="text">
      <style:text-properties fo:letter-spacing="0.0008in"/>
    </style:style>
    <style:style style:name="T198" style:family="text">
      <style:text-properties style:font-name="Cambria" fo:font-size="11pt" style:font-size-asian="11pt"/>
    </style:style>
    <style:style style:name="T199" style:family="text">
      <style:text-properties style:font-name="Cambria" fo:font-size="11pt" fo:letter-spacing="-0.0047in" style:font-size-asian="11pt"/>
    </style:style>
    <style:style style:name="T200" style:family="text">
      <style:text-properties style:font-name="Cambria" fo:font-size="11pt" fo:letter-spacing="-0.0028in" style:font-size-asian="11pt"/>
    </style:style>
    <style:style style:name="T201" style:family="text">
      <style:text-properties style:font-name="Cambria" fo:font-size="11pt" fo:letter-spacing="-0.0035in" style:font-size-asian="11pt"/>
    </style:style>
    <style:style style:name="T202" style:family="text">
      <style:text-properties style:font-name="Cambria" fo:font-size="11pt" fo:letter-spacing="-0.0043in" style:font-size-asian="11pt"/>
    </style:style>
    <style:style style:name="T203" style:family="text">
      <style:text-properties style:font-name="Cambria" fo:font-size="11pt" fo:letter-spacing="-0.002in" style:font-size-asian="11pt"/>
    </style:style>
    <style:style style:name="T204" style:family="text">
      <style:text-properties style:font-name="Cambria" fo:font-size="11pt" fo:letter-spacing="-0.0071in" style:font-size-asian="11pt"/>
    </style:style>
    <style:style style:name="T205" style:family="text">
      <style:text-properties style:font-name="Cambria" fo:font-size="9pt" style:font-size-asian="9pt"/>
    </style:style>
    <style:style style:name="T206" style:family="text">
      <style:text-properties fo:color="#1f487c" loext:opacity="100%" style:font-name="Calibri" fo:font-size="9pt" fo:letter-spacing="-0.0028in" fo:font-style="italic" style:font-size-asian="9pt" style:font-style-asian="italic"/>
    </style:style>
    <style:style style:name="T207" style:family="text">
      <style:text-properties fo:color="#0e233d" loext:opacity="100%" fo:font-size="12pt" fo:font-weight="bold" style:font-size-asian="12pt" style:font-weight-asian="bold"/>
    </style:style>
    <style:style style:name="T208" style:family="text">
      <style:text-properties fo:color="#0e233d" loext:opacity="100%" fo:font-size="12pt" fo:letter-spacing="-0.0008in" fo:font-weight="bold" style:font-size-asian="12pt" style:font-weight-asian="bold"/>
    </style:style>
    <style:style style:name="T209" style:family="text">
      <style:text-properties fo:color="#0e233d" loext:opacity="100%" fo:font-size="12pt" fo:letter-spacing="-0.0075in" fo:font-weight="bold" style:font-size-asian="12pt" style:font-weight-asian="bold"/>
    </style:style>
    <style:style style:name="T210" style:family="text">
      <style:text-properties fo:color="#234060" loext:opacity="100%" style:font-name="Cambria" fo:font-size="11pt" fo:font-weight="bold" style:font-size-asian="11pt" style:font-weight-asian="bold"/>
    </style:style>
    <style:style style:name="T211" style:family="text">
      <style:text-properties fo:color="#234060" loext:opacity="100%" style:font-name="Cambria" fo:font-size="11pt" fo:letter-spacing="-0.0008in" fo:font-weight="bold" style:font-size-asian="11pt" style:font-weight-asian="bold"/>
    </style:style>
    <style:style style:name="T212" style:family="text">
      <style:text-properties fo:color="#0e233d" loext:opacity="100%" fo:font-size="12pt" fo:letter-spacing="-0.0016in" fo:font-weight="bold" style:font-size-asian="12pt" style:font-weight-asian="bold"/>
    </style:style>
    <style:style style:name="T213" style:family="text">
      <style:text-properties fo:color="#0e233d" loext:opacity="100%" fo:font-size="12pt" fo:letter-spacing="-0.0035in" fo:font-weight="bold" style:font-size-asian="12pt" style:font-weight-asian="bold"/>
    </style:style>
    <style:style style:name="T214" style:family="text">
      <style:text-properties fo:color="#0e233d" loext:opacity="100%" fo:font-size="12pt" fo:letter-spacing="-0.0102in" fo:font-weight="bold" style:font-size-asian="12pt" style:font-weight-asian="bold"/>
    </style:style>
    <style:style style:name="T215" style:family="text">
      <style:text-properties fo:font-size="12pt" fo:letter-spacing="-0.0043in" style:font-size-asian="12pt"/>
    </style:style>
    <style:style style:name="T216" style:family="text">
      <style:text-properties fo:color="#0e233d" loext:opacity="100%" fo:font-size="12pt" fo:letter-spacing="-0.0028in" fo:font-weight="bold" style:font-size-asian="12pt" style:font-weight-asian="bold"/>
    </style:style>
    <style:style style:name="T217" style:family="text">
      <style:text-properties fo:color="#0e233d" loext:opacity="100%" fo:font-size="12.5pt" fo:font-weight="bold" style:font-size-asian="12.5pt" style:font-weight-asian="bold"/>
    </style:style>
    <style:style style:name="T218" style:family="text">
      <style:text-properties fo:color="#0e233d" loext:opacity="100%" fo:font-size="12.5pt" fo:letter-spacing="-0.002in" fo:font-weight="bold" style:font-size-asian="12.5pt" style:font-weight-asian="bold"/>
    </style:style>
    <style:style style:name="T219" style:family="text">
      <style:text-properties fo:color="#0e233d" loext:opacity="100%" fo:font-size="12.5pt" fo:letter-spacing="-0.0028in" fo:font-weight="bold" style:font-size-asian="12.5pt" style:font-weight-asian="bold"/>
    </style:style>
    <style:style style:name="T220" style:family="text">
      <style:text-properties fo:color="#0e233d" loext:opacity="100%" fo:font-size="12.5pt" fo:letter-spacing="-0.0008in" fo:font-weight="bold" style:font-size-asian="12.5pt" style:font-weight-asian="bold"/>
    </style:style>
    <style:style style:name="T221" style:family="text">
      <style:text-properties fo:color="#0e233d" loext:opacity="100%" fo:font-size="12.5pt" fo:letter-spacing="-0.0035in" fo:font-weight="bold" style:font-size-asian="12.5pt" style:font-weight-asian="bold"/>
    </style:style>
    <style:style style:name="T222" style:family="text">
      <style:text-properties fo:color="#0e233d" loext:opacity="100%" fo:font-size="12.5pt" fo:letter-spacing="-0.0043in" fo:font-weight="bold" style:font-size-asian="12.5pt" style:font-weight-asian="bold"/>
    </style:style>
    <style:style style:name="T223" style:family="text">
      <style:text-properties fo:color="#0e233d" loext:opacity="100%" fo:font-size="12.5pt" fo:letter-spacing="-0.0016in" fo:font-weight="bold" style:font-size-asian="12.5pt" style:font-weight-asian="bold"/>
    </style:style>
    <style:style style:name="T224" style:family="text">
      <style:text-properties style:font-name="Calibri" fo:font-size="10pt" fo:font-style="italic" style:font-size-asian="10pt" style:font-style-asian="italic"/>
    </style:style>
    <style:style style:name="T225" style:family="text">
      <style:text-properties fo:color="#1f487c" loext:opacity="100%" style:font-name="Calibri" fo:font-size="10pt" fo:font-style="italic" style:font-size-asian="10pt" style:font-style-asian="italic"/>
    </style:style>
    <style:style style:name="T226" style:family="text">
      <style:text-properties fo:color="#1f487c" loext:opacity="100%" style:font-name="Calibri" fo:font-size="10pt" fo:letter-spacing="-0.0035in" fo:font-style="italic" style:font-size-asian="10pt" style:font-style-asian="italic"/>
    </style:style>
    <style:style style:name="T227" style:family="text">
      <style:text-properties fo:color="#1f487c" loext:opacity="100%" style:font-name="Calibri" fo:font-size="10pt" fo:letter-spacing="-0.0047in" fo:font-style="italic" style:font-size-asian="10pt" style:font-style-asian="italic"/>
    </style:style>
    <style:style style:name="T228" style:family="text">
      <style:text-properties fo:color="#1f487c" loext:opacity="100%" style:font-name="Calibri" fo:font-size="10pt" fo:letter-spacing="-0.0043in" fo:font-style="italic" style:font-size-asian="10pt" style:font-style-asian="italic"/>
    </style:style>
    <style:style style:name="T229" style:family="text">
      <style:text-properties fo:color="#1f487c" loext:opacity="100%" style:font-name="Calibri" fo:font-size="10pt" fo:letter-spacing="-0.0016in" fo:font-style="italic" style:font-size-asian="10pt" style:font-style-asian="italic"/>
    </style:style>
    <style:style style:name="T230" style:family="text">
      <style:text-properties style:font-name="Calibri" fo:font-size="9.5pt" fo:font-style="italic" style:font-size-asian="9.5pt" style:font-style-asian="italic"/>
    </style:style>
    <style:style style:name="T231" style:family="text">
      <style:text-properties fo:font-size="11pt" fo:font-weight="bold" style:font-size-asian="11pt" style:font-weight-asian="bold"/>
    </style:style>
    <style:style style:name="T232" style:family="text">
      <style:text-properties fo:font-size="11pt" fo:letter-spacing="-0.0016in" fo:font-weight="bold" style:font-size-asian="11pt" style:font-weight-asian="bold"/>
    </style:style>
    <style:style style:name="T233" style:family="text">
      <style:text-properties fo:font-size="11pt" fo:letter-spacing="-0.0028in" fo:font-weight="bold" style:font-size-asian="11pt" style:font-weight-asian="bold"/>
    </style:style>
    <style:style style:name="T234" style:family="text">
      <style:text-properties fo:font-family="Consolas" style:font-family-generic="roman" style:font-pitch="variable" fo:font-size="10.5pt" fo:font-weight="bold" style:font-size-asian="10.5pt" style:font-weight-asian="bold"/>
    </style:style>
    <style:style style:name="T235" style:family="text">
      <style:text-properties fo:color="#404040" loext:opacity="100%" fo:font-family="Consolas" style:font-family-generic="roman" style:font-pitch="variable" fo:font-size="10.5pt" fo:letter-spacing="-0.0016in" fo:font-weight="bold" style:font-size-asian="10.5pt" style:font-weight-asian="bold"/>
    </style:style>
    <style:style style:name="T236" style:family="text">
      <style:text-properties fo:font-size="11pt" style:font-size-asian="11pt"/>
    </style:style>
    <style:style style:name="T237" style:family="text">
      <style:text-properties fo:font-size="11pt" fo:letter-spacing="-0.0063in" style:font-size-asian="11pt"/>
    </style:style>
    <style:style style:name="T238" style:family="text">
      <style:text-properties fo:font-size="11pt" fo:letter-spacing="-0.0047in" style:font-size-asian="11pt"/>
    </style:style>
    <style:style style:name="T239" style:family="text">
      <style:text-properties fo:font-size="11pt" fo:letter-spacing="-0.0016in" style:font-size-asian="11pt"/>
    </style:style>
    <style:style style:name="T240" style:family="text">
      <style:text-properties fo:font-size="11pt" fo:letter-spacing="-0.0071in" style:font-size-asian="11pt"/>
    </style:style>
    <style:style style:name="T241" style:family="text">
      <style:text-properties fo:font-size="11pt" fo:letter-spacing="-0.0035in" style:font-size-asian="11pt"/>
    </style:style>
    <style:style style:name="T242" style:family="text">
      <style:text-properties fo:font-size="11pt" fo:letter-spacing="-0.002in" style:font-size-asian="11pt"/>
    </style:style>
    <style:style style:name="T243" style:family="text">
      <style:text-properties fo:font-size="11pt" fo:letter-spacing="-0.0043in" style:font-size-asian="11pt"/>
    </style:style>
    <style:style style:name="T244" style:family="text">
      <style:text-properties fo:font-size="11pt" fo:letter-spacing="-0.0028in" style:font-size-asian="11pt"/>
    </style:style>
    <style:style style:name="T245" style:family="text">
      <style:text-properties fo:font-size="11pt" fo:letter-spacing="-0.0008in" style:font-size-asian="11pt"/>
    </style:style>
    <style:style style:name="T246" style:family="text">
      <style:text-properties fo:font-size="11pt" fo:letter-spacing="-0.0055in" style:font-size-asian="11pt"/>
    </style:style>
    <style:style style:name="T247" style:family="text">
      <style:text-properties fo:font-size="12pt" fo:letter-spacing="-0.0075in" style:font-size-asian="12pt"/>
    </style:style>
    <style:style style:name="T248" style:family="text">
      <style:text-properties fo:font-size="12pt" fo:letter-spacing="-0.0083in" style:font-size-asian="12pt"/>
    </style:style>
    <style:style style:name="T249" style:family="text">
      <style:text-properties style:font-name="Arial" fo:font-size="12pt" fo:font-weight="bold" style:font-size-asian="12pt" style:font-weight-asian="bold"/>
    </style:style>
    <style:style style:name="T250" style:family="text">
      <style:text-properties fo:color="#1f1f1f" loext:opacity="100%" style:font-name="Arial" fo:font-size="12pt" fo:font-weight="bold" style:font-size-asian="12pt" style:font-weight-asian="bold"/>
    </style:style>
    <style:style style:name="T251" style:family="text">
      <style:text-properties fo:color="#1f1f1f" loext:opacity="100%" style:font-name="Arial" fo:font-size="12pt" fo:letter-spacing="-0.0016in" fo:font-weight="bold" style:font-size-asian="12pt" style:font-weight-asian="bold"/>
    </style:style>
    <style:style style:name="T252" style:family="text">
      <style:text-properties style:font-name="Cambria" fo:font-size="12pt" fo:font-style="italic" fo:font-weight="bold" style:font-size-asian="12pt" style:font-style-asian="italic" style:font-weight-asian="bold"/>
    </style:style>
    <style:style style:name="T253" style:family="text">
      <style:text-properties style:font-name="Cambria" fo:font-size="12pt" fo:letter-spacing="-0.002in" fo:font-style="italic" fo:font-weight="bold" style:font-size-asian="12pt" style:font-style-asian="italic" style:font-weight-asian="bold"/>
    </style:style>
    <style:style style:name="T254" style:family="text">
      <style:text-properties style:font-name="Cambria" fo:font-size="12pt" fo:letter-spacing="-0.0035in" fo:font-style="italic" fo:font-weight="bold" style:font-size-asian="12pt" style:font-style-asian="italic" style:font-weight-asian="bold"/>
    </style:style>
    <style:style style:name="T255" style:family="text">
      <style:text-properties style:font-name="Cambria" fo:font-size="11pt" fo:font-style="italic" fo:font-weight="bold" style:font-size-asian="11pt" style:font-style-asian="italic" style:font-weight-asian="bold"/>
    </style:style>
    <style:style style:name="T256" style:family="text">
      <style:text-properties style:font-name="Cambria" fo:font-size="11pt" fo:letter-spacing="-0.002in" fo:font-style="italic" fo:font-weight="bold" style:font-size-asian="11pt" style:font-style-asian="italic" style:font-weight-asian="bold"/>
    </style:style>
    <style:style style:name="T257" style:family="text">
      <style:text-properties style:font-name="Cambria" fo:font-size="11pt" fo:letter-spacing="-0.0008in" fo:font-style="italic" fo:font-weight="bold" style:font-size-asian="11pt" style:font-style-asian="italic" style:font-weight-asian="bold"/>
    </style:style>
    <style:style style:name="T258" style:family="text">
      <style:text-properties style:font-name="Cambria" fo:font-size="11pt" fo:letter-spacing="-0.0028in" fo:font-style="italic" fo:font-weight="bold" style:font-size-asian="11pt" style:font-style-asian="italic" style:font-weight-asian="bold"/>
    </style:style>
    <style:style style:name="T259" style:family="text">
      <style:text-properties style:font-name="Cambria" fo:font-size="12pt" fo:letter-spacing="-0.0028in" fo:font-style="italic" fo:font-weight="bold" style:font-size-asian="12pt" style:font-style-asian="italic" style:font-weight-asian="bold"/>
    </style:style>
    <style:style style:name="T260" style:family="text">
      <style:text-properties style:font-name="Cambria" fo:font-size="11pt" fo:letter-spacing="-0.0016in" fo:font-style="italic" fo:font-weight="bold" style:font-size-asian="11pt" style:font-style-asian="italic" style:font-weight-asian="bold"/>
    </style:style>
    <style:style style:name="T261" style:family="text">
      <style:text-properties style:font-name="Cambria" fo:font-size="12pt" fo:letter-spacing="-0.0016in" fo:font-style="italic" fo:font-weight="bold" style:font-size-asian="12pt" style:font-style-asian="italic" style:font-weight-asian="bold"/>
    </style:style>
    <style:style style:name="T262" style:family="text">
      <style:text-properties style:font-name="Cambria" fo:font-size="12pt" fo:letter-spacing="0.0008in" fo:font-style="italic" fo:font-weight="bold" style:font-size-asian="12pt" style:font-style-asian="italic" style:font-weight-asian="bold"/>
    </style:style>
    <style:style style:name="T263" style:family="text">
      <style:text-properties style:font-name="Cambria" fo:font-size="12pt" fo:letter-spacing="-0.0055in" fo:font-style="italic" fo:font-weight="bold" style:font-size-asian="12pt" style:font-style-asian="italic" style:font-weight-asian="bold"/>
    </style:style>
    <style:style style:name="T264" style:family="text">
      <style:text-properties style:font-name="Arial" fo:font-weight="bold" style:font-weight-asian="bold"/>
    </style:style>
    <style:style style:name="T265" style:family="text">
      <style:text-properties fo:font-size="3pt" style:font-size-asian="3pt"/>
    </style:style>
    <style:style style:name="T266" style:family="text">
      <style:text-properties style:font-name="Calibri" fo:letter-spacing="-0.0047in"/>
    </style:style>
    <style:style style:name="T267" style:family="text">
      <style:text-properties style:font-name="Cambria" fo:font-size="11pt" fo:font-weight="bold" style:font-size-asian="11pt" style:font-weight-asian="bold"/>
    </style:style>
    <style:style style:name="T268" style:family="text">
      <style:text-properties fo:color="#233e5f" loext:opacity="100%" style:font-name="Cambria" fo:font-size="11pt" fo:font-weight="bold" style:font-size-asian="11pt" style:font-weight-asian="bold"/>
    </style:style>
    <style:style style:name="T269" style:family="text">
      <style:text-properties fo:color="#233e5f" loext:opacity="100%" style:font-name="Cambria" fo:font-size="11pt" fo:letter-spacing="-0.0043in" fo:font-weight="bold" style:font-size-asian="11pt" style:font-weight-asian="bold"/>
    </style:style>
    <style:style style:name="T270" style:family="text">
      <style:text-properties fo:color="#233e5f" loext:opacity="100%" style:font-name="Cambria" fo:font-size="11pt" fo:letter-spacing="-0.0028in" fo:font-weight="bold" style:font-size-asian="11pt" style:font-weight-asian="bold"/>
    </style:style>
    <style:style style:name="T271" style:family="text">
      <style:text-properties fo:color="#233e5f" loext:opacity="100%" style:font-name="Cambria" fo:font-size="11pt" fo:letter-spacing="-0.0016in" fo:font-weight="bold" style:font-size-asian="11pt" style:font-weight-asian="bold"/>
    </style:style>
    <style:style style:name="T272" style:family="text">
      <style:text-properties fo:font-family="'Courier New'" style:font-family-generic="roman" style:font-pitch="variable" fo:font-size="10pt" style:font-size-asian="10pt"/>
    </style:style>
    <style:style style:name="T273" style:family="text">
      <style:text-properties fo:font-family="'Courier New'" style:font-family-generic="roman" style:font-pitch="variable" fo:font-size="10pt" fo:letter-spacing="-0.039in" style:font-size-asian="10pt"/>
    </style:style>
    <style:style style:name="T274" style:family="text">
      <style:text-properties style:font-name="Calibri" fo:font-size="11pt" fo:letter-spacing="-0.0008in" style:font-size-asian="11pt"/>
    </style:style>
    <style:style style:name="T275" style:family="text">
      <style:text-properties fo:font-family="'Courier New'" style:font-family-generic="roman" style:font-pitch="variable" fo:font-size="10pt" fo:letter-spacing="-0.0409in" style:font-size-asian="10pt"/>
    </style:style>
    <style:style style:name="T276" style:family="text">
      <style:text-properties fo:font-family="'Courier New'" style:font-family-generic="roman" style:font-pitch="variable" fo:font-size="10pt" fo:letter-spacing="-0.0429in" style:font-size-asian="10pt"/>
    </style:style>
    <style:style style:name="T277" style:family="text">
      <style:text-properties fo:color="#233e5f" loext:opacity="100%" style:font-name="Cambria" fo:font-size="11pt" fo:letter-spacing="-0.0047in" fo:font-weight="bold" style:font-size-asian="11pt" style:font-weight-asian="bold"/>
    </style:style>
    <style:style style:name="T278" style:family="text">
      <style:text-properties style:font-name="Calibri" fo:letter-spacing="-0.0055in"/>
    </style:style>
    <style:style style:name="T279" style:family="text">
      <style:text-properties style:font-name="Calibri" fo:font-style="italic" style:font-style-asian="italic"/>
    </style:style>
    <style:style style:name="T280" style:family="text">
      <style:text-properties fo:color="#1f487c" loext:opacity="100%" style:font-name="Calibri" fo:font-size="9pt" fo:letter-spacing="0.0264in" fo:font-style="italic" style:font-size-asian="9pt" style:font-style-asian="italic"/>
    </style:style>
    <style:style style:name="T281" style:family="text">
      <style:text-properties style:font-name="Calibri" fo:font-size="3.5pt" style:font-size-asian="3.5pt"/>
    </style:style>
    <style:style style:name="T282" style:family="text">
      <style:text-properties fo:letter-spacing="-0.0055in" style:text-underline-style="solid" style:text-underline-width="auto" style:text-underline-color="font-color"/>
    </style:style>
    <style:style style:name="T283" style:family="text">
      <style:text-properties style:font-name="Calibri" fo:font-size="7pt" style:font-size-asian="7pt"/>
    </style:style>
    <style:style style:name="T284" style:family="text">
      <style:text-properties fo:font-size="14pt" style:font-size-asian="14pt"/>
    </style:style>
    <style:style style:name="T285" style:family="text">
      <style:text-properties fo:font-size="14pt" fo:letter-spacing="-0.0016in" style:font-size-asian="14pt"/>
    </style:style>
    <style:style style:name="T286" style:family="text">
      <style:text-properties fo:font-size="14pt" fo:letter-spacing="-0.0028in" style:font-size-asian="14pt"/>
    </style:style>
    <style:style style:name="T287" style:family="text">
      <style:text-properties fo:font-size="14pt" fo:letter-spacing="-0.002in" style:font-size-asian="14pt"/>
    </style:style>
    <style:style style:name="T288" style:family="text">
      <style:text-properties fo:font-size="14pt" fo:letter-spacing="-0.0043in" style:font-size-asian="14pt"/>
    </style:style>
    <style:style style:name="T289" style:family="text">
      <style:text-properties fo:font-size="14pt" fo:letter-spacing="-0.0047in" style:font-size-asian="14pt"/>
    </style:style>
    <style:style style:name="T290" style:family="text">
      <style:text-properties fo:font-size="14pt" fo:letter-spacing="-0.0035in" style:font-size-asian="14pt"/>
    </style:style>
    <style:style style:name="T291" style:family="text">
      <style:text-properties fo:font-size="14pt" fo:font-weight="bold" style:font-size-asian="14pt" style:font-weight-asian="bold"/>
    </style:style>
    <style:style style:name="T292" style:family="text">
      <style:text-properties fo:font-size="14pt" fo:letter-spacing="-0.0055in" style:font-size-asian="14pt"/>
    </style:style>
    <style:style style:name="T293" style:family="text">
      <style:text-properties fo:font-size="14pt" fo:letter-spacing="-0.002in" fo:font-weight="bold" style:font-size-asian="14pt" style:font-weight-asian="bold"/>
    </style:style>
    <style:style style:name="T294" style:family="text">
      <style:text-properties fo:font-size="14pt" fo:letter-spacing="-0.0028in" fo:font-weight="bold" style:font-size-asian="14pt" style:font-weight-asian="bold"/>
    </style:style>
    <style:style style:name="T295" style:family="text">
      <style:text-properties fo:font-size="14pt" fo:letter-spacing="-0.0016in" fo:font-weight="bold" style:font-size-asian="14pt" style:font-weight-asian="bold"/>
    </style:style>
    <style:style style:name="T296" style:family="text">
      <style:text-properties fo:letter-spacing="-0.0118in"/>
    </style:style>
    <style:style style:name="T297" style:family="text">
      <style:text-properties style:font-name="Calibri" fo:font-size="13pt" style:font-size-asian="13pt"/>
    </style:style>
    <style:style style:name="T298" style:family="text">
      <style:text-properties style:font-name="Calibri" fo:font-size="13pt" fo:letter-spacing="-0.0071in" style:font-size-asian="13pt"/>
    </style:style>
    <style:style style:name="T299" style:family="text">
      <style:text-properties style:font-name="Calibri" fo:font-size="13pt" fo:letter-spacing="-0.0047in" style:font-size-asian="13pt"/>
    </style:style>
    <style:style style:name="T300" style:family="text">
      <style:text-properties style:font-name="Calibri" fo:font-size="13pt" fo:letter-spacing="-0.0035in" style:font-size-asian="13pt"/>
    </style:style>
    <style:style style:name="T301" style:family="text">
      <style:text-properties style:font-name="Calibri" fo:font-size="13pt" fo:letter-spacing="-0.0055in" style:font-size-asian="13pt"/>
    </style:style>
    <style:style style:name="T302" style:family="text">
      <style:text-properties style:font-name="Calibri" fo:font-size="13pt" fo:letter-spacing="-0.0028in" style:font-size-asian="13pt"/>
    </style:style>
    <style:style style:name="T303" style:family="text">
      <style:text-properties style:font-name="Calibri" fo:font-size="13pt" fo:letter-spacing="-0.0043in" style:font-size-asian="13pt"/>
    </style:style>
    <style:style style:name="T304" style:family="text">
      <style:text-properties style:font-name="Calibri" fo:font-size="13pt" fo:letter-spacing="-0.0016in" style:font-size-asian="13pt"/>
    </style:style>
    <style:style style:name="T305" style:family="text">
      <style:text-properties style:font-name="Calibri" fo:font-size="13pt" fo:letter-spacing="-0.0083in" style:font-size-asian="13pt"/>
    </style:style>
    <style:style style:name="T306" style:family="text">
      <style:text-properties style:font-name="Calibri" fo:font-size="13pt" fo:letter-spacing="-0.0075in" style:font-size-asian="13pt"/>
    </style:style>
    <style:style style:name="T307" style:family="text">
      <style:text-properties style:font-name="Calibri" fo:font-size="13pt" fo:letter-spacing="-0.0102in" style:font-size-asian="13pt"/>
    </style:style>
    <style:style style:name="T308" style:family="text">
      <style:text-properties style:font-name="Calibri" fo:font-size="13pt" fo:letter-spacing="-0.0091in" style:font-size-asian="13pt"/>
    </style:style>
    <style:style style:name="T309" style:family="text">
      <style:text-properties style:font-name="Calibri" fo:font-size="13pt" fo:letter-spacing="-0.0063in" style:font-size-asian="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16452*" fo:start-indent="0in" fo:end-indent="0.0201in"/>
          <style:column style:rel-width="49083*" fo:start-indent="0.0201in" fo:end-indent="0in"/>
        </style:columns>
      </style:section-properties>
    </style:style>
    <style:style style:name="Sect3" style:family="section">
      <style:section-properties style:editable="false">
        <style:columns fo:column-count="2">
          <style:column style:rel-width="17134*" fo:start-indent="0in" fo:end-indent="0.0965in"/>
          <style:column style:rel-width="48401*" fo:start-indent="0.0965in" fo:end-indent="0in"/>
        </style:columns>
      </style:section-properties>
    </style:style>
    <style:style style:name="Sect4" style:family="section">
      <style:section-properties style:editable="false">
        <style:columns fo:column-count="2">
          <style:column style:rel-width="16694*" fo:start-indent="0in" fo:end-indent="0.0138in"/>
          <style:column style:rel-width="48841*" fo:start-indent="0.013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063in" fo:text-indent="-0.25in" fo:margin-left="0.60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style>
    <style:style style:name="gr1" style:family="graphic">
      <style:graphic-properties draw:stroke="solid" svg:stroke-width="0.0209in" svg:stroke-color="#000000" draw:fill="none" loext:fill-use-slide-background="false" draw:textarea-vertical-align="top" draw:auto-grow-height="false" fo:min-height="0in" fo:min-width="6.9701in" fo:padding-top="0.0492in" fo:padding-bottom="0.0492in" fo:padding-left="0.0984in" fo:padding-right="0.0984in" fo:wrap-option="wrap" loext:decorative="false" fo:margin-left="-0.0102in" fo:margin-right="-0.011in" fo:margin-top="0in" fo:margin-bottom="0in"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0008in" fo:margin-right="-0.0126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style style:name="gr4" style:family="graphic">
      <style:graphic-properties draw:stroke="solid" svg:stroke-width="0.0417in" svg:stroke-color="#000000" draw:fill="none" loext:fill-use-slide-background="false" draw:textarea-vertical-align="top" draw:auto-grow-height="false" fo:min-height="2.8071in" fo:min-width="7.2362in" fo:padding-top="0in" fo:padding-bottom="0in" fo:padding-left="0in" fo:padding-right="0in" fo:wrap-option="wrap" loext:decorative="false" style:run-through="background"/>
    </style:style>
    <style:style style:name="gr5" style:family="graphic">
      <style:graphic-properties draw:stroke="solid" svg:stroke-width="0.0417in" svg:stroke-color="#000000" draw:fill="none" loext:fill-use-slide-background="false" draw:textarea-vertical-align="top" draw:auto-grow-height="false" fo:min-height="2.0173in" fo:min-width="0.3327in" fo:padding-top="0in" fo:padding-bottom="0in" fo:padding-left="0in" fo:padding-right="0in" fo:wrap-option="wrap" loext:decorative="false" style:run-through="background"/>
    </style:style>
    <style:style style:name="gr6" style:family="graphic" style:parent-style-name="Frame">
      <style:graphic-properties draw:stroke="none" svg:stroke-width="0in" draw:fill="solid" draw:fill-color="#ffffff" draw:textarea-vertical-align="top" draw:auto-grow-height="false" fo:min-height="1.9543in" fo:min-width="6.4839in" fo:padding-top="0in" fo:padding-bottom="0in" fo:padding-left="0in" fo:padding-right="0in" fo:wrap-option="wrap" loext:decorative="false" style:run-through="background"/>
    </style:style>
    <style:style style:name="gr7" style:family="graphic">
      <style:graphic-properties draw:stroke="solid" svg:stroke-width="0.0209in" svg:stroke-color="#000000" draw:fill="none" loext:fill-use-slide-background="false" draw:textarea-vertical-align="top" draw:auto-grow-height="false" fo:min-height="0in" fo:min-width="6.9701in" fo:padding-top="0.0492in" fo:padding-bottom="0.0492in" fo:padding-left="0.0984in" fo:padding-right="0.0984in" fo:wrap-option="wrap" loext:decorative="false" fo:margin-left="-0.0102in" fo:margin-right="-0.011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8" style:family="graphic" style:parent-style-name="Frame">
      <style:graphic-properties draw:stroke="none" svg:stroke-width="0in" draw:fill="none" loext:fill-use-slide-background="false" draw:textarea-vertical-align="top" draw:auto-grow-height="false" fo:min-height="0.1819in" fo:min-width="0.18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in" draw:fill="none" loext:fill-use-slide-background="false" draw:textarea-vertical-align="top" draw:auto-grow-height="false" fo:min-height="0.1819in" fo:min-width="0.18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2" text:anchor-type="char" svg:x="6.202in" svg:y="0.061in" svg:width="1.0047in" svg:height="0.7535in" draw:z-index="94"><draw:image xlink:href="Pictures/1000000100000100000000C02D29C7E4.png" xlink:type="simple" xlink:show="embed" xlink:actuate="onLoad" draw:mime-type="image/png"/></draw:frame></text:p>
        <text:p text:style-name="P2" loext:marker-style-name="T2"><text:span text:style-name="T3"/></text:p>
        <text:p text:style-name="P3" loext:marker-style-name="T2"><text:span text:style-name="T4"/></text:p>
        <text:p text:style-name="P4" loext:marker-style-name="T2"><text:span text:style-name="T2"><text:s/></text:span><text:span text:style-name="T3"/></text:p>
        <text:p text:style-name="P5" loext:marker-style-name="T5"/>
        <text:p text:style-name="P6" loext:marker-style-name="T6"/>
        <text:p text:style-name="P7" loext:marker-style-name="T6"><draw:custom-shape text:anchor-type="char" draw:z-index="0" draw:name="Graphic 3" draw:style-name="gr1" draw:text-style-name="P8" svg:width="7.1669in" svg:height="0.0016in" svg:x="0.1126in" svg:y="0.0134in"><text:p/><draw:enhanced-geometry draw:mirror-horizontal="false" draw:mirror-vertical="false" svg:viewBox="0 0 0 0" drawooo:sub-view-size="6553200 0" draw:text-areas="0 0 ?f0 ?f1" draw:type="ooxml-non-primitive" draw:enhanced-path="M 0 0 L 6553200 0 N"><draw:equation draw:name="f0" draw:formula="logwidth"/><draw:equation draw:name="f1" draw:formula="logheight"/></draw:enhanced-geometry></draw:custom-shape></text:p>
        <text:p text:style-name="P9" loext:marker-style-name="T7"><text:span text:style-name="T7">Rapport</text:span><text:span text:style-name="T8"> </text:span><text:span text:style-name="T7">de</text:span><text:span text:style-name="T8"> </text:span><text:span text:style-name="T7">Projet</text:span><text:span text:style-name="T8"> </text:span><text:span text:style-name="T9"><text:s/></text:span><text:span text:style-name="T7"><text:s/></text:span></text:p>
        <text:p text:style-name="P10" loext:marker-style-name="T10"><draw:g text:anchor-type="char" draw:z-index="1" draw:name="Group 4" draw:style-name="gr2"><draw:frame draw:name="Image 5" draw:style-name="gr3" draw:text-style-name="P8" svg:width="7.2787in" svg:height="2.8512in" svg:x="0.5047in" svg:y="0.3756in"><draw:image xlink:href="Pictures/10000001000005AE0000021CA0F0A1A3.png" xlink:type="simple" xlink:show="embed" xlink:actuate="onLoad" draw:mime-type="image/png"><text:p/></draw:image></draw:frame><draw:custom-shape draw:name="Graphic 6" draw:style-name="gr4" draw:text-style-name="P11" svg:width="7.2358in" svg:height="2.8067in" svg:x="0.5138in" svg:y="0.3701in"><text:p/><draw:enhanced-geometry draw:mirror-horizontal="false" draw:mirror-vertical="false" svg:viewBox="0 0 0 0" drawooo:sub-view-size="6604634 2426970 6604634 2426970" draw:text-areas="0 0 ?f0 ?f1" draw:type="ooxml-non-primitive" draw:enhanced-path="M 12 455041 L 7745 407070 29277 365409 62113 332557 103753 311012 151701 303275 6300609 303275 6300609 151638 6308346 103680 6329890 62051 6362743 29236 6404404 7723 6452374 0 6500283 7723 6541906 29236 6574739 62051 6596276 103680 6604012 151638 6604012 1971929 6596276 2019837 6574739 2061460 6541906 2094294 6500283 2115831 6452374 2123567 303377 2123567 303377 2275205 295645 2323175 274112 2364836 241277 2397688 199636 2419233 151688 2426970 103745 2419233 62106 2397688 29268 2364836 7733 2323175 0 2275205 12 455041 Z N M 6300609 303275 L 6452374 303275 6500283 295552 6541906 274039 6574739 241224 6596276 199595 6604012 151638 N"><draw:equation draw:name="f0" draw:formula="logwidth"/><draw:equation draw:name="f1" draw:formula="logheight"/></draw:enhanced-geometry></draw:custom-shape><draw:frame draw:name="Image 7" draw:style-name="gr3" draw:text-style-name="P8" svg:width="0.2079in" svg:height="0.2189in" svg:x="7.3957in" svg:y="0.5236in"><draw:image xlink:href="Pictures/10000001000000270000002727B97039.png" xlink:type="simple" xlink:show="embed" xlink:actuate="onLoad" draw:mime-type="image/png"><text:p/></draw:image></draw:frame><draw:custom-shape draw:name="Graphic 8" draw:style-name="gr5" draw:text-style-name="P11" svg:width="0.3323in" svg:height="2.0169in" svg:x="0.5138in" svg:y="0.8098in"><text:p/><draw:enhanced-geometry draw:mirror-horizontal="false" draw:mirror-vertical="false" svg:viewBox="0 0 0 0" drawooo:sub-view-size="303530 1744345 303530 1744345" draw:text-areas="0 0 ?f0 ?f1" draw:type="ooxml-non-primitive" draw:enhanced-path="M 151701 227457 L 151701 75819 173916 22193 227545 0 257064 5953 281168 22193 297418 46291 303377 75819 295645 123727 274112 165350 241277 198184 199636 219721 151688 227457 103745 219721 62106 198184 29268 165350 7733 123727 0 75819 N M 303377 75819 L 303377 1744345 N"><draw:equation draw:name="f0" draw:formula="logwidth"/><draw:equation draw:name="f1" draw:formula="logheight"/></draw:enhanced-geometry></draw:custom-shape><draw:custom-shape draw:name="Textbox 9" draw:style-name="gr6" draw:text-style-name="P13" svg:width="6.4835in" svg:height="1.9539in" svg:x="1.0004in" svg:y="0.8709in"><text:p text:style-name="P12" loext:marker-style-name="T11"><text:span text:style-name="T11">Prédiction de la perte de </text:span><text:span text:style-name="T12">client</text:span><text:span text:style-name="T13"> </text:span><text:span text:style-name="T12">dans</text:span><text:span text:style-name="T13"> </text:span><text:span text:style-name="T12">le</text:span><text:span text:style-name="T13"> </text:span><text:span text:style-name="T12">domaine</text:span><text:span text:style-name="T13"> </text:span><text:span text:style-name="T12">de Télé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text:span text:style-name="T14">Réalisé</text:span><text:span text:style-name="T15"> </text:span><text:span text:style-name="T14">par</text:span><text:span text:style-name="T16"> </text:span><text:span text:style-name="T17">:</text:span></text:p>
        <text:p text:style-name="P15" loext:marker-style-name="T18"/>
        <text:p text:style-name="P16" loext:marker-style-name="T18"><text:span text:style-name="T19">Anas Haddou</text:span><text:span text:style-name="T18"><text:tab/></text:span><text:span text:style-name="T20">Mohamed</text:span><text:span text:style-name="T21"> </text:span><text:span text:style-name="T20">amine</text:span><text:span text:style-name="T22"> </text:span><text:span text:style-name="T23">tayek</text:span></text:p>
        <text:p text:style-name="P17" loext:marker-style-name="T18"/>
        <text:p text:style-name="P17" loext:marker-style-name="T18"/>
        <text:p text:style-name="Title"><text:span text:style-name="T14">Encadré</text:span><text:span text:style-name="T24"> </text:span><text:span text:style-name="T14">par</text:span><text:span text:style-name="T25"> </text:span><text:span text:style-name="T17">:</text:span></text:p>
        <text:p text:style-name="P18" loext:marker-style-name="T18"><text:span text:style-name="T26">Prof.</text:span><text:span text:style-name="T27"> </text:span><text:span text:style-name="T28">Noureddine Mohtaram</text:span></text:p>
        <text:p text:style-name="P19" loext:marker-style-name="T29"/>
        <text:p text:style-name="P19" loext:marker-style-name="T29"/>
        <text:p text:style-name="P19" loext:marker-style-name="T29"/>
        <text:p text:style-name="P19" loext:marker-style-name="T29"/>
        <text:p text:style-name="P19" loext:marker-style-name="T29"/>
        <text:p text:style-name="P19" loext:marker-style-name="T29"/>
        <text:h text:style-name="P20" text:outline-level="5" loext:marker-style-name="T30"><text:span text:style-name="T30">Année</text:span><text:span text:style-name="T31"> </text:span><text:span text:style-name="T30">Universitaire</text:span><text:span text:style-name="T32"> </text:span><text:span text:style-name="T30">:</text:span><text:span text:style-name="T33"> </text:span><text:span text:style-name="T30">20</text:span><text:span text:style-name="T34">25</text:span><text:span text:style-name="T30">-</text:span><text:span text:style-name="T35">202</text:span><text:span text:style-name="T36">6</text:span></text:h>
        <text:p text:style-name="P10" loext:marker-style-name="T10"/>
        <text:p text:style-name="P10" loext:marker-style-name="T10"><draw:custom-shape text:anchor-type="char" draw:z-index="2" draw:name="Graphic 10" draw:style-name="gr7" draw:text-style-name="P8" svg:width="7.1669in" svg:height="0.0016in" svg:x="0.5575in" svg:y="0.1866in"><text:p/><draw:enhanced-geometry draw:mirror-horizontal="false" draw:mirror-vertical="false" svg:viewBox="0 0 0 0" drawooo:sub-view-size="6553200 0" draw:text-areas="0 0 ?f0 ?f1" draw:type="ooxml-non-primitive" draw:enhanced-path="M 0 0 L 6553200 0 N"><draw:equation draw:name="f0" draw:formula="logwidth"/><draw:equation draw:name="f1" draw:formula="logheight"/></draw:enhanced-geometry></draw:custom-shape></text:p>
        <text:p text:style-name="P21" loext:marker-style-name="T37"><text:soft-page-break/></text:p>
        <text:p text:style-name="P22"><text:bookmark text:name="_bookmark0"/>Table<text:span text:style-name="T38"> </text:span>des<text:span text:style-name="T38"> </text:span><text:span text:style-name="T39">matières</text:span></text:p>
      </text:section>
      <text:section text:style-name="Sect1" text:name="Section1">
        <text:p text:style-name="P23"><text:a xlink:type="simple" xlink:href="#_bookmark0" text:style-name="ListLabel_20_314" text:visited-style-name="ListLabel_20_314">Table<text:span text:style-name="T39"> </text:span>des<text:span text:style-name="T40"> </text:span><text:span text:style-name="T39">matières</text:span><text:tab/><text:span text:style-name="T41">2</text:span></text:a></text:p>
        <text:p text:style-name="P24"><text:a xlink:type="simple" xlink:href="#_bookmark1" text:style-name="ListLabel_20_314" text:visited-style-name="ListLabel_20_314">Résumé<text:span text:style-name="T39"> (français)</text:span><text:tab/><text:span text:style-name="T41">4</text:span></text:a></text:p>
        <text:p text:style-name="P25"><text:a xlink:type="simple" xlink:href="#_bookmark2" text:style-name="ListLabel_20_314" text:visited-style-name="ListLabel_20_314">Résumé<text:span text:style-name="T39"> (anglais)</text:span><text:tab/><text:span text:style-name="T41">5</text:span></text:a></text:p>
        <text:p text:style-name="P26"><text:a xlink:type="simple" xlink:href="#_bookmark3" text:style-name="ListLabel_20_314" text:visited-style-name="ListLabel_20_314"><text:span text:style-name="T39">Dédicaces</text:span><text:tab/><text:span text:style-name="T41">6</text:span></text:a></text:p>
        <text:p text:style-name="P27"><text:a xlink:type="simple" xlink:href="#_bookmark4" text:style-name="ListLabel_20_314" text:visited-style-name="ListLabel_20_314"><text:span text:style-name="T39">Remerciements</text:span><text:tab/><text:span text:style-name="T41">7</text:span></text:a></text:p>
        <text:p text:style-name="P26"><text:a xlink:type="simple" xlink:href="#_bookmark5" text:style-name="ListLabel_20_314" text:visited-style-name="ListLabel_20_314">Table<text:span text:style-name="T39"> </text:span>des<text:span text:style-name="T40"> </text:span><text:span text:style-name="T39">figures</text:span><text:tab/><text:span text:style-name="T41">8</text:span></text:a></text:p>
        <text:p text:style-name="P24"><text:a xlink:type="simple" xlink:href="#_bookmark6" text:style-name="ListLabel_20_314" text:visited-style-name="ListLabel_20_314">Liste<text:span text:style-name="T40"> </text:span>des<text:span text:style-name="T42"> </text:span><text:span text:style-name="T39">tableaux</text:span><text:tab/><text:span text:style-name="T41">9</text:span></text:a></text:p>
        <text:p text:style-name="P28"><text:a xlink:type="simple" xlink:href="#_bookmark7" text:style-name="ListLabel_20_316" text:visited-style-name="ListLabel_20_316"><text:span text:style-name="T39">Abréviations</text:span><text:tab/><text:span text:style-name="T43">10</text:span></text:a></text:p>
        <text:p text:style-name="P29"><text:a xlink:type="simple" xlink:href="#_bookmark8" text:style-name="ListLabel_20_316" text:visited-style-name="ListLabel_20_316">Introduction<text:span text:style-name="T38"> </text:span><text:span text:style-name="T39">générale</text:span><text:tab/><text:span text:style-name="T43">11</text:span></text:a></text:p>
        <text:p text:style-name="P30"><text:a xlink:type="simple" xlink:href="#_bookmark9" text:style-name="ListLabel_20_316" text:visited-style-name="ListLabel_20_316">CHAPITRE<text:span text:style-name="T44"> </text:span>1<text:span text:style-name="T38"> </text:span>:<text:span text:style-name="T45"> </text:span>CADRE<text:span text:style-name="T44"> </text:span>GENERAL<text:span text:style-name="T41"> </text:span>DU<text:span text:style-name="T45"> </text:span><text:span text:style-name="T39">PROJET</text:span><text:tab/><text:span text:style-name="T43">12</text:span></text:a></text:p>
        <text:list text:style-name="WWNum1">
          <text:list-item>
            <text:list>
              <text:list-item>
                <text:p text:style-name="P31" loext:marker-style-name="T30"><text:a xlink:type="simple" xlink:href="#_bookmark10" text:style-name="ListLabel_20_320" text:visited-style-name="ListLabel_20_320"><text:span text:style-name="T39">Introduction</text:span><text:tab/><text:span text:style-name="T32">12</text:span></text:a></text:p>
              </text:list-item>
              <text:list-item>
                <text:p text:style-name="P31" loext:marker-style-name="T30"><text:a xlink:type="simple" xlink:href="#_bookmark11" text:style-name="ListLabel_20_320" text:visited-style-name="ListLabel_20_320">Problématique<text:span text:style-name="T46"> </text:span>et<text:span text:style-name="T47"> </text:span><text:span text:style-name="T39">Enjeux</text:span><text:tab/><text:span text:style-name="T32">12</text:span></text:a></text:p>
              </text:list-item>
              <text:list-item>
                <text:p text:style-name="P32" loext:marker-style-name="T30"><text:a xlink:type="simple" xlink:href="#_bookmark13" text:style-name="ListLabel_20_320" text:visited-style-name="ListLabel_20_320">Objectifs<text:span text:style-name="T41"> </text:span>spécifiques<text:span text:style-name="T43"> </text:span>du<text:span text:style-name="T44"> </text:span><text:span text:style-name="T39">projet</text:span><text:tab/><text:span text:style-name="T32">12</text:span></text:a></text:p>
              </text:list-item>
              <text:list-item>
                <text:p text:style-name="P31" loext:marker-style-name="T30"><text:a xlink:type="simple" xlink:href="#_bookmark14" text:style-name="ListLabel_20_320" text:visited-style-name="ListLabel_20_320">Solution<text:span text:style-name="T47"> </text:span><text:span text:style-name="T39">proposée</text:span><text:tab/><text:span text:style-name="T32">13</text:span></text:a></text:p>
              </text:list-item>
              <text:list-item>
                <text:p text:style-name="P32" loext:marker-style-name="T30"><text:a xlink:type="simple" xlink:href="#_bookmark16" text:style-name="ListLabel_20_320" text:visited-style-name="ListLabel_20_320">Planification<text:span text:style-name="T46"> </text:span>générale<text:span text:style-name="T46"> </text:span>du<text:span text:style-name="T43"> </text:span><text:span text:style-name="T39">projet</text:span><text:tab/><text:span text:style-name="T32">13</text:span></text:a></text:p>
              </text:list-item>
              <text:list-item>
                <text:p text:style-name="P31" loext:marker-style-name="T30"><text:a xlink:type="simple" xlink:href="#_bookmark18" text:style-name="ListLabel_20_320" text:visited-style-name="ListLabel_20_320">Risques<text:span text:style-name="T43"> </text:span>et<text:span text:style-name="T47"> </text:span>Mesures<text:span text:style-name="T39"> d'Atténuation</text:span><text:tab/><text:span text:style-name="T32">14</text:span></text:a></text:p>
              </text:list-item>
              <text:list-item>
                <text:p text:style-name="P32" loext:marker-style-name="T30"><text:a xlink:type="simple" xlink:href="#_bookmark19" text:style-name="ListLabel_20_320" text:visited-style-name="ListLabel_20_320"><text:span text:style-name="T39">Conclusion</text:span><text:tab/><text:span text:style-name="T32">14</text:span></text:a></text:p>
              </text:list-item>
            </text:list>
          </text:list-item>
        </text:list>
        <text:p text:style-name="P33"><text:a xlink:type="simple" xlink:href="#_bookmark20" text:style-name="ListLabel_20_316" text:visited-style-name="ListLabel_20_316">CHAPITRE<text:span text:style-name="T38"> </text:span>2<text:span text:style-name="T41"> </text:span>:<text:span text:style-name="T44"> </text:span>ÉLABORATION<text:span text:style-name="T41"> </text:span>DU<text:span text:style-name="T44"> </text:span>CAHIER<text:span text:style-name="T48"> </text:span>DE<text:span text:style-name="T48"> </text:span><text:span text:style-name="T39">CHARGE</text:span><text:tab/><text:span text:style-name="T43">15</text:span></text:a></text:p>
        <text:list text:style-name="WWNum2">
          <text:list-item>
            <text:list>
              <text:list-item>
                <text:p text:style-name="P34" loext:marker-style-name="T30"><text:a xlink:type="simple" xlink:href="#_bookmark21" text:style-name="ListLabel_20_320" text:visited-style-name="ListLabel_20_320"><text:span text:style-name="T39">Introduction</text:span><text:tab/><text:span text:style-name="T32">15</text:span></text:a></text:p>
              </text:list-item>
              <text:list-item>
                <text:p text:style-name="P35" loext:marker-style-name="T30"><text:a xlink:type="simple" xlink:href="#_bookmark22" text:style-name="ListLabel_20_320" text:visited-style-name="ListLabel_20_320">Étude<text:span text:style-name="T39"> </text:span>de<text:span text:style-name="T39"> l'existence</text:span><text:tab/><text:span text:style-name="T32">15</text:span></text:a></text:p>
              </text:list-item>
              <text:list-item>
                <text:p text:style-name="P34" loext:marker-style-name="T30"><text:a xlink:type="simple" xlink:href="#_bookmark26" text:style-name="ListLabel_20_320" text:visited-style-name="ListLabel_20_320">Identification<text:span text:style-name="T45"> </text:span>des<text:span text:style-name="T47"> </text:span>Besoins<text:span text:style-name="T43"> </text:span>Fonctionnels<text:span text:style-name="T47"> </text:span>et<text:span text:style-name="T47"> </text:span>Non<text:span text:style-name="T47"> </text:span><text:span text:style-name="T39">Fonctionnels</text:span><text:tab/><text:span text:style-name="T32">16</text:span></text:a></text:p>
              </text:list-item>
              <text:list-item>
                <text:p text:style-name="P35" loext:marker-style-name="T30"><text:a xlink:type="simple" xlink:href="#_bookmark27" text:style-name="ListLabel_20_320" text:visited-style-name="ListLabel_20_320">Cahier<text:span text:style-name="T39"> </text:span>de<text:span text:style-name="T40"> </text:span>charges<text:span text:style-name="T40"> </text:span>(exigences<text:span text:style-name="T43"> </text:span>de<text:span text:style-name="T40"> </text:span>deux<text:span text:style-name="T40"> </text:span>parties<text:span text:style-name="T40"> </text:span>:<text:span text:style-name="T47"> </text:span>admin<text:span text:style-name="T40"> </text:span>et<text:span text:style-name="T42"> </text:span><text:span text:style-name="T39">décideur)</text:span><text:tab/><text:span text:style-name="T32">17</text:span></text:a></text:p>
              </text:list-item>
              <text:list-item>
                <text:p text:style-name="P34" loext:marker-style-name="T30"><text:a xlink:type="simple" xlink:href="#_bookmark28" text:style-name="ListLabel_20_320" text:visited-style-name="ListLabel_20_320"><text:span text:style-name="T39">Conclusion</text:span><text:tab/><text:span text:style-name="T32">17</text:span></text:a></text:p>
              </text:list-item>
            </text:list>
          </text:list-item>
        </text:list>
        <text:p text:style-name="P36"><text:a xlink:type="simple" xlink:href="#_bookmark29" text:style-name="ListLabel_20_316" text:visited-style-name="ListLabel_20_316">CHAPITRE<text:span text:style-name="T38"> </text:span>3<text:span text:style-name="T38"> </text:span>:<text:span text:style-name="T44"> </text:span>CONCEPTION<text:span text:style-name="T16"> </text:span>DE<text:span text:style-name="T44"> </text:span><text:span text:style-name="T39">L'APPLICATION</text:span><text:tab/><text:span text:style-name="T43">18</text:span></text:a></text:p>
        <text:list text:style-name="WWNum3">
          <text:list-item>
            <text:list>
              <text:list-item>
                <text:p text:style-name="P37" loext:marker-style-name="T30"><text:a xlink:type="simple" xlink:href="#_bookmark30" text:style-name="ListLabel_20_320" text:visited-style-name="ListLabel_20_320"><text:span text:style-name="T39">Introduction</text:span><text:tab/><text:span text:style-name="T32">18</text:span></text:a></text:p>
              </text:list-item>
              <text:list-item>
                <text:p text:style-name="P37" loext:marker-style-name="T30"><text:a xlink:type="simple" xlink:href="#_bookmark31" text:style-name="ListLabel_20_320" text:visited-style-name="ListLabel_20_320">Cycle<text:span text:style-name="T40"> </text:span>de<text:span text:style-name="T39"> </text:span>vie<text:span text:style-name="T40"> </text:span>de<text:span text:style-name="T39"> </text:span>notre<text:span text:style-name="T39"> projet</text:span><text:tab/><text:span text:style-name="T32">18</text:span></text:a></text:p>
              </text:list-item>
              <text:list-item>
                <text:p text:style-name="P38" loext:marker-style-name="T30"><text:a xlink:type="simple" xlink:href="#_bookmark33" text:style-name="ListLabel_20_320" text:visited-style-name="ListLabel_20_320">Architecture<text:span text:style-name="T45"> </text:span>globale<text:span text:style-name="T47"> </text:span>du<text:span text:style-name="T46"> </text:span><text:span text:style-name="T39">modèle</text:span><text:tab/><text:span text:style-name="T32">19</text:span></text:a></text:p>
              </text:list-item>
              <text:list-item>
                <text:p text:style-name="P39" loext:marker-style-name="T30"><text:a xlink:type="simple" xlink:href="#_bookmark35" text:style-name="ListLabel_20_320" text:visited-style-name="ListLabel_20_320">Data<text:span text:style-name="T43"> set</text:span><text:tab/><text:span text:style-name="T32">19</text:span></text:a></text:p>
              </text:list-item>
              <text:list-item>
                <text:p text:style-name="P38" loext:marker-style-name="T30"><text:a xlink:type="simple" xlink:href="#_bookmark37" text:style-name="ListLabel_20_320" text:visited-style-name="ListLabel_20_320">Choix<text:span text:style-name="T46"> </text:span>des<text:span text:style-name="T47"> </text:span>algorithmes<text:span text:style-name="T43"> </text:span>et<text:span text:style-name="T42"> </text:span><text:span text:style-name="T39">techniques</text:span><text:tab/><text:span text:style-name="T32">20</text:span></text:a></text:p>
              </text:list-item>
              <text:list-item>
                <text:p text:style-name="P37" loext:marker-style-name="T30"><text:a xlink:type="simple" xlink:href="#_bookmark38" text:style-name="ListLabel_20_320" text:visited-style-name="ListLabel_20_320">Interface<text:span text:style-name="T46"> </text:span><text:span text:style-name="T39">utilisateur</text:span><text:tab/><text:span text:style-name="T32">22</text:span></text:a></text:p>
              </text:list-item>
              <text:list-item>
                <text:p text:style-name="P40" loext:marker-style-name="T30"><text:a xlink:type="simple" xlink:href="#_bookmark40" text:style-name="ListLabel_20_320" text:visited-style-name="ListLabel_20_320"><text:span text:style-name="T39">Conclusion</text:span><text:tab/><text:span text:style-name="T32">22</text:span></text:a></text:p>
              </text:list-item>
            </text:list>
          </text:list-item>
        </text:list>
        <text:p text:style-name="P41"><text:a xlink:type="simple" xlink:href="#_bookmark42" text:style-name="ListLabel_20_316" text:visited-style-name="ListLabel_20_316"><text:span text:style-name="T39">CHAPITRE</text:span><text:span text:style-name="T42"> </text:span><text:span text:style-name="T39">4: DEVELOPPEMENT</text:span> <text:span text:style-name="T39">ET</text:span> <text:span text:style-name="T39">IMPLEMENTATION</text:span><text:tab/><text:span text:style-name="T43">23</text:span></text:a></text:p>
        <text:list text:style-name="WWNum4">
          <text:list-item>
            <text:list>
              <text:list-item>
                <text:p text:style-name="P42" loext:marker-style-name="T30"><text:a xlink:type="simple" xlink:href="#_bookmark43" text:style-name="ListLabel_20_320" text:visited-style-name="ListLabel_20_320"><text:span text:style-name="T39">Introduction</text:span><text:tab/><text:span text:style-name="T32">23</text:span></text:a></text:p>
              </text:list-item>
              <text:list-item>
                <text:p text:style-name="P43" loext:marker-style-name="T30"><text:a xlink:type="simple" xlink:href="#_bookmark44" text:style-name="ListLabel_20_320" text:visited-style-name="ListLabel_20_320">Compréhension<text:span text:style-name="T47"> </text:span>de<text:span text:style-name="T40"> </text:span>la<text:span text:style-name="T43"> </text:span><text:span text:style-name="T39">problématique</text:span><text:tab/><text:span text:style-name="T32">23</text:span></text:a></text:p>
              </text:list-item>
              <text:list-item>
                <text:p text:style-name="P44" loext:marker-style-name="T30"><text:a xlink:type="simple" xlink:href="#_bookmark45" text:style-name="ListLabel_20_320" text:visited-style-name="ListLabel_20_320">Compréhension<text:span text:style-name="T46"> </text:span>des<text:span text:style-name="T43"> </text:span><text:span text:style-name="T39">données</text:span><text:tab/><text:span text:style-name="T32">23</text:span></text:a></text:p>
              </text:list-item>
            </text:list>
          </text:list-item>
        </text:list>
        <text:list text:style-name="WWNum5">
          <text:list-item>
            <text:list>
              <text:list-item>
                <text:p text:style-name="P45" loext:marker-style-name="T30"><text:a xlink:type="simple" xlink:href="#_bookmark46" text:style-name="ListLabel_20_320" text:visited-style-name="ListLabel_20_320"><text:soft-page-break/>Préparation<text:span text:style-name="T43"> </text:span>des<text:span text:style-name="T47"> </text:span><text:span text:style-name="T39">données</text:span><text:tab/><text:span text:style-name="T32">23</text:span></text:a></text:p>
              </text:list-item>
            </text:list>
          </text:list-item>
        </text:list>
        <text:list text:style-name="WWNum6">
          <text:list-item>
            <text:list>
              <text:list-item>
                <text:p text:style-name="P46" loext:marker-style-name="T30"><text:a xlink:type="simple" xlink:href="#_bookmark48" text:style-name="ListLabel_20_320" text:visited-style-name="ListLabel_20_320"><text:span text:style-name="T39">Modélisation</text:span><text:tab/><text:span text:style-name="T32">25</text:span></text:a></text:p>
              </text:list-item>
            </text:list>
          </text:list-item>
        </text:list>
        <text:list text:style-name="WWNum7">
          <text:list-item>
            <text:list>
              <text:list-item>
                <text:p text:style-name="P47" loext:marker-style-name="T30"><text:a xlink:type="simple" xlink:href="#_bookmark49" text:style-name="ListLabel_20_320" text:visited-style-name="ListLabel_20_320"><text:span text:style-name="T39">Évaluation</text:span><text:tab/><text:span text:style-name="T32">25</text:span></text:a></text:p>
              </text:list-item>
              <text:list-item>
                <text:p text:style-name="P48" loext:marker-style-name="T30"><text:a xlink:type="simple" xlink:href="#_bookmark53" text:style-name="ListLabel_20_320" text:visited-style-name="ListLabel_20_320">Déploiement<text:span text:style-name="T47"> </text:span>du<text:span text:style-name="T46"> </text:span><text:span text:style-name="T39">Modèle</text:span><text:tab/><text:span text:style-name="T32">27</text:span></text:a></text:p>
              </text:list-item>
              <text:list-item>
                <text:p text:style-name="P47" loext:marker-style-name="T30"><text:a xlink:type="simple" xlink:href="#_bookmark54" text:style-name="ListLabel_20_320" text:visited-style-name="ListLabel_20_320"><text:span text:style-name="T39">Conclusion</text:span><text:tab/><text:span text:style-name="T32">27</text:span></text:a></text:p>
              </text:list-item>
            </text:list>
          </text:list-item>
        </text:list>
        <text:p text:style-name="P33"><text:a xlink:type="simple" xlink:href="#_bookmark55" text:style-name="ListLabel_20_316" text:visited-style-name="ListLabel_20_316">CHAPITRE<text:span text:style-name="T38"> </text:span>5<text:span text:style-name="T48"> </text:span>:<text:span text:style-name="T44"> </text:span>RESULTATS<text:span text:style-name="T41"> </text:span>ET<text:span text:style-name="T41"> </text:span><text:span text:style-name="T39">DISCUSSION</text:span><text:tab/><text:span text:style-name="T43">28</text:span></text:a></text:p>
        <text:list text:style-name="WWNum8">
          <text:list-item>
            <text:list>
              <text:list-item>
                <text:p text:style-name="P49" loext:marker-style-name="T30"><text:a xlink:type="simple" xlink:href="#_bookmark56" text:style-name="ListLabel_20_320" text:visited-style-name="ListLabel_20_320"><text:span text:style-name="T39">Introduction</text:span><text:tab/><text:span text:style-name="T32">28</text:span></text:a></text:p>
              </text:list-item>
              <text:list-item>
                <text:p text:style-name="P50" loext:marker-style-name="T30"><text:a xlink:type="simple" xlink:href="#_bookmark57" text:style-name="ListLabel_20_320" text:visited-style-name="ListLabel_20_320"><text:span text:style-name="T39">Résultats</text:span><text:tab/><text:span text:style-name="T32">28</text:span></text:a></text:p>
              </text:list-item>
              <text:list-item>
                <text:p text:style-name="P51" loext:marker-style-name="T30"><text:a xlink:type="simple" xlink:href="#_bookmark60" text:style-name="ListLabel_20_320" text:visited-style-name="ListLabel_20_320"><text:span text:style-name="T39">Discussion</text:span><text:tab/><text:span text:style-name="T32">29</text:span></text:a></text:p>
              </text:list-item>
              <text:list-item>
                <text:p text:style-name="P49" loext:marker-style-name="T30"><text:a xlink:type="simple" xlink:href="#_bookmark61" text:style-name="ListLabel_20_320" text:visited-style-name="ListLabel_20_320">Facteurs<text:span text:style-name="T47"> </text:span>Déterminants<text:span text:style-name="T43"> </text:span>de<text:span text:style-name="T40"> </text:span>la<text:span text:style-name="T40"> </text:span>Perte<text:span text:style-name="T40"> </text:span>de<text:span text:style-name="T40"> </text:span><text:span text:style-name="T39">Clients</text:span><text:tab/><text:span text:style-name="T32">29</text:span></text:a></text:p>
              </text:list-item>
            </text:list>
          </text:list-item>
        </text:list>
        <text:list text:style-name="WWNum9">
          <text:list-item>
            <text:list>
              <text:list-item>
                <text:p text:style-name="P52" loext:marker-style-name="T30"><text:a xlink:type="simple" xlink:href="#_bookmark62" text:style-name="ListLabel_20_320" text:visited-style-name="ListLabel_20_320"><text:span text:style-name="T39">Limitations</text:span><text:tab/><text:span text:style-name="T32">29</text:span></text:a></text:p>
              </text:list-item>
              <text:list-item>
                <text:p text:style-name="P53" loext:marker-style-name="T30"><text:a xlink:type="simple" xlink:href="#_bookmark64" text:style-name="ListLabel_20_320" text:visited-style-name="ListLabel_20_320">Pistes<text:span text:style-name="T47"> </text:span><text:span text:style-name="T39">d'Amélioration</text:span><text:tab/><text:span text:style-name="T32">30</text:span></text:a></text:p>
              </text:list-item>
              <text:list-item>
                <text:p text:style-name="P54" loext:marker-style-name="T30"><text:a xlink:type="simple" xlink:href="#_bookmark65" text:style-name="ListLabel_20_320" text:visited-style-name="ListLabel_20_320"><text:span text:style-name="T39">Conclusion</text:span><text:tab/><text:span text:style-name="T32">30</text:span></text:a></text:p>
              </text:list-item>
            </text:list>
          </text:list-item>
        </text:list>
        <text:p text:style-name="P29"><text:a xlink:type="simple" xlink:href="#_bookmark66" text:style-name="ListLabel_20_316" text:visited-style-name="ListLabel_20_316">Conclusion<text:span text:style-name="T44"> </text:span>et<text:span text:style-name="T40"> </text:span><text:span text:style-name="T39">perspectives</text:span><text:tab/><text:span text:style-name="T43">31</text:span></text:a></text:p>
        <text:p text:style-name="P28"><text:a xlink:type="simple" xlink:href="#_bookmark67" text:style-name="ListLabel_20_316" text:visited-style-name="ListLabel_20_316">Bibliographie<text:span text:style-name="T46"> </text:span>&amp;<text:span text:style-name="T46"> </text:span><text:span text:style-name="T39">Webographie</text:span><text:tab/><text:span text:style-name="T43">32</text:span></text:a></text:p>
      </text:section>
      <text:h text:style-name="P55" text:outline-level="2"><text:bookmark text:name="_bookmark1"/>Résumé<text:span text:style-name="T49"> </text:span><text:span text:style-name="T39">(français)</text:span></text:h>
      <text:p text:style-name="P56" loext:marker-style-name="T50"/>
      <text:p text:style-name="P57" loext:marker-style-name="T51"><text:span text:style-name="T52">La</text:span><text:span text:style-name="T53"> </text:span><text:span text:style-name="T52">perte</text:span><text:span text:style-name="T53"> </text:span><text:span text:style-name="T52">de</text:span><text:span text:style-name="T53"> </text:span><text:span text:style-name="T52">cliente le</text:span><text:span text:style-name="T53"> </text:span><text:span text:style-name="T52">represente</text:span><text:span text:style-name="T53"> </text:span><text:span text:style-name="T52">un</text:span><text:span text:style-name="T54"> </text:span><text:span text:style-name="T52">d</text:span><text:span text:style-name="T55">é</text:span><text:span text:style-name="T52">fi</text:span><text:span text:style-name="T53"> </text:span><text:span text:style-name="T52">majeur</text:span><text:span text:style-name="T54"> </text:span><text:span text:style-name="T52">pour</text:span><text:span text:style-name="T54"> </text:span><text:span text:style-name="T52">les</text:span><text:span text:style-name="T54"> </text:span><text:span text:style-name="T52">grandes</text:span><text:span text:style-name="T54"> </text:span><text:span text:style-name="T52">entreprises, notamment</text:span><text:span text:style-name="T56"> </text:span><text:span text:style-name="T52">dans</text:span><text:span text:style-name="T56"> </text:span><text:span text:style-name="T52">le</text:span><text:span text:style-name="T57"> </text:span><text:span text:style-name="T52">secteur</text:span><text:span text:style-name="T56"> </text:span><text:span text:style-name="T52">des</text:span><text:span text:style-name="T56"> </text:span><text:span text:style-name="T52">te´le´communications,</text:span><text:span text:style-name="T56"> </text:span><text:span text:style-name="T52">en</text:span><text:span text:style-name="T56"> </text:span><text:span text:style-name="T52">raison</text:span><text:span text:style-name="T56"> </text:span><text:span text:style-name="T52">de</text:span><text:span text:style-name="T57"> </text:span><text:span text:style-name="T52">son</text:span><text:span text:style-name="T56"> </text:span><text:span text:style-name="T52">impact </text:span><text:span text:style-name="T58">direct</text:span><text:span text:style-name="T53"> </text:span><text:span text:style-name="T58">sur</text:span><text:span text:style-name="T53"> </text:span><text:span text:style-name="T58">les</text:span><text:span text:style-name="T53"> </text:span><text:span text:style-name="T58">revenus.</text:span><text:span text:style-name="T53"> </text:span><text:span text:style-name="T58">Dans</text:span><text:span text:style-name="T59"> </text:span><text:span text:style-name="T58">ce</text:span><text:span text:style-name="T60"> </text:span><text:span text:style-name="T58">contexte,</text:span><text:span text:style-name="T53"> </text:span><text:span text:style-name="T58">la</text:span><text:span text:style-name="T60"> </text:span><text:span text:style-name="T58">pr</text:span><text:span text:style-name="T61">é</text:span><text:span text:style-name="T58">diction</text:span><text:span text:style-name="T53"> </text:span><text:span text:style-name="T58">du</text:span><text:span text:style-name="T54"> </text:span><text:span text:style-name="T58">churn</text:span><text:span text:style-name="T53"> </text:span><text:span text:style-name="T58">des</text:span><text:span text:style-name="T53"> </text:span><text:span text:style-name="T58">clients</text:span><text:span text:style-name="T53"> </text:span><text:span text:style-name="T58">est </text:span><text:span text:style-name="T52">cruciale</text:span><text:span text:style-name="T53"> </text:span><text:span text:style-name="T52">pour</text:span><text:span text:style-name="T54"> </text:span><text:span text:style-name="T52">anticiper</text:span><text:span text:style-name="T54"> </text:span><text:span text:style-name="T52">et</text:span><text:span text:style-name="T54"> </text:span><text:span text:style-name="T52">pr</text:span><text:span text:style-name="T55">é</text:span><text:span text:style-name="T52">venir</text:span><text:span text:style-name="T54"> </text:span><text:span text:style-name="T52">cette</text:span><text:span text:style-name="T53"> </text:span><text:span text:style-name="T52">attrition.</text:span><text:span text:style-name="T54"> </text:span><text:span text:style-name="T52">Notre</text:span><text:span text:style-name="T53"> </text:span><text:span text:style-name="T52">travail</text:span><text:span text:style-name="T54"> </text:span><text:span text:style-name="T52">se</text:span><text:span text:style-name="T53"> </text:span><text:span text:style-name="T52">concentre</text:span><text:span text:style-name="T53"> </text:span><text:span text:style-name="T52">sur</text:span><text:span text:style-name="T54"> </text:span><text:span text:style-name="T52">le </text:span><text:span text:style-name="T62">d</text:span><text:span text:style-name="T63">é</text:span><text:span text:style-name="T62">veloppement</text:span><text:span text:style-name="T60"> </text:span><text:span text:style-name="T62">d'un</text:span><text:span text:style-name="T60"> </text:span><text:span text:style-name="T62">mod</text:span><text:span text:style-name="T63">è</text:span><text:span text:style-name="T62">le</text:span><text:span text:style-name="T64"> </text:span><text:span text:style-name="T62">de</text:span><text:span text:style-name="T64"> </text:span><text:span text:style-name="T62">pr</text:span><text:span text:style-name="T63">e</text:span><text:span text:style-name="T62">diction</text:span><text:span text:style-name="T60"> </text:span><text:span text:style-name="T62">du</text:span><text:span text:style-name="T53"> </text:span><text:span text:style-name="T62">taux</text:span><text:span text:style-name="T60"> </text:span><text:span text:style-name="T62">de</text:span><text:span text:style-name="T64"> </text:span><text:span text:style-name="T62">d</text:span><text:span text:style-name="T63">é</text:span><text:span text:style-name="T62">sabonnement,</text:span><text:span text:style-name="T60"> </text:span><text:span text:style-name="T62">visant</text:span><text:span text:style-name="T60"> </text:span><text:span text:style-name="T65">à</text:span><text:span text:style-name="T52"> aider</text:span><text:span text:style-name="T54"> </text:span><text:span text:style-name="T52">les</text:span><text:span text:style-name="T54"> </text:span><text:span text:style-name="T52">op</text:span><text:span text:style-name="T55">é</text:span><text:span text:style-name="T52">rateurs</text:span><text:span text:style-name="T54"> </text:span><text:span text:style-name="T52">de</text:span><text:span text:style-name="T53"> </text:span><text:span text:style-name="T52">te´le´communications</text:span><text:span text:style-name="T54"> </text:span><text:span text:style-name="T66">a`</text:span><text:span text:style-name="T67"> </text:span><text:span text:style-name="T52">identifier</text:span><text:span text:style-name="T54"> </text:span><text:span text:style-name="T52">les</text:span><text:span text:style-name="T54"> </text:span><text:span text:style-name="T52">clients</text:span><text:span text:style-name="T54"> </text:span><text:span text:style-name="T52">les</text:span><text:span text:style-name="T54"> </text:span><text:span text:style-name="T52">plus </text:span><text:span text:style-name="T68">susceptibles</text:span><text:span text:style-name="T54"> </text:span><text:span text:style-name="T68">de</text:span><text:span text:style-name="T53"> </text:span><text:span text:style-name="T68">partir.</text:span></text:p>
      <text:p text:style-name="P58" loext:marker-style-name="T51"/>
      <text:p text:style-name="P59" loext:marker-style-name="T51"><text:span text:style-name="T58">Pour</text:span><text:span text:style-name="T57"> </text:span><text:span text:style-name="T58">atteindre</text:span><text:span text:style-name="T62"> </text:span><text:span text:style-name="T58">cet</text:span><text:span text:style-name="T57"> </text:span><text:span text:style-name="T58">objectif,</text:span><text:span text:style-name="T57"> </text:span><text:span text:style-name="T58">nous</text:span><text:span text:style-name="T57"> </text:span><text:span text:style-name="T58">avons</text:span><text:span text:style-name="T57"> </text:span><text:span text:style-name="T58">mis</text:span><text:span text:style-name="T57"> </text:span><text:span text:style-name="T58">en</text:span><text:span text:style-name="T57"> </text:span><text:span text:style-name="T58">œuvre</text:span><text:span text:style-name="T62"> </text:span><text:span text:style-name="T58">plusieurs</text:span><text:span text:style-name="T57"> </text:span><text:span text:style-name="T58">algorithmes </text:span><text:span text:style-name="T62">d'apprentissage</text:span><text:span text:style-name="T53"> </text:span><text:span text:style-name="T62">supervise´</text:span><text:span text:style-name="T69"> </text:span><text:span text:style-name="T62">et</text:span><text:span text:style-name="T54"> </text:span><text:span text:style-name="T62">e´value´</text:span><text:span text:style-name="T69"> </text:span><text:span text:style-name="T62">leur</text:span><text:span text:style-name="T54"> </text:span><text:span text:style-name="T62">performance.</text:span><text:span text:style-name="T54"> </text:span><text:span text:style-name="T62">Notre</text:span><text:span text:style-name="T53"> </text:span><text:span text:style-name="T62">principale </text:span><text:span text:style-name="T52">contribution</text:span><text:span text:style-name="T64"> </text:span><text:span text:style-name="T52">consiste</text:span><text:span text:style-name="T70"> </text:span><text:span text:style-name="T66">a`</text:span><text:span text:style-name="T71"> </text:span><text:span text:style-name="T52">de´velopper</text:span><text:span text:style-name="T64"> </text:span><text:span text:style-name="T52">un</text:span><text:span text:style-name="T64"> </text:span><text:span text:style-name="T52">mode`le</text:span><text:span text:style-name="T70"> </text:span><text:span text:style-name="T52">performant</text:span><text:span text:style-name="T64"> </text:span><text:span text:style-name="T52">qui</text:span><text:span text:style-name="T70"> </text:span><text:span text:style-name="T52">se</text:span><text:span text:style-name="T70"> </text:span><text:span text:style-name="T52">base</text:span><text:span text:style-name="T70"> </text:span><text:span text:style-name="T52">sur </text:span><text:span text:style-name="T72">l'algorithme pre´sentant le meilleur taux de pre´cision. Ce mode`le permettra aux </text:span><text:span text:style-name="T62">ope´rateurs</text:span><text:span text:style-name="T57"> </text:span><text:span text:style-name="T62">de te´le´communications</text:span><text:span text:style-name="T57"> </text:span><text:span text:style-name="T62">de</text:span><text:span text:style-name="T56"> </text:span><text:span text:style-name="T62">prendre des</text:span><text:span text:style-name="T57"> </text:span><text:span text:style-name="T62">mesures</text:span><text:span text:style-name="T57"> </text:span><text:span text:style-name="T62">proactives</text:span><text:span text:style-name="T57"> </text:span><text:span text:style-name="T62">pour</text:span></text:p>
      <text:p text:style-name="P60" loext:marker-style-name="T51"><text:span text:style-name="T70">re´duire le churn</text:span><text:span text:style-name="T64"> </text:span><text:span text:style-name="T70">et</text:span><text:span text:style-name="T72"> </text:span><text:span text:style-name="T70">fide´liser leur</text:span><text:span text:style-name="T64"> </text:span><text:span text:style-name="T70">cliente`le.</text:span></text:p>
      <text:h text:style-name="P61" text:outline-level="3" loext:marker-style-name="T73"><text:bookmark text:name="_bookmark2"/><text:span text:style-name="T73">Résumé</text:span><text:span text:style-name="T74"> (anglais)</text:span></text:h>
      <text:p text:style-name="P62" loext:marker-style-name="T75"/>
      <text:p text:style-name="P63" loext:marker-style-name="T51"><text:span text:style-name="T58">Customer</text:span><text:span text:style-name="T62"> </text:span><text:span text:style-name="T58">churn</text:span><text:span text:style-name="T62"> </text:span><text:span text:style-name="T58">represents</text:span><text:span text:style-name="T62"> </text:span><text:span text:style-name="T58">a</text:span><text:span text:style-name="T76"> </text:span><text:span text:style-name="T58">significant</text:span><text:span text:style-name="T62"> </text:span><text:span text:style-name="T58">challenge</text:span><text:span text:style-name="T76"> </text:span><text:span text:style-name="T58">for</text:span><text:span text:style-name="T62"> </text:span><text:span text:style-name="T58">large</text:span><text:span text:style-name="T76"> </text:span><text:span text:style-name="T58">enterprises, particularly</text:span><text:span text:style-name="T64"> </text:span><text:span text:style-name="T58">in</text:span><text:span text:style-name="T59"> </text:span><text:span text:style-name="T58">the</text:span><text:span text:style-name="T56"> </text:span><text:span text:style-name="T58">telecommunications</text:span><text:span text:style-name="T59"> </text:span><text:span text:style-name="T58">sector,</text:span><text:span text:style-name="T59"> </text:span><text:span text:style-name="T58">due</text:span><text:span text:style-name="T64"> </text:span><text:span text:style-name="T58">to</text:span><text:span text:style-name="T70"> </text:span><text:span text:style-name="T58">its</text:span><text:span text:style-name="T59"> </text:span><text:span text:style-name="T58">direct</text:span><text:span text:style-name="T59"> </text:span><text:span text:style-name="T58">impact</text:span><text:span text:style-name="T59"> </text:span><text:span text:style-name="T58">on</text:span><text:span text:style-name="T59"> </text:span><text:span text:style-name="T58">revenue. </text:span><text:span text:style-name="T52">In</text:span><text:span text:style-name="T70"> </text:span><text:span text:style-name="T52">this</text:span><text:span text:style-name="T70"> </text:span><text:span text:style-name="T52">context,</text:span><text:span text:style-name="T70"> </text:span><text:span text:style-name="T52">predicting</text:span><text:span text:style-name="T56"> </text:span><text:span text:style-name="T52">customer</text:span><text:span text:style-name="T59"> </text:span><text:span text:style-name="T52">churn</text:span><text:span text:style-name="T70"> </text:span><text:span text:style-name="T52">is</text:span><text:span text:style-name="T57"> </text:span><text:span text:style-name="T52">crucial</text:span><text:span text:style-name="T70"> </text:span><text:span text:style-name="T52">for</text:span><text:span text:style-name="T70"> </text:span><text:span text:style-name="T52">anticipating</text:span><text:span text:style-name="T56"> </text:span><text:span text:style-name="T52">and</text:span><text:span text:style-name="T56"> </text:span><text:span text:style-name="T52">preventing </text:span><text:span text:style-name="T58">this</text:span><text:span text:style-name="T57"> </text:span><text:span text:style-name="T58">attrition.</text:span><text:span text:style-name="T57"> </text:span><text:span text:style-name="T58">Our</text:span><text:span text:style-name="T77"> </text:span><text:span text:style-name="T58">work</text:span><text:span text:style-name="T62"> </text:span><text:span text:style-name="T58">focuses</text:span><text:span text:style-name="T57"> </text:span><text:span text:style-name="T58">on</text:span><text:span text:style-name="T57"> </text:span><text:span text:style-name="T58">developing</text:span><text:span text:style-name="T62"> </text:span><text:span text:style-name="T58">a</text:span><text:span text:style-name="T62"> </text:span><text:span text:style-name="T58">churn</text:span><text:span text:style-name="T57"> </text:span><text:span text:style-name="T58">prediction</text:span><text:span text:style-name="T57"> </text:span><text:span text:style-name="T58">model</text:span><text:span text:style-name="T57"> </text:span><text:span text:style-name="T58">aimed</text:span><text:span text:style-name="T62"> </text:span><text:span text:style-name="T58">at helping</text:span><text:span text:style-name="T56"> </text:span><text:span text:style-name="T58">telecommunications</text:span><text:span text:style-name="T70"> </text:span><text:span text:style-name="T58">operators</text:span><text:span text:style-name="T70"> </text:span><text:span text:style-name="T58">identify</text:span><text:span text:style-name="T56"> </text:span><text:span text:style-name="T58">customers</text:span><text:span text:style-name="T70"> </text:span><text:span text:style-name="T58">most</text:span><text:span text:style-name="T70"> </text:span><text:span text:style-name="T58">likely</text:span><text:span text:style-name="T56"> </text:span><text:span text:style-name="T58">to</text:span><text:span text:style-name="T72"> </text:span><text:span text:style-name="T58">leave.</text:span></text:p>
      <text:p text:style-name="P64" loext:marker-style-name="T51"><text:span text:style-name="T52">To</text:span><text:span text:style-name="T70"> </text:span><text:span text:style-name="T52">achieve</text:span><text:span text:style-name="T64"> </text:span><text:span text:style-name="T52">this</text:span><text:span text:style-name="T59"> </text:span><text:span text:style-name="T52">goal,</text:span><text:span text:style-name="T59"> </text:span><text:span text:style-name="T52">we</text:span><text:span text:style-name="T64"> </text:span><text:span text:style-name="T52">implemented</text:span><text:span text:style-name="T64"> </text:span><text:span text:style-name="T52">various</text:span><text:span text:style-name="T59"> </text:span><text:span text:style-name="T52">supervised</text:span><text:span text:style-name="T56"> </text:span><text:span text:style-name="T52">learning</text:span><text:span text:style-name="T64"> </text:span><text:span text:style-name="T52">algorithms</text:span><text:span text:style-name="T59"> </text:span><text:span text:style-name="T52">and </text:span><text:span text:style-name="T58">evaluated</text:span><text:span text:style-name="T72"> </text:span><text:span text:style-name="T58">their</text:span><text:span text:style-name="T56"> </text:span><text:span text:style-name="T58">performance.</text:span><text:span text:style-name="T56"> </text:span><text:span text:style-name="T58">Our</text:span><text:span text:style-name="T56"> </text:span><text:span text:style-name="T58">main</text:span><text:span text:style-name="T56"> </text:span><text:span text:style-name="T58">contribution</text:span><text:span text:style-name="T56"> </text:span><text:span text:style-name="T58">is</text:span><text:span text:style-name="T56"> </text:span><text:span text:style-name="T58">developing</text:span><text:span text:style-name="T72"> </text:span><text:span text:style-name="T58">an</text:span><text:span text:style-name="T56"> </text:span><text:span text:style-name="T58">effective model</text:span><text:span text:style-name="T60"> </text:span><text:span text:style-name="T58">based</text:span><text:span text:style-name="T59"> </text:span><text:span text:style-name="T58">on</text:span><text:span text:style-name="T60"> </text:span><text:span text:style-name="T58">the</text:span><text:span text:style-name="T59"> </text:span><text:span text:style-name="T58">algorithm</text:span><text:span text:style-name="T59"> </text:span><text:span text:style-name="T58">with</text:span><text:span text:style-name="T60"> </text:span><text:span text:style-name="T58">the</text:span><text:span text:style-name="T59"> </text:span><text:span text:style-name="T58">best</text:span><text:span text:style-name="T60"> </text:span><text:span text:style-name="T58">accuracy</text:span><text:span text:style-name="T59"> </text:span><text:span text:style-name="T58">rate.</text:span><text:span text:style-name="T60"> </text:span><text:span text:style-name="T58">This</text:span><text:span text:style-name="T60"> </text:span><text:span text:style-name="T58">model</text:span><text:span text:style-name="T60"> </text:span><text:span text:style-name="T58">will</text:span><text:span text:style-name="T60"> </text:span><text:span text:style-name="T58">enable telecommunications</text:span><text:span text:style-name="T70"> </text:span><text:span text:style-name="T58">operators</text:span><text:span text:style-name="T70"> </text:span><text:span text:style-name="T58">to</text:span><text:span text:style-name="T72"> </text:span><text:span text:style-name="T58">take</text:span><text:span text:style-name="T56"> </text:span><text:span text:style-name="T58">proactive</text:span><text:span text:style-name="T56"> </text:span><text:span text:style-name="T58">measures</text:span><text:span text:style-name="T70"> </text:span><text:span text:style-name="T58">to</text:span><text:span text:style-name="T72"> </text:span><text:span text:style-name="T58">reduce</text:span><text:span text:style-name="T56"> </text:span><text:span text:style-name="T58">churn</text:span><text:span text:style-name="T72"> </text:span><text:span text:style-name="T58">and </text:span><text:span text:style-name="T68">retain</text:span><text:span text:style-name="T54"> </text:span><text:span text:style-name="T68">their</text:span><text:span text:style-name="T54"> </text:span><text:span text:style-name="T68">customer</text:span><text:span text:style-name="T54"> </text:span><text:span text:style-name="T68">base.</text:span></text:p>
      <text:h text:style-name="P65" text:outline-level="2"><text:bookmark text:name="_bookmark3"/>Dédicaces</text:h>
      <text:p text:style-name="P66" loext:marker-style-name="T50"/>
      <text:p text:style-name="P67" loext:marker-style-name="T50"/>
      <text:p text:style-name="P68" loext:marker-style-name="T78"><text:span text:style-name="T78">Tout</text:span><text:span text:style-name="T79"> </text:span><text:span text:style-name="T78">d’abord,</text:span><text:span text:style-name="T80"> </text:span><text:span text:style-name="T78">nous</text:span><text:span text:style-name="T81"> </text:span><text:span text:style-name="T78">tenons</text:span><text:span text:style-name="T82"> </text:span><text:span text:style-name="T78">à</text:span><text:span text:style-name="T83"> </text:span><text:span text:style-name="T78">remercier</text:span><text:span text:style-name="T82"> </text:span><text:span text:style-name="T84">ALLAH</text:span></text:p>
      <text:p text:style-name="P69" loext:marker-style-name="T78"><text:span text:style-name="T78">De</text:span><text:span text:style-name="T85"> </text:span><text:span text:style-name="T78">nous</text:span><text:span text:style-name="T80"> </text:span><text:span text:style-name="T78">avoir</text:span><text:span text:style-name="T84"> </text:span><text:span text:style-name="T78">donné</text:span><text:span text:style-name="T85"> </text:span><text:span text:style-name="T78">la</text:span><text:span text:style-name="T83"> </text:span><text:span text:style-name="T78">force</text:span><text:span text:style-name="T85"> </text:span><text:span text:style-name="T78">et</text:span><text:span text:style-name="T84"> </text:span><text:span text:style-name="T78">le</text:span><text:span text:style-name="T85"> </text:span><text:span text:style-name="T78">courage</text:span><text:span text:style-name="T80"> </text:span><text:span text:style-name="T78">de</text:span><text:span text:style-name="T85"> </text:span><text:span text:style-name="T78">mener à bien ce modeste travail.</text:span></text:p>
      <text:p text:style-name="P70" loext:marker-style-name="T78"/>
      <text:p text:style-name="P71" loext:marker-style-name="T78"><text:span text:style-name="T78">Nous</text:span><text:span text:style-name="T80"> </text:span><text:span text:style-name="T78">tenons</text:span><text:span text:style-name="T80"> </text:span><text:span text:style-name="T78">à</text:span><text:span text:style-name="T84"> </text:span><text:span text:style-name="T78">dédier</text:span><text:span text:style-name="T85"> </text:span><text:span text:style-name="T78">cet</text:span><text:span text:style-name="T80"> </text:span><text:span text:style-name="T78">humble</text:span><text:span text:style-name="T83"> </text:span><text:span text:style-name="T78">travail</text:span><text:span text:style-name="T80"> </text:span><text:span text:style-name="T78">à</text:span><text:span text:style-name="T84"> </text:span><text:span text:style-name="T86">:</text:span></text:p>
      <text:p text:style-name="P72" loext:marker-style-name="T78"><text:span text:style-name="T78">A</text:span><text:span text:style-name="T84"> </text:span><text:span text:style-name="T78">nos</text:span><text:span text:style-name="T80"> </text:span><text:span text:style-name="T78">tendres</text:span><text:span text:style-name="T83"> </text:span><text:span text:style-name="T78">mères</text:span><text:span text:style-name="T85"> </text:span><text:span text:style-name="T78">et</text:span><text:span text:style-name="T85"> </text:span><text:span text:style-name="T78">nos</text:span><text:span text:style-name="T80"> </text:span><text:span text:style-name="T78">très</text:span><text:span text:style-name="T84"> </text:span><text:span text:style-name="T78">chers</text:span><text:span text:style-name="T83"> </text:span><text:span text:style-name="T84">pères,</text:span></text:p>
      <text:p text:style-name="P73" loext:marker-style-name="T78"><text:span text:style-name="T78">A</text:span><text:span text:style-name="T84"> </text:span><text:span text:style-name="T78">nos</text:span><text:span text:style-name="T85"> </text:span><text:span text:style-name="T78">précieuse</text:span><text:span text:style-name="T85"> </text:span><text:span text:style-name="T78">sœurs</text:span><text:span text:style-name="T87"> </text:span><text:span text:style-name="T78">;</text:span><text:span text:style-name="T85"> </text:span><text:span text:style-name="T78">A</text:span><text:span text:style-name="T83"> </text:span><text:span text:style-name="T78">nos</text:span><text:span text:style-name="T84"> </text:span><text:span text:style-name="T78">chères</text:span><text:span text:style-name="T83"> </text:span><text:span text:style-name="T78">tantes</text:span><text:span text:style-name="T84"> </text:span><text:span text:style-name="T78">et</text:span><text:span text:style-name="T84"> </text:span><text:span text:style-name="T78">à</text:span><text:span text:style-name="T80"> </text:span><text:span text:style-name="T78">nos</text:span><text:span text:style-name="T84"> </text:span><text:span text:style-name="T78">très</text:span><text:span text:style-name="T84"> </text:span><text:span text:style-name="T78">chers</text:span><text:span text:style-name="T84"> </text:span><text:span text:style-name="T78">oncles. A nos frères</text:span></text:p>
      <text:p text:style-name="P74" loext:marker-style-name="T78"><text:span text:style-name="T78">Spécial</text:span><text:span text:style-name="T81"> </text:span><text:span text:style-name="T78">dédicace</text:span><text:span text:style-name="T81"> </text:span><text:span text:style-name="T78">a</text:span><text:span text:style-name="T82"> </text:span><text:span text:style-name="T78">vous:</text:span><text:span text:style-name="T81"> </text:span><text:span text:style-name="T78">monsieur</text:span><text:span text:style-name="T82"> </text:span><text:span text:style-name="T78">Rachid</text:span><text:span text:style-name="T82"> </text:span><text:span text:style-name="T78">Ait</text:span><text:span text:style-name="T81"> </text:span><text:span text:style-name="T78">Daoud A nos meilleurs amis</text:span></text:p>
      <text:p text:style-name="P75" loext:marker-style-name="T78"><text:span text:style-name="T78">A</text:span><text:span text:style-name="T85"> </text:span><text:span text:style-name="T78">Tous</text:span><text:span text:style-name="T79"> </text:span><text:span text:style-name="T78">nos</text:span><text:span text:style-name="T84"> </text:span><text:span text:style-name="T78">amis</text:span><text:span text:style-name="T83"> </text:span><text:span text:style-name="T78">d’enfance</text:span><text:span text:style-name="T85"> </text:span><text:span text:style-name="T78">et</text:span><text:span text:style-name="T85"> </text:span><text:span text:style-name="T78">du</text:span><text:span text:style-name="T84"> </text:span><text:span text:style-name="T78">long</text:span><text:span text:style-name="T79"> </text:span><text:span text:style-name="T78">parcours</text:span><text:span text:style-name="T80"> </text:span><text:span text:style-name="T78">scolaire</text:span><text:span text:style-name="T82"> </text:span><text:span text:style-name="T78">et</text:span><text:span text:style-name="T84"> universitaire.</text:span></text:p>
      <text:p text:style-name="P76" loext:marker-style-name="T78"><text:span text:style-name="T78">A</text:span><text:span text:style-name="T88"> </text:span><text:span text:style-name="T78">Toutes nos</text:span><text:span text:style-name="T82"> </text:span><text:span text:style-name="T84">familles</text:span></text:p>
      <text:p text:style-name="P77" loext:marker-style-name="T78"/>
      <text:p text:style-name="P78" loext:marker-style-name="T78"/>
      <text:p text:style-name="P71" loext:marker-style-name="T78"><text:span text:style-name="T78">Tous</text:span><text:span text:style-name="T85"> </text:span><text:span text:style-name="T78">ceux</text:span><text:span text:style-name="T80"> </text:span><text:span text:style-name="T78">qui</text:span><text:span text:style-name="T84"> </text:span><text:span text:style-name="T78">nous</text:span><text:span text:style-name="T80"> </text:span><text:span text:style-name="T78">aiment</text:span><text:span text:style-name="T84"> </text:span><text:span text:style-name="T78">et</text:span><text:span text:style-name="T84"> </text:span><text:span text:style-name="T78">que</text:span><text:span text:style-name="T80"> </text:span><text:span text:style-name="T78">nous</text:span><text:span text:style-name="T84"> aimons.</text:span></text:p>
      <text:h text:style-name="P79" text:outline-level="2"><text:bookmark text:name="_bookmark4"/>Remerciements</text:h>
      <text:p text:style-name="P80" loext:marker-style-name="T50"/>
      <text:p text:style-name="P81" loext:marker-style-name="T89"><text:span text:style-name="T89"/></text:p>
      <text:p text:style-name="P82" loext:marker-style-name="T89"><text:span text:style-name="T89">Nos</text:span><text:span text:style-name="T90"> </text:span><text:span text:style-name="T89">plus</text:span><text:span text:style-name="T91"> </text:span><text:span text:style-name="T89">sincères</text:span><text:span text:style-name="T91"> </text:span><text:span text:style-name="T89">remerciements</text:span><text:span text:style-name="T91"> </text:span><text:span text:style-name="T89">vont</text:span><text:span text:style-name="T91"> </text:span><text:span text:style-name="T89">à</text:span><text:span text:style-name="T92"> </text:span><text:span text:style-name="T89">notre</text:span><text:span text:style-name="T93"> </text:span><text:span text:style-name="T89">enseignant,</text:span><text:span text:style-name="T91"> </text:span><text:span text:style-name="T89">Mr.</text:span><text:span text:style-name="T90"> </text:span><text:span text:style-name="T94">Mohtaram</text:span><text:span text:style-name="T89"> ,</text:span><text:span text:style-name="T93"> </text:span><text:span text:style-name="T89">dont les conseils éclairés et le soutien constant ont été des piliers essentiels tout au long</text:span><text:span text:style-name="T95"> </text:span><text:span text:style-name="T89">de cette aventure intellectuelle. Ses idées novatrices, ses discussions constructives et ses solutions pertinentes ont profondément enrichi notre travail, témoignant de son engagement envers l'excellence académique.</text:span></text:p>
      <text:p text:style-name="P83" loext:marker-style-name="T89"><text:span text:style-name="T89">Un</text:span><text:span text:style-name="T93"> </text:span><text:span text:style-name="T89">remerciement</text:span><text:span text:style-name="T93"> </text:span><text:span text:style-name="T89">particulier</text:span><text:span text:style-name="T91"> </text:span><text:span text:style-name="T89">est</text:span><text:span text:style-name="T93"> </text:span><text:span text:style-name="T89">adressé</text:span><text:span text:style-name="T92"> </text:span><text:span text:style-name="T89">à</text:span><text:span text:style-name="T93"> </text:span><text:span text:style-name="T89">nos</text:span><text:span text:style-name="T93"> </text:span><text:span text:style-name="T89">familles,</text:span><text:span text:style-name="T91"> </text:span><text:span text:style-name="T89">dont</text:span><text:span text:style-name="T93"> </text:span><text:span text:style-name="T89">le</text:span><text:span text:style-name="T93"> </text:span><text:span text:style-name="T89">soutien</text:span><text:span text:style-name="T93"> </text:span><text:span text:style-name="T89">indéfectible</text:span><text:span text:style-name="T91"> </text:span><text:span text:style-name="T89">et la compréhension constante ont été des sources d'inspiration. Leur encouragement a été notre moteur tout au long de nos années d'études.</text:span></text:p>
      <text:p text:style-name="P84" loext:marker-style-name="T89"><text:span text:style-name="T89">Enfin,</text:span><text:span text:style-name="T93"> </text:span><text:span text:style-name="T89">nous</text:span><text:span text:style-name="T91"> </text:span><text:span text:style-name="T89">n'oublions</text:span><text:span text:style-name="T91"> </text:span><text:span text:style-name="T89">pas</text:span><text:span text:style-name="T91"> </text:span><text:span text:style-name="T89">de</text:span><text:span text:style-name="T90"> </text:span><text:span text:style-name="T89">saluer</text:span><text:span text:style-name="T90"> </text:span><text:span text:style-name="T89">nos</text:span><text:span text:style-name="T93"> </text:span><text:span text:style-name="T89">amis</text:span><text:span text:style-name="T90"> </text:span><text:span text:style-name="T89">d'études</text:span><text:span text:style-name="T91"> </text:span><text:span text:style-name="T89">et</text:span><text:span text:style-name="T91"> </text:span><text:span text:style-name="T89">toutes</text:span><text:span text:style-name="T91"> </text:span><text:span text:style-name="T89">les</text:span><text:span text:style-name="T91"> </text:span><text:span text:style-name="T89">personnes</text:span><text:span text:style-name="T96"> </text:span><text:span text:style-name="T89">qui,</text:span><text:span text:style-name="T90"> </text:span><text:span text:style-name="T89">de près ou de loin, ont contribué à la réalisation de ce projet. Leurs encouragements et leur collaboration ont créé une atmosphère d'apprentissage dynamique et </text:span><text:span text:style-name="T90">stimulante.</text:span></text:p>
      <text:h text:style-name="P85" text:outline-level="2"><text:bookmark text:name="_bookmark5"/>Table<text:span text:style-name="T38"> </text:span>des<text:span text:style-name="T38"> </text:span><text:span text:style-name="T39">figures</text:span></text:h>
      <text:h text:style-name="P86" text:outline-level="7" loext:marker-style-name="T30"><text:a xlink:type="simple" xlink:href="#_bookmark12" text:style-name="ListLabel_20_320" text:visited-style-name="ListLabel_20_320"><text:span text:style-name="T30">Figure</text:span><text:span text:style-name="T97"> </text:span><text:span text:style-name="T30">1</text:span><text:span text:style-name="T97"> </text:span><text:span text:style-name="T30">:</text:span><text:span text:style-name="T97"> </text:span><text:span text:style-name="T30">le</text:span><text:span text:style-name="T97"> </text:span><text:span text:style-name="T30">churn des</text:span><text:span text:style-name="T97"> clients</text:span><text:span text:style-name="T30"><text:tab/></text:span><text:span text:style-name="T32">12</text:span></text:a></text:h>
      <text:h text:style-name="P87" text:outline-level="7" loext:marker-style-name="T30"><text:a xlink:type="simple" xlink:href="#_bookmark15" text:style-name="ListLabel_20_320" text:visited-style-name="ListLabel_20_320"><text:span text:style-name="T30">Figure</text:span><text:span text:style-name="T97"> </text:span><text:span text:style-name="T30">2</text:span><text:span text:style-name="T97"> </text:span><text:span text:style-name="T30">: La</text:span><text:span text:style-name="T97"> </text:span><text:span text:style-name="T30">gestion </text:span><text:span text:style-name="T97">clientèles</text:span><text:span text:style-name="T30"><text:tab/></text:span><text:span text:style-name="T32">13</text:span></text:a></text:h>
      <text:h text:style-name="P87" text:outline-level="7" loext:marker-style-name="T30"><text:a xlink:type="simple" xlink:href="#_bookmark17" text:style-name="ListLabel_20_320" text:visited-style-name="ListLabel_20_320"><text:span text:style-name="T30">Figure</text:span><text:span text:style-name="T32"> </text:span><text:span text:style-name="T30">3:</text:span><text:span text:style-name="T97"> </text:span><text:span text:style-name="T30">modèle</text:span><text:span text:style-name="T97"> </text:span><text:span text:style-name="T30">CRISP-</text:span><text:span text:style-name="T32">DM</text:span><text:span text:style-name="T30"><text:tab/></text:span><text:span text:style-name="T32">13</text:span></text:a></text:h>
      <text:h text:style-name="P88" text:outline-level="7" loext:marker-style-name="T30"><text:a xlink:type="simple" xlink:href="#_bookmark23" text:style-name="ListLabel_20_320" text:visited-style-name="ListLabel_20_320"><text:span text:style-name="T30">Figure</text:span><text:span text:style-name="T97"> </text:span><text:span text:style-name="T30">4</text:span><text:span text:style-name="T98"> </text:span><text:span text:style-name="T30">:</text:span><text:span text:style-name="T99"> </text:span><text:span text:style-name="T30">Data </text:span><text:span text:style-name="T97">Mining</text:span><text:span text:style-name="T30"><text:tab/></text:span><text:span text:style-name="T32">15</text:span></text:a></text:h>
      <text:h text:style-name="P87" text:outline-level="7" loext:marker-style-name="T30"><text:a xlink:type="simple" xlink:href="#_bookmark24" text:style-name="ListLabel_20_320" text:visited-style-name="ListLabel_20_320"><text:span text:style-name="T30">Figure</text:span><text:span text:style-name="T97"> </text:span><text:span text:style-name="T30">5</text:span><text:span text:style-name="T97"> </text:span><text:span text:style-name="T30">:</text:span><text:span text:style-name="T97"> </text:span><text:span text:style-name="T30">une</text:span><text:span text:style-name="T97"> </text:span><text:span text:style-name="T30">domaine</text:span><text:span text:style-name="T98"> </text:span><text:span text:style-name="T97">interdiciplinaire</text:span><text:span text:style-name="T30"><text:tab/></text:span><text:span text:style-name="T32">15</text:span></text:a></text:h>
      <text:h text:style-name="P87" text:outline-level="7" loext:marker-style-name="T30"><text:a xlink:type="simple" xlink:href="#_bookmark25" text:style-name="ListLabel_20_320" text:visited-style-name="ListLabel_20_320"><text:span text:style-name="T30">Figure</text:span><text:span text:style-name="T97"> </text:span><text:span text:style-name="T30">6</text:span><text:span text:style-name="T97"> </text:span><text:span text:style-name="T30">:</text:span><text:span text:style-name="T97"> </text:span><text:span text:style-name="T30">type</text:span><text:span text:style-name="T97"> </text:span><text:span text:style-name="T30">of</text:span><text:span text:style-name="T97"> </text:span><text:span text:style-name="T30">machine</text:span><text:span text:style-name="T98"> </text:span><text:span text:style-name="T97">learning</text:span><text:span text:style-name="T30"><text:tab/></text:span><text:span text:style-name="T32">16</text:span></text:a></text:h>
      <text:h text:style-name="P87" text:outline-level="7" loext:marker-style-name="T30"><text:a xlink:type="simple" xlink:href="#_bookmark32" text:style-name="ListLabel_20_320" text:visited-style-name="ListLabel_20_320"><text:span text:style-name="T30">Figure</text:span><text:span text:style-name="T100"> </text:span><text:span text:style-name="T30">7:</text:span><text:span text:style-name="T101"> </text:span><text:span text:style-name="T30">Cycle</text:span><text:span text:style-name="T32"> </text:span><text:span text:style-name="T30">de</text:span><text:span text:style-name="T97"> </text:span><text:span text:style-name="T30">vie</text:span><text:span text:style-name="T97"> </text:span><text:span text:style-name="T30">d’un</text:span><text:span text:style-name="T98"> </text:span><text:span text:style-name="T30">projet machine</text:span><text:span text:style-name="T97"> Learning</text:span><text:span text:style-name="T102"><text:tab/></text:span><text:span text:style-name="T32">18</text:span></text:a></text:h>
      <text:h text:style-name="P88" text:outline-level="7" loext:marker-style-name="T30"><text:a xlink:type="simple" xlink:href="#_bookmark34" text:style-name="ListLabel_20_320" text:visited-style-name="ListLabel_20_320"><text:span text:style-name="T30">Figure</text:span><text:span text:style-name="T35"> </text:span><text:span text:style-name="T30">8:</text:span><text:span text:style-name="T98"> </text:span><text:span text:style-name="T30">Architecture</text:span><text:span text:style-name="T100"> </text:span><text:span text:style-name="T30">globale</text:span><text:span text:style-name="T100"> </text:span><text:span text:style-name="T30">du</text:span><text:span text:style-name="T100"> </text:span><text:span text:style-name="T97">modèle</text:span><text:span text:style-name="T30"><text:tab/></text:span><text:span text:style-name="T32">19</text:span></text:a></text:h>
      <text:h text:style-name="P87" text:outline-level="7" loext:marker-style-name="T30"><text:a xlink:type="simple" xlink:href="#_bookmark39" text:style-name="ListLabel_20_320" text:visited-style-name="ListLabel_20_320"><text:span text:style-name="T30">Figure</text:span><text:span text:style-name="T100"> </text:span><text:span text:style-name="T30">9:</text:span><text:span text:style-name="T98"> </text:span><text:span text:style-name="T30">Prédiction</text:span><text:span text:style-name="T100"> </text:span><text:span text:style-name="T30">pour</text:span><text:span text:style-name="T98"> </text:span><text:span text:style-name="T30">un</text:span><text:span text:style-name="T97"> </text:span><text:span text:style-name="T30">seul</text:span><text:span text:style-name="T97"> client</text:span><text:span text:style-name="T30"><text:tab/></text:span><text:span text:style-name="T32">22</text:span></text:a></text:h>
      <text:h text:style-name="P89" text:outline-level="7" loext:marker-style-name="T30"><text:a xlink:type="simple" xlink:href="#_bookmark41" text:style-name="ListLabel_20_320" text:visited-style-name="ListLabel_20_320"><text:span text:style-name="T30">Figure</text:span><text:span text:style-name="T100"> </text:span><text:span text:style-name="T30">10 :</text:span><text:span text:style-name="T100"> </text:span><text:span text:style-name="T30">Prédiction</text:span><text:span text:style-name="T97"> </text:span><text:span text:style-name="T30">pour</text:span><text:span text:style-name="T97"> </text:span><text:span text:style-name="T30">un</text:span><text:span text:style-name="T98"> </text:span><text:span text:style-name="T30">groupe</text:span><text:span text:style-name="T35"> </text:span><text:span text:style-name="T30">de</text:span><text:span text:style-name="T97"> clients</text:span><text:span text:style-name="T30"><text:tab/></text:span><text:span text:style-name="T32">22</text:span></text:a></text:h>
      <text:h text:style-name="P87" text:outline-level="7" loext:marker-style-name="T30"><text:a xlink:type="simple" xlink:href="#_bookmark47" text:style-name="ListLabel_20_320" text:visited-style-name="ListLabel_20_320"><text:span text:style-name="T30">Figure</text:span><text:span text:style-name="T100"> </text:span><text:span text:style-name="T30">11:</text:span><text:span text:style-name="T98"> </text:span><text:span text:style-name="T30">résumé</text:span><text:span text:style-name="T97"> </text:span><text:span text:style-name="T30">des</text:span><text:span text:style-name="T98"> </text:span><text:span text:style-name="T97">données</text:span><text:span text:style-name="T30"><text:tab/></text:span><text:span text:style-name="T32">24</text:span></text:a></text:h>
      <text:h text:style-name="P87" text:outline-level="7" loext:marker-style-name="T30"><text:a xlink:type="simple" xlink:href="#_bookmark50" text:style-name="ListLabel_20_320" text:visited-style-name="ListLabel_20_320"><text:span text:style-name="T30">Figure</text:span><text:span text:style-name="T100"> </text:span><text:span text:style-name="T30">12</text:span><text:span text:style-name="T97"> </text:span><text:span text:style-name="T30">:</text:span><text:span text:style-name="T100"> </text:span><text:span text:style-name="T30">Algorithme</text:span><text:span text:style-name="T97"> </text:span><text:span text:style-name="T30">de</text:span><text:span text:style-name="T100"> </text:span><text:span text:style-name="T30">Random</text:span><text:span text:style-name="T97"> Forest</text:span><text:span text:style-name="T30"><text:tab/></text:span><text:span text:style-name="T32">25</text:span></text:a></text:h>
      <text:h text:style-name="P88" text:outline-level="7" loext:marker-style-name="T30"><text:a xlink:type="simple" xlink:href="#_bookmark51" text:style-name="ListLabel_20_320" text:visited-style-name="ListLabel_20_320"><text:span text:style-name="T30">Figure</text:span><text:span text:style-name="T97"> </text:span><text:span text:style-name="T30">13 :</text:span><text:span text:style-name="T103"> </text:span><text:span text:style-name="T30">model</text:span><text:span text:style-name="T98"> </text:span><text:span text:style-name="T97">metrics</text:span><text:span text:style-name="T30"><text:tab/></text:span><text:span text:style-name="T32">26</text:span></text:a></text:h>
      <text:h text:style-name="P87" text:outline-level="7" loext:marker-style-name="T30"><text:a xlink:type="simple" xlink:href="#_bookmark52" text:style-name="ListLabel_20_320" text:visited-style-name="ListLabel_20_320"><text:span text:style-name="T30">Figure</text:span><text:span text:style-name="T32"> </text:span><text:span text:style-name="T30">14</text:span><text:span text:style-name="T98"> </text:span><text:span text:style-name="T30">:</text:span><text:span text:style-name="T98"> </text:span><text:span text:style-name="T30">Confusion</text:span><text:span text:style-name="T97"> Matrices</text:span><text:span text:style-name="T30"><text:tab/></text:span><text:span text:style-name="T32">26</text:span></text:a></text:h>
      <text:h text:style-name="P87" text:outline-level="7" loext:marker-style-name="T30"><text:a xlink:type="simple" xlink:href="#_bookmark58" text:style-name="ListLabel_20_320" text:visited-style-name="ListLabel_20_320"><text:span text:style-name="T30">Figure</text:span><text:span text:style-name="T32"> </text:span><text:span text:style-name="T30">15</text:span><text:span text:style-name="T98"> </text:span><text:span text:style-name="T30">:</text:span><text:span text:style-name="T100"> </text:span><text:span text:style-name="T30">Interface</text:span><text:span text:style-name="T97"> </text:span><text:span text:style-name="T30">de</text:span><text:span text:style-name="T35"> </text:span><text:span text:style-name="T30">Prédiction</text:span><text:span text:style-name="T100"> </text:span><text:span text:style-name="T30">du</text:span><text:span text:style-name="T100"> </text:span><text:span text:style-name="T30">Churn</text:span><text:span text:style-name="T100"> </text:span><text:span text:style-name="T30">pour</text:span><text:span text:style-name="T98"> </text:span><text:span text:style-name="T30">un </text:span><text:span text:style-name="T97">Client</text:span><text:span text:style-name="T30"><text:tab/></text:span><text:span text:style-name="T32">28</text:span></text:a></text:h>
      <text:h text:style-name="P88" text:outline-level="7" loext:marker-style-name="T30"><text:a xlink:type="simple" xlink:href="#_bookmark59" text:style-name="ListLabel_20_320" text:visited-style-name="ListLabel_20_320"><text:span text:style-name="T30">Figure</text:span><text:span text:style-name="T100"> </text:span><text:span text:style-name="T30">16</text:span><text:span text:style-name="T98"> </text:span><text:span text:style-name="T30">:</text:span><text:span text:style-name="T100"> </text:span><text:span text:style-name="T30">Prédiction</text:span><text:span text:style-name="T100"> </text:span><text:span text:style-name="T30">du</text:span><text:span text:style-name="T100"> </text:span><text:span text:style-name="T30">Churn</text:span><text:span text:style-name="T100"> </text:span><text:span text:style-name="T30">pour</text:span><text:span text:style-name="T98"> </text:span><text:span text:style-name="T30">Plusieurs</text:span><text:span text:style-name="T98"> </text:span><text:span text:style-name="T97">Clients</text:span><text:span text:style-name="T30"><text:tab/></text:span><text:span text:style-name="T32">28</text:span></text:a></text:h>
      <text:h text:style-name="P87" text:outline-level="7" loext:marker-style-name="T30"><text:a xlink:type="simple" xlink:href="#_bookmark63" text:style-name="ListLabel_20_320" text:visited-style-name="ListLabel_20_320"><text:span text:style-name="T30">Figure</text:span><text:span text:style-name="T31"> </text:span><text:span text:style-name="T30">17</text:span><text:span text:style-name="T98"> </text:span><text:span text:style-name="T30">:</text:span><text:span text:style-name="T100"> </text:span><text:span text:style-name="T30">Facteurs</text:span><text:span text:style-name="T97"> </text:span><text:span text:style-name="T30">Déterminants</text:span><text:span text:style-name="T35"> </text:span><text:span text:style-name="T30">de</text:span><text:span text:style-name="T100"> </text:span><text:span text:style-name="T30">la</text:span><text:span text:style-name="T100"> </text:span><text:span text:style-name="T30">Perte</text:span><text:span text:style-name="T35"> </text:span><text:span text:style-name="T30">de</text:span><text:span text:style-name="T100"> </text:span><text:span text:style-name="T97">Clients</text:span><text:span text:style-name="T30"><text:tab/></text:span><text:span text:style-name="T32">29</text:span></text:a></text:h>
      <text:h text:style-name="P90" text:outline-level="2"><text:bookmark text:name="_bookmark6"/>Liste<text:span text:style-name="T38"> </text:span>des<text:span text:style-name="T44"> </text:span><text:span text:style-name="T39">tableaux</text:span></text:h>
      <text:p text:style-name="P91" loext:marker-style-name="T104"><text:a xlink:type="simple" xlink:href="#_bookmark36" text:style-name="ListLabel_20_337" text:visited-style-name="ListLabel_20_337"><text:span text:style-name="T104">Tableau</text:span><text:span text:style-name="T105"> </text:span><text:span text:style-name="T104">1</text:span><text:span text:style-name="T106"> </text:span><text:span text:style-name="T104">:Description</text:span><text:span text:style-name="T107"> </text:span><text:span text:style-name="T104">des</text:span><text:span text:style-name="T108"> </text:span><text:span text:style-name="T104">variables</text:span><text:span text:style-name="T107"> </text:span><text:span text:style-name="T104">de</text:span><text:span text:style-name="T107"> </text:span><text:span text:style-name="T109">DataSet</text:span><text:span text:style-name="T104"><text:tab/></text:span><text:span text:style-name="T106">20</text:span></text:a></text:p>
      <table:table table:name="Table1" table:style-name="Table1">
        <table:table-column table:style-name="Table1.A"/>
        <table:table-column table:style-name="Table1.B"/>
        <table:table-row table:style-name="Table1.1">
          <table:table-cell table:style-name="Table1.A1" office:value-type="string">
            <text:p text:style-name="P92" loext:marker-style-name="T110"/>
          </table:table-cell>
          <table:table-cell table:style-name="Table1.A1" office:value-type="string">
            <text:p text:style-name="P93" loext:marker-style-name="T111"><text:bookmark text:name="_bookmark7"/><text:span text:style-name="T112">Abréviations</text:span><text:span text:style-name="T112"/></text:p>
          </table:table-cell>
        </table:table-row>
        <table:table-row table:style-name="Table1.2">
          <table:table-cell table:style-name="Table1.A1" office:value-type="string">
            <text:p text:style-name="P94" loext:marker-style-name="T113"/>
            <text:p text:style-name="P95" loext:marker-style-name="T114"><text:span text:style-name="T115">BI</text:span><text:span text:style-name="T115"/></text:p>
          </table:table-cell>
          <table:table-cell table:style-name="Table1.A1" office:value-type="string">
            <text:p text:style-name="P94" loext:marker-style-name="T113"/>
            <text:p text:style-name="P96" loext:marker-style-name="T110"><text:span text:style-name="T110">Business </text:span><text:span text:style-name="T116">intelligence</text:span></text:p>
          </table:table-cell>
        </table:table-row>
        <table:table-row table:style-name="Table1.3">
          <table:table-cell table:style-name="Table1.A1" office:value-type="string">
            <text:p text:style-name="P97" loext:marker-style-name="T114"><text:span text:style-name="T117">CRISP-</text:span><text:span text:style-name="T115">DM</text:span></text:p>
          </table:table-cell>
          <table:table-cell table:style-name="Table1.A1" office:value-type="string">
            <text:p text:style-name="P98" loext:marker-style-name="T110"><text:span text:style-name="T110">Cross-Industry</text:span><text:span text:style-name="T118"> </text:span><text:span text:style-name="T110">Standard</text:span><text:span text:style-name="T119"> </text:span><text:span text:style-name="T110">Process</text:span><text:span text:style-name="T116"> </text:span><text:span text:style-name="T110">for</text:span><text:span text:style-name="T120"> </text:span><text:span text:style-name="T110">Data</text:span><text:span text:style-name="T121"> </text:span><text:span text:style-name="T116">Mining</text:span></text:p>
          </table:table-cell>
        </table:table-row>
        <table:table-row table:style-name="Table1.4">
          <table:table-cell table:style-name="Table1.A1" office:value-type="string">
            <text:p text:style-name="P97" loext:marker-style-name="T114"><text:span text:style-name="T115">JS</text:span><text:span text:style-name="T115"/></text:p>
          </table:table-cell>
          <table:table-cell table:style-name="Table1.A1" office:value-type="string">
            <text:p text:style-name="P99" loext:marker-style-name="T110"><text:span text:style-name="T116">JavaScript</text:span><text:span text:style-name="T116"/></text:p>
          </table:table-cell>
        </table:table-row>
        <table:table-row table:style-name="Table1.4">
          <table:table-cell table:style-name="Table1.A1" office:value-type="string">
            <text:p text:style-name="P100" loext:marker-style-name="T114"><text:span text:style-name="T122">HTML</text:span><text:span text:style-name="T122"/></text:p>
          </table:table-cell>
          <table:table-cell table:style-name="Table1.A1" office:value-type="string">
            <text:p text:style-name="P101" loext:marker-style-name="T114"><text:span text:style-name="T110">HyperText</text:span><text:span text:style-name="T116"> </text:span><text:span text:style-name="T110">Markup</text:span><text:span text:style-name="T116"> Languag</text:span><text:span text:style-name="T117">e</text:span></text:p>
          </table:table-cell>
        </table:table-row>
        <table:table-row table:style-name="Table1.3">
          <table:table-cell table:style-name="Table1.A1" office:value-type="string">
            <text:p text:style-name="P102" loext:marker-style-name="T114"><text:span text:style-name="T115">ML</text:span><text:span text:style-name="T115"/></text:p>
          </table:table-cell>
          <table:table-cell table:style-name="Table1.A1" office:value-type="string">
            <text:p text:style-name="P99" loext:marker-style-name="T110"><text:span text:style-name="T110">Machine</text:span><text:span text:style-name="T123"> </text:span><text:span text:style-name="T116">Learning</text:span></text:p>
          </table:table-cell>
        </table:table-row>
        <table:table-row table:style-name="Table1.7">
          <table:table-cell table:style-name="Table1.A1" office:value-type="string">
            <text:p text:style-name="P103" loext:marker-style-name="T114"><text:span text:style-name="T115">DM</text:span><text:span text:style-name="T115"/></text:p>
          </table:table-cell>
          <table:table-cell table:style-name="Table1.A1" office:value-type="string">
            <text:p text:style-name="P104" loext:marker-style-name="T110"><text:span text:style-name="T110">data</text:span><text:span text:style-name="T116"> mining</text:span></text:p>
          </table:table-cell>
        </table:table-row>
        <table:table-row table:style-name="Table1.8">
          <table:table-cell table:style-name="Table1.A1" office:value-type="string">
            <text:p text:style-name="P105" loext:marker-style-name="T114"><text:span text:style-name="T115">IA</text:span><text:span text:style-name="T115"/></text:p>
          </table:table-cell>
          <table:table-cell table:style-name="Table1.A1" office:value-type="string">
            <text:p text:style-name="P106" loext:marker-style-name="T110"><text:span text:style-name="T110">Intelligence</text:span><text:span text:style-name="T123"> </text:span><text:span text:style-name="T116">Artificielle</text:span></text:p>
          </table:table-cell>
        </table:table-row>
        <table:table-row table:style-name="Table1.9">
          <table:table-cell table:style-name="Table1.A1" office:value-type="string">
            <text:p text:style-name="P105" loext:marker-style-name="T114"><text:span text:style-name="T117">Churn</text:span><text:span text:style-name="T117"/></text:p>
          </table:table-cell>
          <table:table-cell table:style-name="Table1.A1" office:value-type="string">
            <text:p text:style-name="P106" loext:marker-style-name="T110"><text:span text:style-name="T110">Taux</text:span><text:span text:style-name="T116"> </text:span><text:span text:style-name="T110">d'attrition</text:span><text:span text:style-name="T119"> </text:span><text:span text:style-name="T110">des</text:span><text:span text:style-name="T119"> </text:span><text:span text:style-name="T116">clients</text:span></text:p>
          </table:table-cell>
        </table:table-row>
        <table:table-row table:style-name="Table1.3">
          <table:table-cell table:style-name="Table1.A1" office:value-type="string">
            <text:p text:style-name="P97" loext:marker-style-name="T114"><text:span text:style-name="T115">CD</text:span><text:span text:style-name="T115"/></text:p>
          </table:table-cell>
          <table:table-cell table:style-name="Table1.A1" office:value-type="string">
            <text:p text:style-name="P107" loext:marker-style-name="T110"><text:span text:style-name="T110">Cahier</text:span><text:span text:style-name="T120"> </text:span><text:span text:style-name="T110">de</text:span><text:span text:style-name="T119"> </text:span><text:span text:style-name="T116">Charges</text:span></text:p>
          </table:table-cell>
        </table:table-row>
        <table:table-row table:style-name="Table1.3">
          <table:table-cell table:style-name="Table1.A1" office:value-type="string">
            <text:p text:style-name="P97" loext:marker-style-name="T114"><text:span text:style-name="T115">DS</text:span><text:span text:style-name="T115"/></text:p>
          </table:table-cell>
          <table:table-cell table:style-name="Table1.A1" office:value-type="string">
            <text:p text:style-name="P107" loext:marker-style-name="T110"><text:span text:style-name="T110">Data</text:span><text:span text:style-name="T116"> Science</text:span></text:p>
          </table:table-cell>
        </table:table-row>
        <table:table-row table:style-name="Table1.3">
          <table:table-cell table:style-name="Table1.A1" office:value-type="string">
            <text:p text:style-name="P108" loext:marker-style-name="T114"><text:span text:style-name="T122">Sup.</text:span><text:span text:style-name="T122"/></text:p>
          </table:table-cell>
          <table:table-cell table:style-name="Table1.A1" office:value-type="string">
            <text:p text:style-name="P107" loext:marker-style-name="T110"><text:span text:style-name="T116">Supervisé</text:span><text:span text:style-name="T116"/></text:p>
          </table:table-cell>
        </table:table-row>
        <table:table-row table:style-name="Table1.3">
          <table:table-cell table:style-name="Table1.A1" office:value-type="string">
            <text:p text:style-name="P109" loext:marker-style-name="T114"><text:span text:style-name="T117">Non-</text:span><text:span text:style-name="T122">Sup.</text:span></text:p>
          </table:table-cell>
          <table:table-cell table:style-name="Table1.A1" office:value-type="string">
            <text:p text:style-name="P110" loext:marker-style-name="T110"><text:span text:style-name="T110">Non </text:span><text:span text:style-name="T116">Supervisé</text:span></text:p>
          </table:table-cell>
        </table:table-row>
        <table:table-row table:style-name="Table1.14">
          <table:table-cell table:style-name="Table1.A1" office:value-type="string">
            <text:p text:style-name="P111" loext:marker-style-name="T114"><text:span text:style-name="T117">Admin</text:span><text:span text:style-name="T117"/></text:p>
          </table:table-cell>
          <table:table-cell table:style-name="Table1.A1" office:value-type="string">
            <text:p text:style-name="P112" loext:marker-style-name="T110"><text:span text:style-name="T116">Administrateur</text:span><text:span text:style-name="T116"/></text:p>
          </table:table-cell>
        </table:table-row>
      </table:table>
      <text:h text:style-name="P113" text:outline-level="2"><text:bookmark text:name="_bookmark8"/>Introduction<text:span text:style-name="T124"> </text:span><text:span text:style-name="T39">générale</text:span></text:h>
      <text:p text:style-name="P114" loext:marker-style-name="T50"/>
      <text:p text:style-name="P81" loext:marker-style-name="T89"><text:span text:style-name="T89">Avec l'évolution rapide du secteur des télécommunications, les opérateurs sont confrontés à un défi majeur : la rétention de la clientèle. Dans un contexte où la concurrence</text:span><text:span text:style-name="T91"> </text:span><text:span text:style-name="T89">est</text:span><text:span text:style-name="T91"> </text:span><text:span text:style-name="T89">féroce</text:span><text:span text:style-name="T91"> </text:span><text:span text:style-name="T89">et</text:span><text:span text:style-name="T91"> </text:span><text:span text:style-name="T89">les</text:span><text:span text:style-name="T91"> </text:span><text:span text:style-name="T89">consommateurs</text:span><text:span text:style-name="T90"> </text:span><text:span text:style-name="T89">de</text:span><text:span text:style-name="T91"> </text:span><text:span text:style-name="T89">plus</text:span><text:span text:style-name="T93"> </text:span><text:span text:style-name="T89">en</text:span><text:span text:style-name="T91"> </text:span><text:span text:style-name="T89">plus</text:span><text:span text:style-name="T91"> </text:span><text:span text:style-name="T89">exigeants,</text:span><text:span text:style-name="T90"> </text:span><text:span text:style-name="T89">la</text:span><text:span text:style-name="T91"> </text:span><text:span text:style-name="T89">capacité</text:span><text:span text:style-name="T91"> </text:span><text:span text:style-name="T89">à anticiper et à prévenir la perte de clients revêt une importance cruciale pour la viabilité économique des entreprises du secteur.</text:span></text:p>
      <text:p text:style-name="P115" loext:marker-style-name="T89"><text:span text:style-name="T89">Le présent projet de fin d'études s'inscrit dans ce contexte dynamique en proposant une</text:span><text:span text:style-name="T125"> </text:span><text:span text:style-name="T89">approche</text:span><text:span text:style-name="T125"> </text:span><text:span text:style-name="T89">novatrice axée</text:span><text:span text:style-name="T125"> </text:span><text:span text:style-name="T89">sur la prédiction de la perte</text:span><text:span text:style-name="T125"> </text:span><text:span text:style-name="T89">de</text:span><text:span text:style-name="T125"> </text:span><text:span text:style-name="T89">clients dans</text:span><text:span text:style-name="T90"> </text:span><text:span text:style-name="T89">le domaine des télécommunications. En effet, la capacité à anticiper les comportements des abonnés,</text:span><text:span text:style-name="T92"> </text:span><text:span text:style-name="T89">en</text:span><text:span text:style-name="T93"> </text:span><text:span text:style-name="T89">identifiant</text:span><text:span text:style-name="T93"> </text:span><text:span text:style-name="T89">les</text:span><text:span text:style-name="T93"> </text:span><text:span text:style-name="T89">signaux</text:span><text:span text:style-name="T93"> </text:span><text:span text:style-name="T89">précurseurs</text:span><text:span text:style-name="T96"> </text:span><text:span text:style-name="T89">de</text:span><text:span text:style-name="T92"> </text:span><text:span text:style-name="T89">résiliation,</text:span><text:span text:style-name="T92"> </text:span><text:span text:style-name="T89">permet</text:span><text:span text:style-name="T93"> </text:span><text:span text:style-name="T89">non</text:span><text:span text:style-name="T90"> </text:span><text:span text:style-name="T89">seulement de minimiser les pertes financières liées à la défection de clients, mais également d'optimiser les efforts de fidélisation.</text:span></text:p>
      <text:p text:style-name="P116" loext:marker-style-name="T89"><text:span text:style-name="T89">L'objectif principal de ce rapport est de présenter une méthodologie robuste de prédiction</text:span><text:span text:style-name="T90"> </text:span><text:span text:style-name="T89">de</text:span><text:span text:style-name="T93"> </text:span><text:span text:style-name="T89">la</text:span><text:span text:style-name="T91"> </text:span><text:span text:style-name="T89">perte</text:span><text:span text:style-name="T93"> </text:span><text:span text:style-name="T89">de</text:span><text:span text:style-name="T92"> </text:span><text:span text:style-name="T89">client,</text:span><text:span text:style-name="T91"> </text:span><text:span text:style-name="T89">mettant</text:span><text:span text:style-name="T93"> </text:span><text:span text:style-name="T89">à</text:span><text:span text:style-name="T93"> </text:span><text:span text:style-name="T89">profit</text:span><text:span text:style-name="T93"> </text:span><text:span text:style-name="T89">des</text:span><text:span text:style-name="T93"> </text:span><text:span text:style-name="T89">techniques</text:span><text:span text:style-name="T93"> </text:span><text:span text:style-name="T89">avancées</text:span><text:span text:style-name="T93"> </text:span><text:span text:style-name="T89">d'analyse de données, de machine learning et de modélisation statistique. À travers l'étude approfondie de données historiques, nous nous efforcerons de développer des modèles prédictifs précis et adaptés au contexte spécifique du secteur des </text:span><text:span text:style-name="T90">télécommunications.</text:span></text:p>
      <text:p text:style-name="P117" loext:marker-style-name="T89"><text:span text:style-name="T89">Au-delà de l'aspect technique, ce projet se veut également une réflexion sur les enjeux stratégiques de la fidélisation client dans un marché en perpétuelle mutation. Nous</text:span><text:span text:style-name="T92"> </text:span><text:span text:style-name="T89">explorerons</text:span><text:span text:style-name="T92"> </text:span><text:span text:style-name="T89">les</text:span><text:span text:style-name="T92"> </text:span><text:span text:style-name="T89">implications</text:span><text:span text:style-name="T92"> </text:span><text:span text:style-name="T89">économiques</text:span><text:span text:style-name="T92"> </text:span><text:span text:style-name="T89">et</text:span><text:span text:style-name="T92"> </text:span><text:span text:style-name="T89">opérationnelles</text:span><text:span text:style-name="T92"> </text:span><text:span text:style-name="T89">de</text:span><text:span text:style-name="T93"> </text:span><text:span text:style-name="T89">la</text:span><text:span text:style-name="T92"> </text:span><text:span text:style-name="T89">prédiction</text:span><text:span text:style-name="T93"> </text:span><text:span text:style-name="T89">de la perte de clients, ainsi que les avantages concurrentiels qu'une telle approche peut conférer aux opérateurs télécoms.</text:span></text:p>
      <text:p text:style-name="P118" loext:marker-style-name="T89"><text:soft-page-break/><text:span text:style-name="T89">En conclusion, la prédiction de la perte de clients représente une étape stratégique incontournable</text:span><text:span text:style-name="T92"> </text:span><text:span text:style-name="T89">dans</text:span><text:span text:style-name="T93"> </text:span><text:span text:style-name="T89">la</text:span><text:span text:style-name="T93"> </text:span><text:span text:style-name="T89">gestion</text:span><text:span text:style-name="T91"> </text:span><text:span text:style-name="T89">des</text:span><text:span text:style-name="T93"> </text:span><text:span text:style-name="T89">relations</text:span><text:span text:style-name="T93"> </text:span><text:span text:style-name="T89">clientèles</text:span><text:span text:style-name="T93"> </text:span><text:span text:style-name="T89">pour</text:span><text:span text:style-name="T91"> </text:span><text:span text:style-name="T89">les</text:span><text:span text:style-name="T93"> </text:span><text:span text:style-name="T89">entreprises</text:span><text:span text:style-name="T93"> </text:span><text:span text:style-name="T89">du</text:span><text:span text:style-name="T96"> </text:span><text:span text:style-name="T89">secteur des télécommunications. Ce projet aspire à contribuer significativement à ce</text:span><text:span text:style-name="T95"> </text:span><text:span text:style-name="T89">domaine en proposant des solutions innovantes et pragmatiques, ouvrant ainsi la voie à une approche proactive et efficace de la fidélisation dans un environnement télécoms en constante évolution.</text:span></text:p>
      <text:h text:style-name="P119" text:outline-level="3" loext:marker-style-name="T73"><text:bookmark text:name="_bookmark9"/><text:span text:style-name="T126">CHAPITRE</text:span><text:span text:style-name="T127"> </text:span><text:span text:style-name="T126">1</text:span><text:span text:style-name="T128"> </text:span><text:span text:style-name="T126">:</text:span><text:span text:style-name="T129"> </text:span><text:span text:style-name="T126">CADRE</text:span><text:span text:style-name="T128"> </text:span><text:span text:style-name="T126">GENERAL</text:span><text:span text:style-name="T128"> </text:span><text:span text:style-name="T126">DU</text:span><text:span text:style-name="T128"> </text:span><text:span text:style-name="T130">PROJET</text:span></text:h>
      <text:list text:style-name="WWNum10">
        <text:list-item>
          <text:list>
            <text:list-item>
              <text:h text:style-name="P120" text:outline-level="4"><text:bookmark text:name="_bookmark10"/>Introduction</text:h>
            </text:list-item>
          </text:list>
        </text:list-item>
      </text:list>
      <text:p text:style-name="P121">Dans<text:span text:style-name="T47"> </text:span>le<text:span text:style-name="T47"> </text:span>secteur<text:span text:style-name="T40"> </text:span>des<text:span text:style-name="T47"> </text:span>télécommunications,<text:span text:style-name="T40"> </text:span>la<text:span text:style-name="T47"> </text:span>perte<text:span text:style-name="T47"> </text:span>de<text:span text:style-name="T47"> </text:span>clients,<text:span text:style-name="T40"> </text:span>ou<text:span text:style-name="T40"> </text:span>"churn",<text:span text:style-name="T42"> </text:span>représente<text:span text:style-name="T47"> </text:span>un<text:span text:style-name="T40"> </text:span>défi<text:span text:style-name="T40"> </text:span>majeur<text:span text:style-name="T39"> </text:span>en raison de la forte concurrence. Cette problématique entraîne des pertes de revenus et nécessite des</text:p>
      <text:p text:style-name="P122">investissements<text:span text:style-name="T47"> </text:span>considérables<text:span text:style-name="T47"> </text:span>pour<text:span text:style-name="T47"> </text:span>attirer<text:span text:style-name="T40"> </text:span>de<text:span text:style-name="T43"> </text:span>nouveaux<text:span text:style-name="T42"> </text:span>clients.<text:span text:style-name="T131"> </text:span>Afin<text:span text:style-name="T40"> </text:span>de<text:span text:style-name="T40"> </text:span>prévenir<text:span text:style-name="T40"> </text:span>ce<text:span text:style-name="T47"> </text:span>phénomène,<text:span text:style-name="T40"> </text:span>notre<text:span text:style-name="T47"> </text:span>projet se concentre sur le développement d'un modèle de prédiction du churn, utilisant des techniques avancées</text:p>
      <text:p text:style-name="P123">d'analyse de données et d'apprentissage automatique. En anticipant les départs potentiels, les opérateurs peuvent<text:span text:style-name="T40"> </text:span>mettre<text:span text:style-name="T43"> </text:span>en<text:span text:style-name="T40"> </text:span>place<text:span text:style-name="T39"> </text:span>des<text:span text:style-name="T47"> </text:span>stratégies<text:span text:style-name="T47"> </text:span>proactives<text:span text:style-name="T42"> </text:span>pour<text:span text:style-name="T47"> </text:span>retenir<text:span text:style-name="T47"> </text:span>leur<text:span text:style-name="T40"> </text:span>clientèle<text:span text:style-name="T39"> </text:span>et<text:span text:style-name="T40"> </text:span>maximiser<text:span text:style-name="T47"> </text:span>leur<text:span text:style-name="T43"> </text:span>rentabilité.</text:p>
      <text:p text:style-name="P124"/>
      <text:list xml:id="list191359033000380" text:continue-numbering="true" text:style-name="WWNum10">
        <text:list-item>
          <text:list>
            <text:list-item>
              <text:h text:style-name="P125" text:outline-level="4"><text:bookmark text:name="_bookmark11"/>Problématique<text:span text:style-name="T45"> </text:span>et<text:span text:style-name="T47"> </text:span><text:span text:style-name="T39">Enjeux</text:span></text:h>
            </text:list-item>
          </text:list>
        </text:list-item>
      </text:list>
      <text:p text:style-name="P126">Effectivement,<text:span text:style-name="T40"> </text:span>le<text:span text:style-name="T40"> </text:span>churn<text:span text:style-name="T39"> </text:span>représente<text:span text:style-name="T47"> </text:span>un<text:span text:style-name="T40"> </text:span>défi<text:span text:style-name="T40"> </text:span>de<text:span text:style-name="T43"> </text:span>taille<text:span text:style-name="T40"> </text:span>pour<text:span text:style-name="T43"> </text:span>les<text:span text:style-name="T47"> </text:span>opérateurs<text:span text:style-name="T47"> </text:span>télécoms,<text:span text:style-name="T40"> </text:span>et<text:span text:style-name="T40"> </text:span>ses<text:span text:style-name="T47"> </text:span>causes<text:span text:style-name="T47"> </text:span>sont<text:span text:style-name="T40"> </text:span>variées. Parmi les principales raisons du churn, on retrouve :</text:p>
      <text:list text:style-name="WWNum11">
        <text:list-item>
          <text:p text:style-name="P127" loext:marker-style-name="T113"><text:span text:style-name="T132">Insatisfaction</text:span><text:span text:style-name="T133"> </text:span><text:span text:style-name="T132">du</text:span><text:span text:style-name="T133"> </text:span><text:span text:style-name="T132">client</text:span><text:span text:style-name="T134"> </text:span><text:span text:style-name="T132">:</text:span><text:span text:style-name="T135"> </text:span><text:span text:style-name="T113">Les</text:span><text:span text:style-name="T136"> </text:span><text:span text:style-name="T113">clients</text:span><text:span text:style-name="T136"> </text:span><text:span text:style-name="T113">peuvent</text:span><text:span text:style-name="T137"> </text:span><text:span text:style-name="T113">être</text:span><text:span text:style-name="T136"> </text:span><text:span text:style-name="T113">mécontents</text:span><text:span text:style-name="T136"> </text:span><text:span text:style-name="T113">de</text:span><text:span text:style-name="T136"> </text:span><text:span text:style-name="T113">divers</text:span><text:span text:style-name="T136"> </text:span><text:span text:style-name="T113">aspects</text:span><text:span text:style-name="T136"> </text:span><text:span text:style-name="T113">du</text:span><text:span text:style-name="T137"> </text:span><text:span text:style-name="T113">service,</text:span><text:span text:style-name="T137"> </text:span><text:span text:style-name="T113">tels</text:span><text:span text:style-name="T136"> </text:span><text:span text:style-name="T113">que</text:span><text:span text:style-name="T138"> </text:span><text:span text:style-name="T113">le prix, la qualité du service client, la couverture réseau, ou encore les fonctionnalités disponibles.</text:span></text:p>
        </text:list-item>
        <text:list-item>
          <text:p text:style-name="P128" loext:marker-style-name="T113"><text:span text:style-name="T132">Meilleures offres des concurrents : </text:span><text:span text:style-name="T113">Lorsque les concurrents proposent des offres plus attrayantes en termes</text:span><text:span text:style-name="T139"> </text:span><text:span text:style-name="T113">de</text:span><text:span text:style-name="T140"> </text:span><text:span text:style-name="T113">tarifs,</text:span><text:span text:style-name="T136"> </text:span><text:span text:style-name="T113">de</text:span><text:span text:style-name="T140"> </text:span><text:span text:style-name="T113">services</text:span><text:span text:style-name="T139"> </text:span><text:span text:style-name="T113">ou</text:span><text:span text:style-name="T136"> </text:span><text:span text:style-name="T113">de</text:span><text:span text:style-name="T139"> </text:span><text:span text:style-name="T113">fonctionnalités,</text:span><text:span text:style-name="T136"> </text:span><text:span text:style-name="T113">les</text:span><text:span text:style-name="T139"> </text:span><text:span text:style-name="T113">clients</text:span><text:span text:style-name="T139"> </text:span><text:span text:style-name="T113">peuvent</text:span><text:span text:style-name="T136"> </text:span><text:span text:style-name="T113">être</text:span><text:span text:style-name="T139"> </text:span><text:span text:style-name="T113">tentés</text:span><text:span text:style-name="T139"> </text:span><text:span text:style-name="T113">de</text:span><text:span text:style-name="T139"> </text:span><text:span text:style-name="T113">changer</text:span><text:span text:style-name="T136"> </text:span><text:span text:style-name="T113">de</text:span><text:span text:style-name="T139"> </text:span><text:span text:style-name="T113">fournisseur.</text:span></text:p>
        </text:list-item>
        <text:list-item>
          <text:p text:style-name="P129" loext:marker-style-name="T113"><text:span text:style-name="T132">Manque</text:span><text:span text:style-name="T141"> </text:span><text:span text:style-name="T132">de</text:span><text:span text:style-name="T141"> </text:span><text:span text:style-name="T132">communication</text:span><text:span text:style-name="T141"> </text:span><text:span text:style-name="T132">:</text:span><text:span text:style-name="T142"> </text:span><text:span text:style-name="T113">Une</text:span><text:span text:style-name="T139"> </text:span><text:span text:style-name="T113">communication</text:span><text:span text:style-name="T136"> </text:span><text:span text:style-name="T113">insuffisante</text:span><text:span text:style-name="T136"> </text:span><text:span text:style-name="T113">de</text:span><text:span text:style-name="T140"> </text:span><text:span text:style-name="T113">la</text:span><text:span text:style-name="T136"> </text:span><text:span text:style-name="T113">part</text:span><text:span text:style-name="T136"> </text:span><text:span text:style-name="T113">de</text:span><text:span text:style-name="T136"> </text:span><text:span text:style-name="T113">l'opérateur</text:span><text:span text:style-name="T136"> </text:span><text:span text:style-name="T113">télécom</text:span><text:span text:style-name="T136"> </text:span><text:span text:style-name="T113">avec</text:span><text:span text:style-name="T139"> </text:span><text:span text:style-name="T113">ses clients peut entraîner un sentiment de négligence et de désintérêt, ce qui peut conduire à la perte de</text:span></text:p>
        </text:list-item>
      </text:list>
      <text:p text:style-name="P130">confiance<text:span text:style-name="T47"> </text:span>et à<text:span text:style-name="T42"> </text:span>la<text:span text:style-name="T42"> </text:span>volonté de<text:span text:style-name="T42"> </text:span>changer<text:span text:style-name="T42"> </text:span>de <text:span text:style-name="T39">fournisseur.</text:span></text:p>
      <text:p text:style-name="P131" loext:marker-style-name="T143"/>
      <text:p text:style-name="P132" loext:marker-style-name="T143"><draw:frame draw:style-name="fr2" draw:name="Image 12" text:anchor-type="char" svg:x="2.1772in" svg:y="0.1925in" svg:width="3.9075in" svg:height="1.0799in" draw:z-index="5"><draw:image xlink:href="Pictures/10000001000003AF000000D85ECA4450.png" xlink:type="simple" xlink:show="embed" xlink:actuate="onLoad" draw:mime-type="image/png"/></draw:frame></text:p>
      <text:p text:style-name="P133"/>
      <text:p text:style-name="P134" loext:marker-style-name="T144"><text:bookmark text:name="_bookmark12"/><text:span text:style-name="T145">Figure</text:span><text:span text:style-name="T146"> </text:span><text:span text:style-name="T145">1</text:span><text:span text:style-name="T146"> </text:span><text:span text:style-name="T145">:</text:span><text:span text:style-name="T147"> </text:span><text:span text:style-name="T145">le</text:span><text:span text:style-name="T146"> </text:span><text:span text:style-name="T145">churn</text:span><text:span text:style-name="T147"> </text:span><text:span text:style-name="T145">des</text:span><text:span text:style-name="T148"> clients</text:span></text:p>
      <text:p text:style-name="P135">Le churn a des conséquences néfastes sur les résultats financiers des opérateurs télécoms. En effet, outre la perte de revenus directe causée par le départ des clients, le coût associé à l'acquisition de nouveaux clients pour<text:span text:style-name="T40"> </text:span>remplacer<text:span text:style-name="T39"> </text:span>ceux<text:span text:style-name="T39"> </text:span>perdus<text:span text:style-name="T40"> </text:span>est<text:span text:style-name="T39"> </text:span>souvent<text:span text:style-name="T39"> </text:span>élevé.<text:span text:style-name="T39"> </text:span>De<text:span text:style-name="T42"> </text:span>plus,<text:span text:style-name="T39"> </text:span>le<text:span text:style-name="T39"> </text:span>churn<text:span text:style-name="T40"> </text:span>peut<text:span text:style-name="T39"> </text:span>également<text:span text:style-name="T39"> </text:span>avoir<text:span text:style-name="T39"> </text:span>un<text:span text:style-name="T39"> </text:span>impact<text:span text:style-name="T39"> </text:span>sur l'image</text:p>
      <text:p text:style-name="P136">de<text:span text:style-name="T47"> </text:span>marque<text:span text:style-name="T39"> </text:span>et<text:span text:style-name="T40"> </text:span>la<text:span text:style-name="T47"> </text:span>réputation<text:span text:style-name="T40"> </text:span>de<text:span text:style-name="T47"> </text:span>l'opérateur,<text:span text:style-name="T40"> </text:span>affectant<text:span text:style-name="T42"> </text:span>ainsi<text:span text:style-name="T39"> </text:span>sa<text:span text:style-name="T47"> </text:span>capacité<text:span text:style-name="T47"> </text:span>à<text:span text:style-name="T47"> </text:span>attirer<text:span text:style-name="T39"> </text:span>de<text:span text:style-name="T47"> </text:span>nouveaux<text:span text:style-name="T42"> </text:span>clients<text:span text:style-name="T47"> </text:span>et<text:span text:style-name="T40"> </text:span>à<text:span text:style-name="T39"> </text:span>fidéliser les clients existants. En somme, la réduction du churn est un enjeu crucial pour les opérateurs télécoms afin de garantir leur viabilité économique et leur succès à long terme.</text:p>
      <text:list text:continue-list="list191359033000380" text:style-name="WWNum10">
        <text:list-item>
          <text:list>
            <text:list-item>
              <text:h text:style-name="P137" text:outline-level="4"><text:bookmark text:name="_bookmark13"/>Objectifs<text:span text:style-name="T46"> </text:span>spécifiques<text:span text:style-name="T40"> </text:span>du<text:span text:style-name="T39"> projet</text:span></text:h>
            </text:list-item>
          </text:list>
        </text:list-item>
      </text:list>
      <text:p text:style-name="P138">Les<text:span text:style-name="T39"> </text:span>entreprises<text:span text:style-name="T39"> </text:span>de<text:span text:style-name="T39"> </text:span>télécommunications<text:span text:style-name="T39"> </text:span>cherchent<text:span text:style-name="T42"> </text:span>constamment<text:span text:style-name="T42"> </text:span>à<text:span text:style-name="T42"> </text:span>réduire<text:span text:style-name="T39"> </text:span>leur<text:span text:style-name="T42"> </text:span>taux<text:span text:style-name="T42"> </text:span>de<text:span text:style-name="T39"> </text:span>churn,<text:span text:style-name="T42"> </text:span>c'est-à-dire<text:span text:style-name="T40"> </text:span>la perte<text:span text:style-name="T43"> </text:span>de<text:span text:style-name="T39"> </text:span>clients.<text:span text:style-name="T40"> </text:span>Pour<text:span text:style-name="T40"> </text:span>y<text:span text:style-name="T47"> </text:span>parvenir,<text:span text:style-name="T42"> </text:span>ce<text:span text:style-name="T47"> </text:span>projet<text:span text:style-name="T40"> </text:span>vise<text:span text:style-name="T39"> </text:span>à<text:span text:style-name="T47"> </text:span>développer<text:span text:style-name="T43"> </text:span>un<text:span text:style-name="T40"> </text:span>modèle<text:span text:style-name="T47"> </text:span>de<text:span text:style-name="T39"> </text:span>prédiction<text:span text:style-name="T40"> </text:span>du<text:span text:style-name="T40"> </text:span>churn.<text:span text:style-name="T40"> </text:span>Ce<text:span text:style-name="T39"> </text:span>modèle analysera les données clients afin d'identifier les facteurs influençant la probabilité de départ. Grâce à ces informations, l'entreprise pourra mettre en place des stratégies de fidélisation ciblées pour les clients à</text:p>
      <text:p text:style-name="P139">risque,<text:span text:style-name="T39"> </text:span>améliorant<text:span text:style-name="T42"> </text:span>ainsi<text:span text:style-name="T42"> </text:span>la<text:span text:style-name="T39"> </text:span>satisfaction<text:span text:style-name="T42"> </text:span>client<text:span text:style-name="T42"> </text:span>et<text:span text:style-name="T42"> </text:span>la rentabilité<text:span text:style-name="T42"> </text:span><text:span text:style-name="T39">globale.</text:span></text:p>
      <text:list text:continue-numbering="true" text:style-name="WWNum10">
        <text:list-item>
          <text:list>
            <text:list-item>
              <text:h text:style-name="P140" text:outline-level="4"><text:bookmark text:name="_bookmark14"/>Solution<text:span text:style-name="T39"> proposée</text:span></text:h>
            </text:list-item>
          </text:list>
        </text:list-item>
      </text:list>
      <text:p text:style-name="P141">La solution repose sur l'utilisation de techniques d'apprentissage automatique pour prédire le churn dans le secteur<text:span text:style-name="T47"> </text:span>des<text:span text:style-name="T40"> </text:span>télécommunications.<text:span text:style-name="T39"> </text:span>Nous<text:span text:style-name="T40"> </text:span>avons<text:span text:style-name="T40"> </text:span>sélectionné<text:span text:style-name="T40"> </text:span>des<text:span text:style-name="T40"> </text:span>algorithmes<text:span text:style-name="T40"> </text:span>tels<text:span text:style-name="T40"> </text:span>que<text:span text:style-name="T39"> </text:span>la<text:span text:style-name="T40"> </text:span>Régression<text:span text:style-name="T39"> </text:span>Logistique, les<text:span text:style-name="T47"> </text:span>Arbres de Décision, les Random Forests et les Réseaux Neuronaux.</text:p>
      <text:p text:style-name="P142"/>
      <text:p text:style-name="P143">Pour<text:span text:style-name="T47"> </text:span>implémenter<text:span text:style-name="T47"> </text:span>cette<text:span text:style-name="T43"> </text:span>solution,<text:span text:style-name="T47"> </text:span>nous<text:span text:style-name="T47"> </text:span>utiliserons<text:span text:style-name="T43"> </text:span>Python<text:span text:style-name="T47"> </text:span>et<text:span text:style-name="T47"> </text:span>des<text:span text:style-name="T43"> </text:span>bibliothèques<text:span text:style-name="T43"> </text:span>comme<text:span text:style-name="T43"> </text:span>Numpy,<text:span text:style-name="T47"> </text:span>Pandas<text:span text:style-name="T43"> </text:span>et Scikit-learn.<text:span text:style-name="T39"> </text:span>La<text:span text:style-name="T40"> </text:span>visualisation<text:span text:style-name="T39"> </text:span>des<text:span text:style-name="T40"> </text:span>données<text:span text:style-name="T40"> </text:span>sera<text:span text:style-name="T40"> </text:span>réalisée<text:span text:style-name="T40"> </text:span>avec<text:span text:style-name="T40"> </text:span>Matplotlib<text:span text:style-name="T39"> </text:span>et<text:span text:style-name="T39"> </text:span>Seaborn.<text:span text:style-name="T40"> </text:span>Cette<text:span text:style-name="T42"> </text:span>approche<text:span text:style-name="T40"> </text:span>nous permettra d'identifier les clients à risque de churn, aidant ainsi les entreprises de télécommunications à mettre en place des stratégies de rétention efficaces pour minimiser la perte de clients et améliorer la</text:p>
      <text:p text:style-name="P144">satisfaction<text:span text:style-name="T39"> </text:span>de<text:span text:style-name="T39"> </text:span>la<text:span text:style-name="T42"> </text:span><text:span text:style-name="T39">clientèle.</text:span></text:p>
      <text:p text:style-name="P145" loext:marker-style-name="T143"><draw:frame draw:style-name="fr2" draw:name="Image 13" text:anchor-type="char" svg:x="2.4193in" svg:y="0.1957in" svg:width="3.4043in" svg:height="2.1811in" draw:z-index="6"><draw:image xlink:href="Pictures/1000000000000219000002191622D6D2.jpg" xlink:type="simple" xlink:show="embed" xlink:actuate="onLoad" draw:mime-type="image/jpeg"/><svg:desc>La gestion de la relation client : Le guide définitif [2019]</svg:desc></draw:frame></text:p>
      <text:p text:style-name="P146" loext:marker-style-name="T144"><text:bookmark text:name="_bookmark15"/><text:span text:style-name="T145">Figure</text:span><text:span text:style-name="T146"> </text:span><text:span text:style-name="T145">2</text:span><text:span text:style-name="T146"> </text:span><text:span text:style-name="T145">:</text:span><text:span text:style-name="T147"> </text:span><text:span text:style-name="T145">La</text:span><text:span text:style-name="T146"> </text:span><text:span text:style-name="T145">gestion </text:span><text:span text:style-name="T148">clientèles</text:span></text:p>
      <text:list xml:id="list191358187167072" text:continue-numbering="true" text:style-name="WWNum10">
        <text:list-item>
          <text:list>
            <text:list-item>
              <text:h text:style-name="P147" text:outline-level="4"><text:bookmark text:name="_bookmark16"/>Planification<text:span text:style-name="T43"> </text:span>générale<text:span text:style-name="T43"> </text:span>du<text:span text:style-name="T46"> </text:span><text:span text:style-name="T39">projet</text:span></text:h>
            </text:list-item>
          </text:list>
        </text:list-item>
      </text:list>
      <text:p text:style-name="P148" loext:marker-style-name="T149"><draw:frame draw:style-name="fr3" draw:name="Image 14" text:anchor-type="char" svg:x="0.5in" svg:y="0.4925in" svg:width="6.8366in" svg:height="3.2783in" draw:z-index="92"><draw:image xlink:href="Pictures/10000000000003E70000022E37F5C892.jpg" xlink:type="simple" xlink:show="embed" xlink:actuate="onLoad" draw:mime-type="image/jpeg"/></draw:frame><text:span text:style-name="T150">Le</text:span><text:span text:style-name="T151"> </text:span><text:span text:style-name="T150">projet</text:span><text:span text:style-name="T152"> </text:span><text:span text:style-name="T150">sera</text:span><text:span text:style-name="T153"> </text:span><text:span text:style-name="T150">réalisé</text:span><text:span text:style-name="T153"> </text:span><text:span text:style-name="T150">en</text:span><text:span text:style-name="T152"> </text:span><text:span text:style-name="T150">suivant</text:span><text:span text:style-name="T152"> </text:span><text:span text:style-name="T150">le</text:span><text:span text:style-name="T153"> </text:span><text:span text:style-name="T150">modèle</text:span><text:span text:style-name="T152"> </text:span><text:span text:style-name="T150">CRISP-DM</text:span><text:span text:style-name="T153"> </text:span><text:span text:style-name="T150">et</text:span><text:span text:style-name="T153"> </text:span><text:span text:style-name="T150">sera</text:span><text:span text:style-name="T153"> </text:span><text:span text:style-name="T150">divisé</text:span><text:span text:style-name="T152"> </text:span><text:span text:style-name="T150">en</text:span><text:span text:style-name="T153"> </text:span><text:span text:style-name="T150">plusieurs</text:span><text:span text:style-name="T152"> </text:span><text:span text:style-name="T150">phases</text:span><text:span text:style-name="T152"> </text:span><text:span text:style-name="T150">distinctes</text:span><text:span text:style-name="T154"> </text:span><text:span text:style-name="T155">:</text:span></text:p>
      <text:p text:style-name="P149" loext:marker-style-name="T149"/>
      <text:p text:style-name="P149" loext:marker-style-name="T149"/>
      <text:p text:style-name="P149" loext:marker-style-name="T149"/>
      <text:p text:style-name="P150" loext:marker-style-name="T149"/>
      <text:p text:style-name="P151" loext:marker-style-name="T156"><text:span text:style-name="T157"></text:span><text:span text:style-name="T157"/></text:p>
      <text:p text:style-name="P152" loext:marker-style-name="T158"/>
      <text:p text:style-name="P152" loext:marker-style-name="T158"/>
      <text:p text:style-name="P152" loext:marker-style-name="T158"/>
      <text:p text:style-name="P152" loext:marker-style-name="T158"/>
      <text:p text:style-name="P152" loext:marker-style-name="T158"/>
      <text:p text:style-name="P152" loext:marker-style-name="T158"/>
      <text:p text:style-name="P152" loext:marker-style-name="T158"/>
      <text:p text:style-name="P152" loext:marker-style-name="T158"/>
      <text:p text:style-name="P152" loext:marker-style-name="T158"/>
      <text:p text:style-name="P152" loext:marker-style-name="T158"/>
      <text:p text:style-name="P152" loext:marker-style-name="T158"/>
      <text:p text:style-name="P153" loext:marker-style-name="T158"/>
      <text:p text:style-name="P154" loext:marker-style-name="T144"><text:bookmark text:name="_bookmark17"/><text:span text:style-name="T145">Figure</text:span><text:span text:style-name="T148"> </text:span><text:span text:style-name="T145">3:</text:span><text:span text:style-name="T148"> </text:span><text:span text:style-name="T145">modèle</text:span><text:span text:style-name="T148"> </text:span><text:span text:style-name="T145">CRISP-</text:span><text:span text:style-name="T159">DM</text:span></text:p>
      <text:p text:style-name="P155" loext:marker-style-name="T144"/>
      <text:p text:style-name="P156" loext:marker-style-name="T113"><text:span text:style-name="T160">Compréhension</text:span><text:span text:style-name="T161"> </text:span><text:span text:style-name="T160">des</text:span><text:span text:style-name="T162"> </text:span><text:span text:style-name="T160">affaires</text:span><text:span text:style-name="T162"> </text:span><text:span text:style-name="T113">: Identifier</text:span><text:span text:style-name="T137"> </text:span><text:span text:style-name="T113">les</text:span><text:span text:style-name="T137"> </text:span><text:span text:style-name="T113">objectifs</text:span><text:span text:style-name="T138"> </text:span><text:span text:style-name="T113">et</text:span><text:span text:style-name="T137"> </text:span><text:span text:style-name="T113">les</text:span><text:span text:style-name="T137"> </text:span><text:span text:style-name="T113">exigences</text:span><text:span text:style-name="T137"> </text:span><text:span text:style-name="T113">du </text:span><text:span text:style-name="T137">projet.</text:span></text:p>
      <text:list text:style-name="WWNum12">
        <text:list-item>
          <text:p text:style-name="P157" loext:marker-style-name="T156"><text:span text:style-name="T160">Compréhension des</text:span><text:span text:style-name="T163"> </text:span><text:span text:style-name="T160">données</text:span><text:span text:style-name="T161"> </text:span><text:span text:style-name="T160">:</text:span><text:span text:style-name="T164"> </text:span><text:span text:style-name="T113">Collecter,</text:span><text:span text:style-name="T137"> </text:span><text:span text:style-name="T113">décrire</text:span><text:span text:style-name="T138"> </text:span><text:span text:style-name="T113">et</text:span><text:span text:style-name="T137"> </text:span><text:span text:style-name="T113">explorer</text:span><text:span text:style-name="T137"> </text:span><text:span text:style-name="T113">les</text:span><text:span text:style-name="T137"> </text:span><text:span text:style-name="T113">données</text:span><text:span text:style-name="T138"> </text:span><text:span text:style-name="T137">disponibles.</text:span></text:p>
        </text:list-item>
        <text:list-item>
          <text:p text:style-name="P158" loext:marker-style-name="T156"><text:span text:style-name="T160">Préparation</text:span><text:span text:style-name="T162"> </text:span><text:span text:style-name="T160">des</text:span><text:span text:style-name="T164"> </text:span><text:span text:style-name="T160">données</text:span><text:span text:style-name="T162"> </text:span><text:span text:style-name="T160">:</text:span><text:span text:style-name="T165"> </text:span><text:span text:style-name="T113">Nettoyer</text:span><text:span text:style-name="T136"> </text:span><text:span text:style-name="T113">et</text:span><text:span text:style-name="T136"> </text:span><text:span text:style-name="T113">transformer</text:span><text:span text:style-name="T136"> </text:span><text:span text:style-name="T113">les</text:span><text:span text:style-name="T136"> </text:span><text:span text:style-name="T113">données</text:span><text:span text:style-name="T136"> </text:span><text:span text:style-name="T113">pour</text:span><text:span text:style-name="T136"> </text:span><text:span text:style-name="T113">les</text:span><text:span text:style-name="T136"> </text:span><text:span text:style-name="T113">rendre</text:span><text:span text:style-name="T140"> </text:span><text:span text:style-name="T113">utilisables</text:span><text:span text:style-name="T136"> </text:span><text:span text:style-name="T113">par</text:span><text:span text:style-name="T136"> </text:span><text:span text:style-name="T113">les </text:span><text:span text:style-name="T137">modèles.</text:span></text:p>
        </text:list-item>
        <text:list-item>
          <text:p text:style-name="P159" loext:marker-style-name="T156"><text:span text:style-name="T160">Modélisation</text:span><text:span text:style-name="T161"> </text:span><text:span text:style-name="T160">:</text:span><text:span text:style-name="T162"> </text:span><text:span text:style-name="T113">Sélectionner</text:span><text:span text:style-name="T138"> </text:span><text:span text:style-name="T113">et</text:span><text:span text:style-name="T138"> </text:span><text:span text:style-name="T113">appliquer</text:span><text:span text:style-name="T138"> </text:span><text:span text:style-name="T113">des</text:span><text:span text:style-name="T138"> </text:span><text:span text:style-name="T113">techniques</text:span><text:span text:style-name="T138"> </text:span><text:span text:style-name="T113">de</text:span><text:span text:style-name="T136"> </text:span><text:span text:style-name="T113">modélisation</text:span><text:span text:style-name="T138"> </text:span><text:span text:style-name="T137">appropriées.</text:span></text:p>
        </text:list-item>
        <text:list-item>
          <text:p text:style-name="P160" loext:marker-style-name="T156"><text:span text:style-name="T160">Évaluation</text:span><text:span text:style-name="T162"> </text:span><text:span text:style-name="T160">:</text:span><text:span text:style-name="T162"> </text:span><text:span text:style-name="T113">Évaluer</text:span><text:span text:style-name="T136"> </text:span><text:span text:style-name="T113">les modèles</text:span><text:span text:style-name="T138"> </text:span><text:span text:style-name="T113">pour</text:span><text:span text:style-name="T137"> </text:span><text:span text:style-name="T113">déterminer leur</text:span><text:span text:style-name="T137"> </text:span><text:span text:style-name="T113">performance</text:span><text:span text:style-name="T137"> </text:span><text:span text:style-name="T113">et</text:span><text:span text:style-name="T138"> </text:span><text:span text:style-name="T113">leur</text:span><text:span text:style-name="T166"> </text:span><text:span text:style-name="T137">pertinence.</text:span></text:p>
        </text:list-item>
        <text:list-item>
          <text:p text:style-name="P161" loext:marker-style-name="T167"><text:span text:style-name="T160">Déploiement</text:span><text:span text:style-name="T164"> </text:span><text:span text:style-name="T160">:</text:span><text:span text:style-name="T162"> </text:span><text:span text:style-name="T113">Implémenter</text:span><text:span text:style-name="T136"> </text:span><text:span text:style-name="T113">le</text:span><text:span text:style-name="T138"> </text:span><text:span text:style-name="T113">modèle</text:span><text:span text:style-name="T138"> </text:span><text:span text:style-name="T113">dans</text:span><text:span text:style-name="T138"> </text:span><text:span text:style-name="T113">un environnement</text:span><text:span text:style-name="T138"> </text:span><text:span text:style-name="T113">opérationnel</text:span><text:span text:style-name="T138"> </text:span><text:span text:style-name="T113">pour</text:span><text:span text:style-name="T138"> </text:span><text:span text:style-name="T113">une</text:span><text:span text:style-name="T137"> </text:span><text:span text:style-name="T113">utilisation</text:span><text:span text:style-name="T138"> </text:span><text:span text:style-name="T137">réelle.</text:span></text:p>
        </text:list-item>
      </text:list>
      <text:p text:style-name="P162">Cette<text:span text:style-name="T47"> </text:span>approche<text:span text:style-name="T47"> </text:span>méthodique<text:span text:style-name="T40"> </text:span>garantira<text:span text:style-name="T47"> </text:span>le<text:span text:style-name="T40"> </text:span>développement<text:span text:style-name="T40"> </text:span>d'une<text:span text:style-name="T47"> </text:span>solution<text:span text:style-name="T40"> </text:span>robuste<text:span text:style-name="T47"> </text:span>pour<text:span text:style-name="T47"> </text:span>prédire<text:span text:style-name="T47"> </text:span>le<text:span text:style-name="T40"> </text:span>churn<text:span text:style-name="T39"> </text:span>dans<text:span text:style-name="T47"> </text:span>le secteur des télécommunications, permettant ainsi aux entreprises de mettre en place des stratégies de</text:p>
      <text:p text:style-name="P144">rétention<text:span text:style-name="T39"> </text:span>de<text:span text:style-name="T39"> </text:span>clients<text:span text:style-name="T40"> </text:span>plus<text:span text:style-name="T39"> efficaces.</text:span></text:p>
      <text:list text:continue-list="list191358187167072" text:style-name="WWNum10">
        <text:list-item>
          <text:list>
            <text:list-item>
              <text:h text:style-name="P163" text:outline-level="4"><text:bookmark text:name="_bookmark18"/>Risques<text:span text:style-name="T47"> </text:span>et<text:span text:style-name="T40"> </text:span>Mesures<text:span text:style-name="T40"> </text:span><text:span text:style-name="T39">d'Atténuation</text:span></text:h>
            </text:list-item>
          </text:list>
        </text:list-item>
      </text:list>
      <text:p text:style-name="P164" loext:marker-style-name="T168"/>
      <text:list xml:id="list191358484522424" text:continue-numbering="true" text:style-name="WWNum10">
        <text:list-item>
          <text:list>
            <text:list-item>
              <text:list>
                <text:list-item>
                  <text:h text:style-name="P165" text:outline-level="5" loext:marker-style-name="T169">Risques <text:span text:style-name="T170">:</text:span><text:span text:style-name="T170"/></text:h>
                </text:list-item>
              </text:list>
            </text:list-item>
          </text:list>
        </text:list-item>
      </text:list>
      <text:list text:style-name="WWNum13">
        <text:list-item>
          <text:p text:style-name="P166" loext:marker-style-name="T113"><text:span text:style-name="T160">Disponibilité</text:span><text:span text:style-name="T165"> </text:span><text:span text:style-name="T160">des</text:span><text:span text:style-name="T164"> </text:span><text:span text:style-name="T160">données</text:span><text:span text:style-name="T164"> </text:span><text:span text:style-name="T160">:</text:span><text:span text:style-name="T161"> </text:span><text:span text:style-name="T113">Les</text:span><text:span text:style-name="T136"> </text:span><text:span text:style-name="T113">données</text:span><text:span text:style-name="T136"> </text:span><text:span text:style-name="T113">clients</text:span><text:span text:style-name="T136"> </text:span><text:span text:style-name="T113">peuvent</text:span><text:span text:style-name="T137"> </text:span><text:span text:style-name="T113">ne</text:span><text:span text:style-name="T137"> </text:span><text:span text:style-name="T113">pas être</text:span><text:span text:style-name="T139"> </text:span><text:span text:style-name="T113">disponibles</text:span><text:span text:style-name="T136"> </text:span><text:span text:style-name="T113">ou</text:span><text:span text:style-name="T137"> </text:span><text:span text:style-name="T113">de</text:span><text:span text:style-name="T136"> </text:span><text:span text:style-name="T113">qualité </text:span><text:span text:style-name="T137">insuffisante.</text:span></text:p>
        </text:list-item>
        <text:list-item>
          <text:p text:style-name="P167" loext:marker-style-name="T113"><text:span text:style-name="T160">Performance</text:span><text:span text:style-name="T164"> </text:span><text:span text:style-name="T160">du</text:span><text:span text:style-name="T162"> </text:span><text:span text:style-name="T160">modèle</text:span><text:span text:style-name="T162"> </text:span><text:span text:style-name="T160">:</text:span><text:span text:style-name="T162"> </text:span><text:span text:style-name="T113">Le</text:span><text:span text:style-name="T139"> </text:span><text:span text:style-name="T113">modèle</text:span><text:span text:style-name="T137"> </text:span><text:span text:style-name="T113">développé</text:span><text:span text:style-name="T136"> </text:span><text:span text:style-name="T113">peut</text:span><text:span text:style-name="T137"> </text:span><text:span text:style-name="T113">manquer</text:span><text:span text:style-name="T137"> </text:span><text:span text:style-name="T113">de</text:span><text:span text:style-name="T136"> </text:span><text:span text:style-name="T113">performance</text:span><text:span text:style-name="T136"> </text:span><text:span text:style-name="T113">et</text:span><text:span text:style-name="T137"> </text:span><text:span text:style-name="T113">ne</text:span><text:span text:style-name="T136"> </text:span><text:span text:style-name="T113">pas</text:span><text:span text:style-name="T136"> </text:span><text:span text:style-name="T113">être</text:span><text:span text:style-name="T136"> </text:span><text:span text:style-name="T113">en mesure de prédire avec précision le churn.</text:span></text:p>
        </text:list-item>
        <text:list-item>
          <text:p text:style-name="P168" loext:marker-style-name="T113"><text:span text:style-name="T160">Adoption</text:span><text:span text:style-name="T162"> </text:span><text:span text:style-name="T160">du</text:span><text:span text:style-name="T162"> </text:span><text:span text:style-name="T160">modèle</text:span><text:span text:style-name="T162"> </text:span><text:span text:style-name="T160">:</text:span><text:span text:style-name="T162"> </text:span><text:span text:style-name="T113">Le</text:span><text:span text:style-name="T139"> </text:span><text:span text:style-name="T113">modèle</text:span><text:span text:style-name="T136"> </text:span><text:span text:style-name="T113">peut</text:span><text:span text:style-name="T137"> </text:span><text:span text:style-name="T113">ne</text:span><text:span text:style-name="T137"> </text:span><text:span text:style-name="T113">pas</text:span><text:span text:style-name="T136"> </text:span><text:span text:style-name="T113">être</text:span><text:span text:style-name="T139"> </text:span><text:span text:style-name="T113">adopté</text:span><text:span text:style-name="T137"> </text:span><text:span text:style-name="T113">par</text:span><text:span text:style-name="T137"> </text:span><text:span text:style-name="T113">les</text:span><text:span text:style-name="T136"> </text:span><text:span text:style-name="T113">équipes</text:span><text:span text:style-name="T138"> </text:span><text:span text:style-name="T113">métier,</text:span><text:span text:style-name="T137"> </text:span><text:span text:style-name="T113">compromettant</text:span><text:span text:style-name="T137"> </text:span><text:span text:style-name="T113">ainsi</text:span><text:span text:style-name="T137"> </text:span><text:span text:style-name="T113">son </text:span><text:span text:style-name="T137">utilité.</text:span></text:p>
        </text:list-item>
      </text:list>
      <text:list xml:id="list191358764177725" text:continue-list="list191358484522424" text:style-name="WWNum10">
        <text:list-item>
          <text:list>
            <text:list-item>
              <text:list>
                <text:list-item>
                  <text:h text:style-name="P169" text:outline-level="5" loext:marker-style-name="T171">Mesures<text:span text:style-name="T44"> </text:span>d'Atténuation<text:span text:style-name="T45"> </text:span><text:span text:style-name="T41">:</text:span></text:h>
                </text:list-item>
              </text:list>
            </text:list-item>
          </text:list>
        </text:list-item>
      </text:list>
      <text:list text:style-name="WWNum14">
        <text:list-item>
          <text:p text:style-name="P170" loext:marker-style-name="T113"><text:span text:style-name="T160">Collecte</text:span><text:span text:style-name="T162"> </text:span><text:span text:style-name="T160">et</text:span><text:span text:style-name="T162"> </text:span><text:span text:style-name="T160">Consolidation</text:span><text:span text:style-name="T161"> </text:span><text:span text:style-name="T160">des</text:span><text:span text:style-name="T164"> </text:span><text:span text:style-name="T160">Données</text:span><text:span text:style-name="T172"> </text:span><text:span text:style-name="T160">:</text:span><text:span text:style-name="T164"> </text:span><text:span text:style-name="T113">Mettre</text:span><text:span text:style-name="T136"> </text:span><text:span text:style-name="T113">en</text:span><text:span text:style-name="T137"> </text:span><text:span text:style-name="T113">place</text:span><text:span text:style-name="T137"> </text:span><text:span text:style-name="T113">un</text:span><text:span text:style-name="T137"> </text:span><text:span text:style-name="T113">processus</text:span><text:span text:style-name="T137"> </text:span><text:span text:style-name="T113">rigoureux</text:span><text:span text:style-name="T137"> </text:span><text:span text:style-name="T113">de</text:span><text:span text:style-name="T137"> </text:span><text:span text:style-name="T113">collecte</text:span><text:span text:style-name="T137"> </text:span><text:span text:style-name="T113">et</text:span><text:span text:style-name="T138"> </text:span><text:span text:style-name="T140">de</text:span></text:p>
        </text:list-item>
      </text:list>
      <text:p text:style-name="P171">consolidation<text:span text:style-name="T40"> </text:span>des<text:span text:style-name="T47"> </text:span>données<text:span text:style-name="T47"> </text:span>clients<text:span text:style-name="T47"> </text:span>à<text:span text:style-name="T40"> </text:span>partir<text:span text:style-name="T40"> </text:span>de<text:span text:style-name="T43"> </text:span>différentes<text:span text:style-name="T47"> </text:span>sources,<text:span text:style-name="T42"> </text:span>afin<text:span text:style-name="T40"> </text:span>de<text:span text:style-name="T43"> </text:span>garantir<text:span text:style-name="T40"> </text:span>leur<text:span text:style-name="T40"> </text:span>disponibilité<text:span text:style-name="T40"> </text:span>et<text:span text:style-name="T40"> </text:span>leur <text:span text:style-name="T39">qualité.</text:span></text:p>
      <text:list text:continue-numbering="true" text:style-name="WWNum14">
        <text:list-item>
          <text:p text:style-name="P172" loext:marker-style-name="T113"><text:span text:style-name="T160">Choix</text:span><text:span text:style-name="T165"> </text:span><text:span text:style-name="T160">d'Algorithmes</text:span><text:span text:style-name="T162"> </text:span><text:span text:style-name="T160">Robustes :</text:span><text:span text:style-name="T162"> </text:span><text:span text:style-name="T113">Opter</text:span><text:span text:style-name="T137"> </text:span><text:span text:style-name="T113">pour</text:span><text:span text:style-name="T138"> </text:span><text:span text:style-name="T113">des</text:span><text:span text:style-name="T136"> </text:span><text:span text:style-name="T113">algorithmes</text:span><text:span text:style-name="T137"> </text:span><text:span text:style-name="T113">d'apprentissage</text:span><text:span text:style-name="T139"> </text:span><text:span text:style-name="T113">automatique</text:span><text:span text:style-name="T137"> </text:span><text:span text:style-name="T113">éprouvés</text:span><text:span text:style-name="T137"> </text:span><text:span text:style-name="T140">et</text:span></text:p>
        </text:list-item>
      </text:list>
      <text:p text:style-name="P173">robustes,<text:span text:style-name="T40"> </text:span>ayant<text:span text:style-name="T40"> </text:span>démontré<text:span text:style-name="T39"> </text:span>leur<text:span text:style-name="T43"> </text:span>efficacité<text:span text:style-name="T47"> </text:span>dans<text:span text:style-name="T47"> </text:span>des<text:span text:style-name="T42"> </text:span>cas<text:span text:style-name="T47"> </text:span>d'utilisation<text:span text:style-name="T40"> </text:span>similaires,<text:span text:style-name="T40"> </text:span>afin<text:span text:style-name="T40"> </text:span>d'assurer<text:span text:style-name="T40"> </text:span>la<text:span text:style-name="T43"> </text:span>performance<text:span text:style-name="T47"> </text:span>du <text:span text:style-name="T39">modèle.</text:span></text:p>
      <text:list xml:id="list191358414163531" text:continue-numbering="true" text:style-name="WWNum14">
        <text:list-item>
          <text:p text:style-name="P172" loext:marker-style-name="T113"><text:span text:style-name="T160">Implication</text:span><text:span text:style-name="T161"> </text:span><text:span text:style-name="T160">des</text:span><text:span text:style-name="T164"> </text:span><text:span text:style-name="T160">Équipes</text:span><text:span text:style-name="T164"> </text:span><text:span text:style-name="T160">Métier</text:span><text:span text:style-name="T173"> </text:span><text:span text:style-name="T160">:</text:span><text:span text:style-name="T161"> </text:span><text:span text:style-name="T113">Impliquer</text:span><text:span text:style-name="T138"> </text:span><text:span text:style-name="T113">activement</text:span><text:span text:style-name="T137"> </text:span><text:span text:style-name="T113">les</text:span><text:span text:style-name="T136"> </text:span><text:span text:style-name="T113">équipes</text:span><text:span text:style-name="T136"> </text:span><text:span text:style-name="T113">métier</text:span><text:span text:style-name="T137"> </text:span><text:span text:style-name="T113">tout</text:span><text:span text:style-name="T137"> </text:span><text:span text:style-name="T113">au</text:span><text:span text:style-name="T137"> </text:span><text:span text:style-name="T113">long</text:span><text:span text:style-name="T138"> </text:span><text:span text:style-name="T140">du</text:span></text:p>
        </text:list-item>
      </text:list>
      <text:p text:style-name="P174">développement<text:span text:style-name="T40"> </text:span>du<text:span text:style-name="T40"> </text:span>modèle,<text:span text:style-name="T40"> </text:span>en<text:span text:style-name="T40"> </text:span>leur<text:span text:style-name="T43"> </text:span>offrant<text:span text:style-name="T40"> </text:span>une<text:span text:style-name="T40"> </text:span>compréhension<text:span text:style-name="T40"> </text:span>approfondie<text:span text:style-name="T43"> </text:span>de<text:span text:style-name="T47"> </text:span>son<text:span text:style-name="T40"> </text:span>fonctionnement<text:span text:style-name="T40"> </text:span>et<text:span text:style-name="T40"> </text:span>de<text:span text:style-name="T47"> </text:span>ses avantages potentiels, afin de favoriser son adoption et son intégration dans les processus opérationnels.</text:p>
      <text:p text:style-name="P175">En<text:span text:style-name="T39"> </text:span>mettant<text:span text:style-name="T39"> </text:span>en<text:span text:style-name="T39"> </text:span>œuvre<text:span text:style-name="T42"> </text:span>ces mesures<text:span text:style-name="T40"> </text:span>d'atténuation,<text:span text:style-name="T39"> </text:span>nous<text:span text:style-name="T40"> </text:span>visons<text:span text:style-name="T40"> </text:span>à<text:span text:style-name="T39"> </text:span>minimiser<text:span text:style-name="T39"> </text:span>les<text:span text:style-name="T40"> </text:span>risques<text:span text:style-name="T40"> </text:span>associés<text:span text:style-name="T40"> </text:span>au<text:span text:style-name="T39"> </text:span>projet<text:span text:style-name="T39"> </text:span>et<text:span text:style-name="T39"> </text:span>à garantir le succès de la mise en œuvre du modèle de prédiction de la perte de clients dans le secteur des</text:p>
      <text:p text:style-name="P176">télécommunications.</text:p>
      <text:list text:continue-list="list191358764177725" text:style-name="WWNum10">
        <text:list-item>
          <text:list>
            <text:list-item>
              <text:h text:style-name="P177" text:outline-level="4"><text:bookmark text:name="_bookmark19"/>Conclusion</text:h>
            </text:list-item>
          </text:list>
        </text:list-item>
      </text:list>
      <text:p text:style-name="P178" loext:marker-style-name="T174"><text:span text:style-name="T175">En conclusion, le développement d'un modèle de prédiction de la perte de clients représente un projet d'une grande importance pour les opérateurs télécoms. Les bénéfices potentiels,</text:span><text:span text:style-name="T176"> </text:span><text:span text:style-name="T175">tels</text:span><text:span text:style-name="T177"> </text:span><text:span text:style-name="T175">que</text:span><text:span text:style-name="T177"> </text:span><text:span text:style-name="T175">la</text:span><text:span text:style-name="T176"> </text:span><text:span text:style-name="T175">réduction</text:span><text:span text:style-name="T177"> </text:span><text:span text:style-name="T175">du</text:span><text:span text:style-name="T177"> </text:span><text:span text:style-name="T175">churn, l'augmentation</text:span><text:span text:style-name="T176"> </text:span><text:span text:style-name="T175">de</text:span><text:span text:style-name="T177"> </text:span><text:span text:style-name="T175">la</text:span><text:span text:style-name="T177"> </text:span><text:span text:style-name="T175">satisfaction</text:span><text:span text:style-name="T177"> </text:span><text:span text:style-name="T175">client</text:span><text:span text:style-name="T177"> </text:span><text:span text:style-name="T175">et</text:span><text:span text:style-name="T177"> </text:span><text:span text:style-name="T175">l'amélioration des performances financières, sont significatifs. Cependant, il est crucial de planifier soigneusement le projet et de prendre en compte les risques potentiels, tels que la disponibilité des données, la performance du modèle et l'adoption par les équipes métier. En adoptant une approche méthodique et en mettant en place des mesures d'atténuation appropriées, les opérateurs</text:span><text:span text:style-name="T178"> </text:span><text:span text:style-name="T175">télécoms</text:span><text:span text:style-name="T179"> </text:span><text:span text:style-name="T175">peuvent</text:span><text:span text:style-name="T179"> </text:span><text:span text:style-name="T175">maximiser</text:span><text:span text:style-name="T178"> </text:span><text:span text:style-name="T175">les</text:span><text:span text:style-name="T178"> </text:span><text:span text:style-name="T175">chances</text:span><text:span text:style-name="T178"> </text:span><text:span text:style-name="T175">de</text:span><text:span text:style-name="T179"> </text:span><text:span text:style-name="T175">succès</text:span><text:span text:style-name="T180"> </text:span><text:span text:style-name="T175">de</text:span><text:span text:style-name="T179"> </text:span><text:span text:style-name="T175">leur</text:span><text:span text:style-name="T178"> </text:span><text:span text:style-name="T175">initiative</text:span><text:span text:style-name="T179"> </text:span><text:span text:style-name="T175">de</text:span><text:span text:style-name="T179"> </text:span><text:span text:style-name="T175">prédiction</text:span><text:span text:style-name="T178"> </text:span><text:span text:style-name="T175">de la perte de clients.</text:span></text:p>
      <text:h text:style-name="P179" text:outline-level="3" loext:marker-style-name="T73"><text:bookmark text:name="_bookmark20"/><text:span text:style-name="T126">CHAPITRE</text:span><text:span text:style-name="T127"> </text:span><text:span text:style-name="T126">2</text:span><text:span text:style-name="T127"> </text:span><text:span text:style-name="T126">:</text:span><text:span text:style-name="T181"> </text:span><text:span text:style-name="T126">ÉLABORATION</text:span><text:span text:style-name="T182"> </text:span><text:span text:style-name="T126">DU</text:span><text:span text:style-name="T127"> </text:span><text:span text:style-name="T126">CAHIER</text:span><text:span text:style-name="T182"> </text:span><text:span text:style-name="T126">DE</text:span><text:span text:style-name="T73"> </text:span><text:span text:style-name="T130">CHARGE</text:span></text:h>
      <text:p text:style-name="P180" loext:marker-style-name="T168"/>
      <text:list text:style-name="WWNum15">
        <text:list-item>
          <text:list>
            <text:list-item>
              <text:h text:style-name="P181" text:outline-level="4"><text:bookmark text:name="_bookmark21"/>Introduction</text:h>
            </text:list-item>
          </text:list>
        </text:list-item>
      </text:list>
      <text:p text:style-name="P182">L'objectif des études sur le churn est la détection des individus qui ont l'intention de quitter l'organisation afin<text:span text:style-name="T39"> </text:span>d'améliorer<text:span text:style-name="T39"> </text:span>la<text:span text:style-name="T47"> </text:span>prise<text:span text:style-name="T40"> </text:span>de<text:span text:style-name="T40"> </text:span>décision<text:span text:style-name="T39"> </text:span>et<text:span text:style-name="T39"> </text:span>de<text:span text:style-name="T39"> </text:span>mettre<text:span text:style-name="T40"> </text:span>en place<text:span text:style-name="T40"> </text:span>des actions<text:span text:style-name="T40"> </text:span>de<text:span text:style-name="T40"> </text:span>rétention.<text:span text:style-name="T39"> </text:span>La<text:span text:style-name="T47"> </text:span>problématique<text:span text:style-name="T42"> </text:span>est<text:span text:style-name="T39"> </text:span>donc la même pour ces deux phénomènes qui sont souvent analysés à l'aide de techniques prédictives similaires<text:span text:style-name="T183"> </text:span>du data mining.</text:p>
      <text:list xml:id="list191357903581300" text:continue-numbering="true" text:style-name="WWNum15">
        <text:list-item>
          <text:list>
            <text:list-item>
              <text:h text:style-name="P183" text:outline-level="4"><text:bookmark text:name="_bookmark22"/>Étude<text:span text:style-name="T39"> </text:span>de<text:span text:style-name="T39"> l'existence</text:span></text:h>
            </text:list-item>
          </text:list>
        </text:list-item>
      </text:list>
      <text:list text:style-name="WWNum16">
        <text:list-item>
          <text:p text:style-name="P184" loext:marker-style-name="T184"><text:span text:style-name="T184">Le</text:span><text:span text:style-name="T185"> </text:span><text:span text:style-name="T184">Data</text:span><text:span text:style-name="T186"> </text:span><text:span text:style-name="T185">Mining</text:span></text:p>
        </text:list-item>
      </text:list>
      <text:p text:style-name="P185" loext:marker-style-name="T184"/>
      <text:p text:style-name="P186">Le Data Mining (littéralement "forage des données") couvre l'ensemble des outils et méthodes qui permettent<text:span text:style-name="T40"> </text:span>d'extraire<text:span text:style-name="T43"> </text:span>des<text:span text:style-name="T42"> </text:span>connaissances<text:span text:style-name="T40"> </text:span>à<text:span text:style-name="T47"> </text:span>partir<text:span text:style-name="T40"> </text:span>de<text:span text:style-name="T40"> </text:span>grandes<text:span text:style-name="T40"> </text:span>quantités<text:span text:style-name="T40"> </text:span>de<text:span text:style-name="T43"> </text:span>données.<text:span text:style-name="T42"> </text:span>Il<text:span text:style-name="T40"> </text:span>permet<text:span text:style-name="T40"> </text:span>à<text:span text:style-name="T40"> </text:span>une<text:span text:style-name="T40"> </text:span>entreprise de mieux comprendre ses clients, découvrir des niches rentables, optimiser son offre, cibler finement ses actions marketing, et plus encore.</text:p>
      <text:p text:style-name="P131" loext:marker-style-name="T143"><draw:frame draw:style-name="fr2" draw:name="Image 15" text:anchor-type="char" svg:x="2.4429in" svg:y="0.1783in" svg:width="3.3571in" svg:height="1.2543in" draw:z-index="7"><draw:image xlink:href="Pictures/10000000000001F00000011848EDB81E.jpg" xlink:type="simple" xlink:show="embed" xlink:actuate="onLoad" draw:mime-type="image/jpeg"/><svg:desc>Qu'est-ce que le Data Mining? La définition | MBA ESG</svg:desc></draw:frame></text:p>
      <text:p text:style-name="P187" loext:marker-style-name="T144"><text:bookmark text:name="_bookmark23"/><text:span text:style-name="T145">Figure</text:span><text:span text:style-name="T146"> </text:span><text:span text:style-name="T145">4</text:span><text:span text:style-name="T146"> </text:span><text:span text:style-name="T145">:</text:span><text:span text:style-name="T148"> </text:span><text:span text:style-name="T145">Data</text:span><text:span text:style-name="T146"> </text:span><text:span text:style-name="T148">Mining</text:span></text:p>
      <text:p text:style-name="P188" loext:marker-style-name="T144"/>
      <text:list text:continue-numbering="true" text:style-name="WWNum16">
        <text:list-item>
          <text:h text:style-name="P189" text:outline-level="7">Machine<text:span text:style-name="T39"> Learning</text:span></text:h>
        </text:list-item>
      </text:list>
      <text:p text:style-name="P190" loext:marker-style-name="T187"/>
      <text:p text:style-name="P191" loext:marker-style-name="T104"><text:span text:style-name="T104">L'apprentissage</text:span><text:span text:style-name="T188"> </text:span><text:span text:style-name="T104">automatique,</text:span><text:span text:style-name="T188"> </text:span><text:span text:style-name="T104">également</text:span><text:span text:style-name="T188"> </text:span><text:span text:style-name="T104">connu</text:span><text:span text:style-name="T188"> </text:span><text:span text:style-name="T104">sous</text:span><text:span text:style-name="T106"> </text:span><text:span text:style-name="T104">le</text:span><text:span text:style-name="T188"> </text:span><text:span text:style-name="T104">nom</text:span><text:span text:style-name="T109"> </text:span><text:span text:style-name="T104">de</text:span><text:span text:style-name="T107"> </text:span><text:span text:style-name="T104">machine</text:span><text:span text:style-name="T188"> </text:span><text:span text:style-name="T104">learning,</text:span><text:span text:style-name="T188"> </text:span><text:span text:style-name="T104">est</text:span><text:span text:style-name="T107"> </text:span><text:span text:style-name="T104">une</text:span><text:span text:style-name="T188"> </text:span><text:span text:style-name="T104">discipline</text:span><text:span text:style-name="T188"> </text:span><text:span text:style-name="T104">de</text:span><text:span text:style-name="T107"> </text:span><text:span text:style-name="T104">l'intelligence artificielle qui permet aux ordinateurs d'agir sans être explicitement programmés. Il s'appuie sur des approches mathématiques et statistiques pour permettre aux systèmes d'apprendre à partir des données.</text:span></text:p>
      <text:p text:style-name="P192" loext:marker-style-name="T189"><draw:frame draw:style-name="fr2" draw:name="Image 16" text:anchor-type="char" svg:x="2.6244in" svg:y="0.3154in" svg:width="3.0236in" svg:height="2.0756in" draw:z-index="8"><draw:image xlink:href="Pictures/10000000000001E6000001A8AB1F3BB8.png" xlink:type="simple" xlink:show="embed" xlink:actuate="onLoad" draw:mime-type="image/png"/><svg:desc>▷ Data Science, Machine Learning | EURODECISION</svg:desc></draw:frame></text:p>
      <text:p text:style-name="P193" loext:marker-style-name="T144"><text:bookmark text:name="_bookmark24"/><text:span text:style-name="T145">Figure</text:span><text:span text:style-name="T146"> </text:span><text:span text:style-name="T145">5</text:span><text:span text:style-name="T146"> </text:span><text:span text:style-name="T145">:</text:span><text:span text:style-name="T147"> </text:span><text:span text:style-name="T145">une</text:span><text:span text:style-name="T146"> </text:span><text:span text:style-name="T145">domaine</text:span><text:span text:style-name="T146"> </text:span><text:span text:style-name="T148">interdiciplinaire</text:span></text:p>
      <text:h text:style-name="P194" text:outline-level="7" loext:marker-style-name="T102">Types<text:span text:style-name="T43"> </text:span>d'apprentissage<text:span text:style-name="T46"> </text:span>automatique<text:span text:style-name="T47"> </text:span>(<text:span text:style-name="T43"> </text:span>machine<text:span text:style-name="T44"> </text:span>Learning<text:span text:style-name="T43"> </text:span>) Apprentissage supervisé <text:span text:style-name="T102">:</text:span></text:h>
      <text:list text:continue-numbering="true" text:style-name="WWNum16">
        <text:list-item>
          <text:p text:style-name="P195" loext:marker-style-name="T113"><text:span text:style-name="T113">Supervisé</text:span><text:span text:style-name="T137"> </text:span><text:span text:style-name="T113">par</text:span><text:span text:style-name="T138"> </text:span><text:span text:style-name="T113">des</text:span><text:span text:style-name="T138"> </text:span><text:span text:style-name="T113">exemples</text:span><text:span text:style-name="T138"> </text:span><text:span text:style-name="T113">(données</text:span><text:span text:style-name="T138"> </text:span><text:span text:style-name="T137">étiquetées).</text:span></text:p>
        </text:list-item>
        <text:list-item>
          <text:p text:style-name="P196" loext:marker-style-name="T113"><text:span text:style-name="T113">Utilisé</text:span><text:span text:style-name="T138"> </text:span><text:span text:style-name="T113">dans</text:span><text:span text:style-name="T138"> </text:span><text:span text:style-name="T113">la</text:span><text:span text:style-name="T137"> </text:span><text:span text:style-name="T113">reconnaissance</text:span><text:span text:style-name="T137"> </text:span><text:span text:style-name="T113">vocale,</text:span><text:span text:style-name="T138"> </text:span><text:span text:style-name="T113">la</text:span><text:span text:style-name="T137"> </text:span><text:span text:style-name="T113">vision</text:span><text:span text:style-name="T138"> </text:span><text:span text:style-name="T113">par ordinateur,</text:span><text:span text:style-name="T138"> </text:span><text:span text:style-name="T139">etc.</text:span></text:p>
        </text:list-item>
      </text:list>
      <text:p text:style-name="P197"/>
      <text:h text:style-name="Heading_20_6" text:outline-level="7" loext:marker-style-name="T102">Apprentissage<text:span text:style-name="T40"> </text:span>non<text:span text:style-name="T39"> </text:span>supervisé<text:span text:style-name="T42"> </text:span><text:span text:style-name="T190">:</text:span></text:h>
      <text:p text:style-name="P197"/>
      <text:list text:continue-numbering="true" text:style-name="WWNum16">
        <text:list-item>
          <text:p text:style-name="P196" loext:marker-style-name="T113"><text:span text:style-name="T113">Processus</text:span><text:span text:style-name="T138"> </text:span><text:span text:style-name="T113">indépendant</text:span><text:span text:style-name="T138"> </text:span><text:span text:style-name="T113">où</text:span><text:span text:style-name="T138"> </text:span><text:span text:style-name="T113">l'ordinateur</text:span><text:span text:style-name="T138"> </text:span><text:span text:style-name="T113">identifie</text:span><text:span text:style-name="T136"> </text:span><text:span text:style-name="T113">des</text:span><text:span text:style-name="T138"> </text:span><text:span text:style-name="T113">modèles</text:span><text:span text:style-name="T138"> </text:span><text:span text:style-name="T113">sans</text:span><text:span text:style-name="T138"> </text:span><text:span text:style-name="T113">supervision </text:span><text:span text:style-name="T137">constante.</text:span></text:p>
        </text:list-item>
        <text:list-item>
          <text:p text:style-name="P196" loext:marker-style-name="T113"><text:span text:style-name="T113">Utilisé</text:span><text:span text:style-name="T136"> </text:span><text:span text:style-name="T113">pour</text:span><text:span text:style-name="T138"> </text:span><text:span text:style-name="T113">découvrir</text:span><text:span text:style-name="T137"> </text:span><text:span text:style-name="T113">des structures</text:span><text:span text:style-name="T138"> </text:span><text:span text:style-name="T113">ou des</text:span><text:span text:style-name="T138"> </text:span><text:span text:style-name="T113">distributions sous-jacentes</text:span><text:span text:style-name="T138"> </text:span><text:span text:style-name="T113">dans</text:span><text:span text:style-name="T191"> </text:span><text:span text:style-name="T113">les </text:span><text:span text:style-name="T137">données.</text:span></text:p>
        </text:list-item>
      </text:list>
      <text:p text:style-name="P198" loext:marker-style-name="T143"><draw:frame draw:style-name="fr2" draw:name="Image 17" text:anchor-type="char" svg:x="1.9102in" svg:y="0.3161in" svg:width="4.4335in" svg:height="1.598in" draw:z-index="9"><draw:image xlink:href="Pictures/10000000000002AC000001392165AB63.jpg" xlink:type="simple" xlink:show="embed" xlink:actuate="onLoad" draw:mime-type="image/jpeg"/><svg:desc>What is machine learning? Understanding types &amp; applications - Spiceworks</svg:desc></draw:frame></text:p>
      <text:p text:style-name="P199"/>
      <text:p text:style-name="P134" loext:marker-style-name="T144"><text:bookmark text:name="_bookmark25"/><text:span text:style-name="T145">Figure</text:span><text:span text:style-name="T146"> </text:span><text:span text:style-name="T145">6</text:span><text:span text:style-name="T148"> </text:span><text:span text:style-name="T145">:</text:span><text:span text:style-name="T147"> </text:span><text:span text:style-name="T145">type</text:span><text:span text:style-name="T146"> </text:span><text:span text:style-name="T145">of</text:span><text:span text:style-name="T147"> </text:span><text:span text:style-name="T145">machine</text:span><text:span text:style-name="T146"> </text:span><text:span text:style-name="T148">learning</text:span></text:p>
      <text:p text:style-name="P200" loext:marker-style-name="T144"/>
      <text:p text:style-name="P201">Le<text:span text:style-name="T43"> </text:span>Machine<text:span text:style-name="T40"> </text:span>Learning<text:span text:style-name="T40"> </text:span>et<text:span text:style-name="T40"> </text:span>l'IA<text:span text:style-name="T40"> </text:span>(Intelligence<text:span text:style-name="T47"> </text:span>Artificielle)<text:span text:style-name="T40"> </text:span>font<text:span text:style-name="T40"> </text:span>désormais<text:span text:style-name="T40"> </text:span>partie<text:span text:style-name="T40"> </text:span>intégrante<text:span text:style-name="T40"> </text:span>du<text:span text:style-name="T40"> </text:span>paysage technologique. Le premier utilise toute une série d'algorithmes éprouvés pour traiter les données.</text:p>
      <text:p text:style-name="P202"/>
      <text:list xml:id="list191357982614299" text:continue-list="list191357903581300" text:style-name="WWNum15">
        <text:list-item>
          <text:list>
            <text:list-item>
              <text:h text:style-name="P203" text:outline-level="4"><text:bookmark text:name="_bookmark26"/>Identification<text:span text:style-name="T43"> </text:span>des<text:span text:style-name="T40"> </text:span>Besoins<text:span text:style-name="T40"> </text:span>Fonctionnels<text:span text:style-name="T40"> </text:span>et<text:span text:style-name="T39"> </text:span>Non<text:span text:style-name="T40"> </text:span><text:span text:style-name="T39">Fonctionnels</text:span></text:h>
            </text:list-item>
          </text:list>
        </text:list-item>
      </text:list>
      <text:p text:style-name="P204">Pour<text:span text:style-name="T39"> </text:span>atteindre<text:span text:style-name="T47"> </text:span>notre<text:span text:style-name="T47"> </text:span>objectif<text:span text:style-name="T39"> </text:span>de<text:span text:style-name="T47"> </text:span>prédire<text:span text:style-name="T40"> </text:span>le<text:span text:style-name="T39"> </text:span>churn<text:span text:style-name="T39"> </text:span>des<text:span text:style-name="T39"> </text:span>clients<text:span text:style-name="T39"> </text:span>et<text:span text:style-name="T39"> </text:span>d'élaborer<text:span text:style-name="T39"> </text:span>une<text:span text:style-name="T40"> </text:span>liste<text:span text:style-name="T39"> </text:span>des<text:span text:style-name="T39"> </text:span>clients<text:span text:style-name="T39"> </text:span>perdus, nous devons définir nos besoins fonctionnels et non fonctionnels :</text:p>
      <text:p text:style-name="P205"/>
      <text:h text:style-name="Heading_20_6" text:outline-level="7">Besoins<text:span text:style-name="T42"> </text:span>Fonctionnels<text:span text:style-name="T42"> </text:span><text:span text:style-name="T41">:</text:span></text:h>
      <text:p text:style-name="P190" loext:marker-style-name="T187"/>
      <text:list text:style-name="WWNum17">
        <text:list-item>
          <text:p text:style-name="P206" loext:marker-style-name="T113"><text:span text:style-name="T160">Modèle</text:span><text:span text:style-name="T161"> </text:span><text:span text:style-name="T160">de</text:span><text:span text:style-name="T161"> </text:span><text:span text:style-name="T160">Prédiction</text:span><text:span text:style-name="T161"> </text:span><text:span text:style-name="T160">du</text:span><text:span text:style-name="T161"> </text:span><text:span text:style-name="T160">Churn</text:span><text:span text:style-name="T192"> </text:span><text:span text:style-name="T193">:</text:span></text:p>
          <text:list>
            <text:list-item>
              <text:p text:style-name="P207" loext:marker-style-name="T104"><text:span text:style-name="T104">Développer</text:span><text:span text:style-name="T107"> </text:span><text:span text:style-name="T104">un</text:span><text:span text:style-name="T108"> </text:span><text:span text:style-name="T104">modèle</text:span><text:span text:style-name="T109"> </text:span><text:span text:style-name="T104">prédictif</text:span><text:span text:style-name="T188"> </text:span><text:span text:style-name="T104">basé</text:span><text:span text:style-name="T188"> </text:span><text:span text:style-name="T104">sur</text:span><text:span text:style-name="T105"> </text:span><text:span text:style-name="T104">la</text:span><text:span text:style-name="T188"> </text:span><text:span text:style-name="T104">science</text:span><text:span text:style-name="T188"> </text:span><text:span text:style-name="T104">des</text:span><text:span text:style-name="T188"> </text:span><text:span text:style-name="T109">données.</text:span></text:p>
            </text:list-item>
            <text:list-item>
              <text:p text:style-name="P207" loext:marker-style-name="T104"><text:span text:style-name="T104">Utiliser</text:span><text:span text:style-name="T107"> </text:span><text:span text:style-name="T104">les</text:span><text:span text:style-name="T188"> </text:span><text:span text:style-name="T104">données</text:span><text:span text:style-name="T188"> </text:span><text:span text:style-name="T104">des</text:span><text:span text:style-name="T188"> </text:span><text:span text:style-name="T104">clients</text:span><text:span text:style-name="T188"> </text:span><text:span text:style-name="T104">pour</text:span><text:span text:style-name="T105"> </text:span><text:span text:style-name="T104">entraîner</text:span><text:span text:style-name="T106"> </text:span><text:span text:style-name="T104">le</text:span><text:span text:style-name="T106"> </text:span><text:span text:style-name="T109">modèle.</text:span></text:p>
            </text:list-item>
            <text:list-item>
              <text:p text:style-name="P207" loext:marker-style-name="T104"><text:span text:style-name="T104">Prédire</text:span><text:span text:style-name="T106"> </text:span><text:span text:style-name="T104">les</text:span><text:span text:style-name="T106"> </text:span><text:span text:style-name="T104">clients</text:span><text:span text:style-name="T106"> </text:span><text:span text:style-name="T104">susceptibles</text:span><text:span text:style-name="T188"> </text:span><text:span text:style-name="T104">de</text:span><text:span text:style-name="T188"> </text:span><text:span text:style-name="T109">churner.</text:span></text:p>
            </text:list-item>
          </text:list>
        </text:list-item>
        <text:list-item>
          <text:h text:style-name="P208" text:outline-level="7" loext:marker-style-name="T102">Génération<text:span text:style-name="T42"> </text:span>de<text:span text:style-name="T39"> </text:span>la<text:span text:style-name="T42"> </text:span>Liste<text:span text:style-name="T42"> </text:span>des<text:span text:style-name="T42"> </text:span>Clients<text:span text:style-name="T42"> </text:span>Perdus<text:span text:style-name="T194"> </text:span><text:span text:style-name="T190">:</text:span></text:h>
          <text:list>
            <text:list-item>
              <text:p text:style-name="P207" loext:marker-style-name="T104"><text:span text:style-name="T104">Identifier</text:span><text:span text:style-name="T188"> </text:span><text:span text:style-name="T104">et</text:span><text:span text:style-name="T188"> </text:span><text:span text:style-name="T104">lister</text:span><text:span text:style-name="T188"> </text:span><text:span text:style-name="T104">les</text:span><text:span text:style-name="T108"> </text:span><text:span text:style-name="T104">clients</text:span><text:span text:style-name="T109"> </text:span><text:span text:style-name="T104">qui</text:span><text:span text:style-name="T188"> </text:span><text:span text:style-name="T104">ont</text:span><text:span text:style-name="T188"> </text:span><text:span text:style-name="T104">déjà</text:span><text:span text:style-name="T188"> </text:span><text:span text:style-name="T104">quitté</text:span><text:span text:style-name="T109"> l'entreprise.</text:span></text:p>
            </text:list-item>
            <text:list-item>
              <text:p text:style-name="P207" loext:marker-style-name="T104"><text:span text:style-name="T104">Utiliser</text:span><text:span text:style-name="T108"> </text:span><text:span text:style-name="T104">le</text:span><text:span text:style-name="T108"> </text:span><text:span text:style-name="T104">modèle</text:span><text:span text:style-name="T188"> </text:span><text:span text:style-name="T104">de</text:span><text:span text:style-name="T108"> </text:span><text:span text:style-name="T104">prédiction</text:span><text:span text:style-name="T107"> </text:span><text:span text:style-name="T104">pour</text:span><text:span text:style-name="T107"> </text:span><text:span text:style-name="T104">évaluer</text:span><text:span text:style-name="T188"> </text:span><text:span text:style-name="T104">les</text:span><text:span text:style-name="T188"> </text:span><text:span text:style-name="T104">clients</text:span><text:span text:style-name="T188"> </text:span><text:span text:style-name="T104">à</text:span><text:span text:style-name="T188"> </text:span><text:span text:style-name="T104">risque</text:span><text:span text:style-name="T108"> </text:span><text:span text:style-name="T104">de</text:span><text:span text:style-name="T188"> </text:span><text:span text:style-name="T109">churn.</text:span></text:p>
            </text:list-item>
          </text:list>
        </text:list-item>
      </text:list>
      <text:p text:style-name="P209" loext:marker-style-name="T104"/>
      <text:h text:style-name="Heading_20_6" text:outline-level="7">Besoins<text:span text:style-name="T42"> </text:span>Non<text:span text:style-name="T42"> </text:span>Fonctionnels<text:span text:style-name="T42"> </text:span><text:span text:style-name="T41">:</text:span></text:h>
      <text:list text:style-name="WWNum18">
        <text:list-item>
          <text:p text:style-name="P210" loext:marker-style-name="T113"><text:span text:style-name="T160">Précision</text:span><text:span text:style-name="T162"> </text:span><text:span text:style-name="T160">et</text:span><text:span text:style-name="T162"> </text:span><text:span text:style-name="T160">Fiabilité</text:span><text:span text:style-name="T161"> </text:span><text:span text:style-name="T193">:</text:span></text:p>
          <text:list>
            <text:list-item>
              <text:p text:style-name="P211" loext:marker-style-name="T104"><text:span text:style-name="T104">Le</text:span><text:span text:style-name="T106"> </text:span><text:span text:style-name="T104">modèle</text:span><text:span text:style-name="T109"> </text:span><text:span text:style-name="T104">doit</text:span><text:span text:style-name="T106"> </text:span><text:span text:style-name="T104">être</text:span><text:span text:style-name="T109"> </text:span><text:span text:style-name="T104">précis</text:span><text:span text:style-name="T195"> </text:span><text:span text:style-name="T104">et</text:span><text:span text:style-name="T188"> </text:span><text:span text:style-name="T104">fiable</text:span><text:span text:style-name="T109"> </text:span><text:span text:style-name="T104">dans</text:span><text:span text:style-name="T108"> </text:span><text:span text:style-name="T104">la</text:span><text:span text:style-name="T188"> </text:span><text:span text:style-name="T104">prédiction</text:span><text:span text:style-name="T106"> </text:span><text:span text:style-name="T104">du</text:span><text:span text:style-name="T107"> </text:span><text:span text:style-name="T104">churn</text:span><text:span text:style-name="T107"> </text:span><text:span text:style-name="T104">des</text:span><text:span text:style-name="T109"> clients.</text:span></text:p>
            </text:list-item>
            <text:list-item>
              <text:p text:style-name="P211" loext:marker-style-name="T104"><text:span text:style-name="T104">Assurer</text:span><text:span text:style-name="T105"> </text:span><text:span text:style-name="T104">des</text:span><text:span text:style-name="T105"> </text:span><text:span text:style-name="T104">résultats</text:span><text:span text:style-name="T188"> </text:span><text:span text:style-name="T104">cohérents</text:span><text:span text:style-name="T106"> </text:span><text:span text:style-name="T104">et</text:span><text:span text:style-name="T107"> </text:span><text:span text:style-name="T109">reproductibles.</text:span></text:p>
            </text:list-item>
          </text:list>
        </text:list-item>
        <text:list-item>
          <text:h text:style-name="P212" text:outline-level="7" loext:marker-style-name="T102">Performances<text:span text:style-name="T40"> </text:span><text:span text:style-name="T190">:</text:span></text:h>
          <text:list>
            <text:list-item>
              <text:p text:style-name="P213" loext:marker-style-name="T104"><text:span text:style-name="T104">Le</text:span><text:span text:style-name="T105"> </text:span><text:span text:style-name="T104">modèle</text:span><text:span text:style-name="T109"> </text:span><text:span text:style-name="T104">doit</text:span><text:span text:style-name="T107"> </text:span><text:span text:style-name="T104">être</text:span><text:span text:style-name="T188"> </text:span><text:span text:style-name="T104">capable</text:span><text:span text:style-name="T109"> </text:span><text:span text:style-name="T104">de</text:span><text:span text:style-name="T188"> </text:span><text:span text:style-name="T104">traiter</text:span><text:span text:style-name="T108"> </text:span><text:span text:style-name="T104">un</text:span><text:span text:style-name="T188"> </text:span><text:span text:style-name="T104">grand</text:span><text:span text:style-name="T107"> </text:span><text:span text:style-name="T104">volume</text:span><text:span text:style-name="T109"> </text:span><text:span text:style-name="T104">de</text:span><text:span text:style-name="T188"> </text:span><text:span text:style-name="T104">données</text:span><text:span text:style-name="T106"> </text:span><text:span text:style-name="T104">de</text:span><text:span text:style-name="T106"> </text:span><text:span text:style-name="T104">manière</text:span><text:span text:style-name="T107"> </text:span><text:span text:style-name="T109">efficace.</text:span></text:p>
            </text:list-item>
            <text:list-item>
              <text:p text:style-name="P214" loext:marker-style-name="T104"><text:span text:style-name="T104">Les</text:span><text:span text:style-name="T195"> </text:span><text:span text:style-name="T104">temps</text:span><text:span text:style-name="T107"> </text:span><text:span text:style-name="T104">d'entraînement</text:span><text:span text:style-name="T108"> </text:span><text:span text:style-name="T104">et</text:span><text:span text:style-name="T188"> </text:span><text:span text:style-name="T104">de</text:span><text:span text:style-name="T107"> </text:span><text:span text:style-name="T104">prédiction</text:span><text:span text:style-name="T106"> </text:span><text:span text:style-name="T104">doivent</text:span><text:span text:style-name="T105"> </text:span><text:span text:style-name="T104">être</text:span><text:span text:style-name="T188"> </text:span><text:span text:style-name="T109">raisonnables.</text:span></text:p>
            </text:list-item>
          </text:list>
        </text:list-item>
        <text:list-item>
          <text:h text:style-name="P212" text:outline-level="7" loext:marker-style-name="T102">Évolutivité <text:span text:style-name="T190">:</text:span><text:span text:style-name="T190"/></text:h>
          <text:list>
            <text:list-item>
              <text:p text:style-name="P215" loext:marker-style-name="T104"><text:span text:style-name="T104">Le</text:span><text:span text:style-name="T105"> </text:span><text:span text:style-name="T104">modèle</text:span><text:span text:style-name="T109"> </text:span><text:span text:style-name="T104">doit</text:span><text:span text:style-name="T106"> </text:span><text:span text:style-name="T104">être</text:span><text:span text:style-name="T188"> </text:span><text:span text:style-name="T104">scalable</text:span><text:span text:style-name="T188"> </text:span><text:span text:style-name="T104">pour</text:span><text:span text:style-name="T188"> </text:span><text:span text:style-name="T104">gérer</text:span><text:span text:style-name="T188"> </text:span><text:span text:style-name="T104">une</text:span><text:span text:style-name="T107"> </text:span><text:span text:style-name="T104">augmentation</text:span><text:span text:style-name="T107"> </text:span><text:span text:style-name="T104">du</text:span><text:span text:style-name="T107"> </text:span><text:span text:style-name="T104">nombre</text:span><text:span text:style-name="T106"> </text:span><text:span text:style-name="T104">de</text:span><text:span text:style-name="T188"> </text:span><text:span text:style-name="T104">clients</text:span><text:span text:style-name="T106"> </text:span><text:span text:style-name="T104">et</text:span><text:span text:style-name="T188"> </text:span><text:span text:style-name="T104">de</text:span><text:span text:style-name="T109"> données.</text:span></text:p>
            </text:list-item>
          </text:list>
        </text:list-item>
        <text:list-item>
          <text:h text:style-name="P216" text:outline-level="7" loext:marker-style-name="T102">Interprétabilité<text:span text:style-name="T46"> </text:span><text:span text:style-name="T190">:</text:span></text:h>
          <text:list>
            <text:list-item>
              <text:p text:style-name="P211" loext:marker-style-name="T104"><text:span text:style-name="T104">Le</text:span><text:span text:style-name="T108"> </text:span><text:span text:style-name="T104">modèle</text:span><text:span text:style-name="T188"> </text:span><text:span text:style-name="T104">doit</text:span><text:span text:style-name="T108"> </text:span><text:span text:style-name="T104">être</text:span><text:span text:style-name="T107"> </text:span><text:span text:style-name="T104">interprétable</text:span><text:span text:style-name="T107"> </text:span><text:span text:style-name="T104">pour</text:span><text:span text:style-name="T106"> </text:span><text:span text:style-name="T104">permettre</text:span><text:span text:style-name="T106"> </text:span><text:span text:style-name="T104">une</text:span><text:span text:style-name="T108"> </text:span><text:span text:style-name="T104">compréhension</text:span><text:span text:style-name="T106"> </text:span><text:span text:style-name="T104">claire</text:span><text:span text:style-name="T107"> </text:span><text:span text:style-name="T104">des</text:span><text:span text:style-name="T188"> </text:span><text:span text:style-name="T104">facteurs</text:span><text:span text:style-name="T107"> </text:span><text:span text:style-name="T104">de</text:span><text:span text:style-name="T107"> </text:span><text:span text:style-name="T109">churn.</text:span></text:p>
            </text:list-item>
          </text:list>
        </text:list-item>
        <text:list-item>
          <text:h text:style-name="P212" text:outline-level="7" loext:marker-style-name="T102">Facilité<text:span text:style-name="T40"> </text:span>d'Utilisation <text:span text:style-name="T190">:</text:span></text:h>
          <text:list>
            <text:list-item>
              <text:p text:style-name="P217" loext:marker-style-name="T104"><text:span text:style-name="T104">L'interface</text:span><text:span text:style-name="T195"> </text:span><text:span text:style-name="T104">utilisateur</text:span><text:span text:style-name="T109"> </text:span><text:span text:style-name="T104">pour</text:span><text:span text:style-name="T106"> </text:span><text:span text:style-name="T104">l'accès</text:span><text:span text:style-name="T188"> </text:span><text:span text:style-name="T104">au</text:span><text:span text:style-name="T106"> </text:span><text:span text:style-name="T104">modèle</text:span><text:span text:style-name="T107"> </text:span><text:span text:style-name="T104">doit</text:span><text:span text:style-name="T108"> </text:span><text:span text:style-name="T104">être</text:span><text:span text:style-name="T107"> </text:span><text:span text:style-name="T104">conviviale</text:span><text:span text:style-name="T188"> </text:span><text:span text:style-name="T104">et</text:span><text:span text:style-name="T109"> intuitive.</text:span></text:p>
            </text:list-item>
          </text:list>
        </text:list-item>
      </text:list>
      <text:p text:style-name="P209" loext:marker-style-name="T104"/>
      <text:list xml:id="list191357835874221" text:continue-list="list191357982614299" text:style-name="WWNum15">
        <text:list-item>
          <text:list>
            <text:list-item>
              <text:h text:style-name="P218" text:outline-level="4"><text:bookmark text:name="_bookmark27"/>Cahier<text:span text:style-name="T43"> </text:span>de<text:span text:style-name="T39"> </text:span>charges<text:span text:style-name="T39"> </text:span>(exigences<text:span text:style-name="T42"> </text:span>de<text:span text:style-name="T47"> </text:span>deux<text:span text:style-name="T47"> </text:span>parties<text:span text:style-name="T42"> </text:span>:<text:span text:style-name="T43"> </text:span>admin<text:span text:style-name="T39"> </text:span>et <text:span text:style-name="T39">décideur)</text:span></text:h>
            </text:list-item>
          </text:list>
        </text:list-item>
      </text:list>
      <text:p text:style-name="P219">Le<text:span text:style-name="T43"> </text:span>cahier<text:span text:style-name="T42"> </text:span>des<text:span text:style-name="T42"> </text:span>charges<text:span text:style-name="T42"> </text:span>doit<text:span text:style-name="T42"> </text:span>répondre aux<text:span text:style-name="T42"> </text:span>besoins<text:span text:style-name="T42"> </text:span>de deux<text:span text:style-name="T42"> </text:span>parties<text:span text:style-name="T42"> </text:span>principales :<text:span text:style-name="T42"> </text:span>l'administrateur<text:span text:style-name="T40"> </text:span>et<text:span text:style-name="T42"> </text:span>le<text:span text:style-name="T42"> </text:span><text:span text:style-name="T39">décideur.</text:span></text:p>
      <text:h text:style-name="P220" text:outline-level="7">Pour<text:span text:style-name="T40"> </text:span>l'administrateur<text:span text:style-name="T39"> </text:span><text:span text:style-name="T41">:</text:span></text:h>
      <text:list text:style-name="WWNum19">
        <text:list-item>
          <text:p text:style-name="P221" loext:marker-style-name="T113"><text:span text:style-name="T113">Plateforme</text:span><text:span text:style-name="T136"> </text:span><text:span text:style-name="T113">de</text:span><text:span text:style-name="T136"> </text:span><text:span text:style-name="T113">gestion</text:span><text:span text:style-name="T138"> </text:span><text:span text:style-name="T113">du churn</text:span><text:span text:style-name="T137"> </text:span><text:span text:style-name="T113">pour</text:span><text:span text:style-name="T137"> </text:span><text:span text:style-name="T113">surveiller</text:span><text:span text:style-name="T137"> </text:span><text:span text:style-name="T113">et</text:span><text:span text:style-name="T166"> </text:span><text:span text:style-name="T113">gérer efficacement la</text:span><text:span text:style-name="T138"> </text:span><text:span text:style-name="T113">perte</text:span><text:span text:style-name="T138"> </text:span><text:span text:style-name="T113">de</text:span><text:span text:style-name="T137"> clients.</text:span></text:p>
        </text:list-item>
        <text:list-item>
          <text:p text:style-name="P222" loext:marker-style-name="T113"><text:span text:style-name="T113">Interface</text:span><text:span text:style-name="T139"> </text:span><text:span text:style-name="T113">conviviale</text:span><text:span text:style-name="T136"> </text:span><text:span text:style-name="T113">pour</text:span><text:span text:style-name="T136"> </text:span><text:span text:style-name="T113">visualiser</text:span><text:span text:style-name="T136"> </text:span><text:span text:style-name="T113">les</text:span><text:span text:style-name="T136"> </text:span><text:span text:style-name="T113">données</text:span><text:span text:style-name="T138"> </text:span><text:span text:style-name="T113">de</text:span><text:span text:style-name="T139"> </text:span><text:span text:style-name="T113">churn,</text:span><text:span text:style-name="T139"> </text:span><text:span text:style-name="T113">générer</text:span><text:span text:style-name="T136"> </text:span><text:span text:style-name="T113">des</text:span><text:span text:style-name="T136"> </text:span><text:span text:style-name="T113">rapports</text:span><text:span text:style-name="T136"> </text:span><text:span text:style-name="T113">et</text:span><text:span text:style-name="T136"> </text:span><text:span text:style-name="T113">prendre</text:span><text:span text:style-name="T139"> </text:span><text:span text:style-name="T113">des</text:span><text:span text:style-name="T136"> </text:span><text:span text:style-name="T113">mesures</text:span><text:span text:style-name="T136"> </text:span><text:span text:style-name="T113">de </text:span><text:span text:style-name="T137">rétention.</text:span></text:p>
        </text:list-item>
      </text:list>
      <text:h text:style-name="P223" text:outline-level="7">Pour<text:span text:style-name="T39"> </text:span>le<text:span text:style-name="T42"> </text:span>décideur<text:span text:style-name="T42"> </text:span><text:span text:style-name="T41">:</text:span></text:h>
      <text:list text:continue-numbering="true" text:style-name="WWNum19">
        <text:list-item>
          <text:p text:style-name="P224" loext:marker-style-name="T113"><text:span text:style-name="T113">Accès</text:span><text:span text:style-name="T136"> </text:span><text:span text:style-name="T113">aux</text:span><text:span text:style-name="T138"> </text:span><text:span text:style-name="T113">informations</text:span><text:span text:style-name="T138"> </text:span><text:span text:style-name="T113">sur le</text:span><text:span text:style-name="T137"> </text:span><text:span text:style-name="T113">churn</text:span><text:span text:style-name="T138"> </text:span><text:span text:style-name="T113">via</text:span><text:span text:style-name="T138"> </text:span><text:span text:style-name="T113">une</text:span><text:span text:style-name="T137"> </text:span><text:span text:style-name="T113">interface</text:span><text:span text:style-name="T138"> </text:span><text:span text:style-name="T137">intuitive.</text:span></text:p>
        </text:list-item>
        <text:list-item>
          <text:p text:style-name="P225" loext:marker-style-name="T113"><text:span text:style-name="T113">Utilisation</text:span><text:span text:style-name="T136"> </text:span><text:span text:style-name="T113">du</text:span><text:span text:style-name="T138"> </text:span><text:span text:style-name="T113">modèle</text:span><text:span text:style-name="T137"> </text:span><text:span text:style-name="T113">de</text:span><text:span text:style-name="T138"> </text:span><text:span text:style-name="T113">prédiction</text:span><text:span text:style-name="T138"> </text:span><text:span text:style-name="T113">pour</text:span><text:span text:style-name="T138"> </text:span><text:span text:style-name="T113">identifier les</text:span><text:span text:style-name="T138"> </text:span><text:span text:style-name="T113">clients</text:span><text:span text:style-name="T138"> </text:span><text:span text:style-name="T113">à</text:span><text:span text:style-name="T166"> </text:span><text:span text:style-name="T137">risque.</text:span></text:p>
        </text:list-item>
        <text:list-item>
          <text:p text:style-name="P226" loext:marker-style-name="T113"><text:span text:style-name="T113">Capacité</text:span><text:span text:style-name="T138"> </text:span><text:span text:style-name="T113">à</text:span><text:span text:style-name="T137"> </text:span><text:span text:style-name="T113">prendre</text:span><text:span text:style-name="T136"> </text:span><text:span text:style-name="T113">des</text:span><text:span text:style-name="T166"> </text:span><text:span text:style-name="T113">décisions</text:span><text:span text:style-name="T138"> </text:span><text:span text:style-name="T113">stratégiques</text:span><text:span text:style-name="T138"> </text:span><text:span text:style-name="T113">basées</text:span><text:span text:style-name="T138"> </text:span><text:span text:style-name="T113">sur</text:span><text:span text:style-name="T138"> </text:span><text:span text:style-name="T113">les</text:span><text:span text:style-name="T138"> </text:span><text:span text:style-name="T113">résultats</text:span><text:span text:style-name="T138"> </text:span><text:span text:style-name="T113">du</text:span><text:span text:style-name="T138"> </text:span><text:span text:style-name="T137">modèle.</text:span></text:p>
        </text:list-item>
      </text:list>
      <text:p text:style-name="P175">Ensemble,<text:span text:style-name="T40"> </text:span>ces<text:span text:style-name="T40"> </text:span>exigences<text:span text:style-name="T42"> </text:span>garantiront<text:span text:style-name="T40"> </text:span>une<text:span text:style-name="T43"> </text:span>gestion<text:span text:style-name="T40"> </text:span>efficace<text:span text:style-name="T47"> </text:span>du<text:span text:style-name="T40"> </text:span>churn<text:span text:style-name="T40"> </text:span>et<text:span text:style-name="T40"> </text:span>une<text:span text:style-name="T40"> </text:span>prise<text:span text:style-name="T47"> </text:span>de<text:span text:style-name="T47"> </text:span>décision<text:span text:style-name="T40"> </text:span>éclairée<text:span text:style-name="T39"> </text:span>pour réduire la perte de clients.</text:p>
      <text:list text:continue-list="list191357835874221" text:style-name="WWNum15">
        <text:list-item>
          <text:list>
            <text:list-item>
              <text:h text:style-name="P227" text:outline-level="4"><text:bookmark text:name="_bookmark28"/>Conclusion</text:h>
            </text:list-item>
          </text:list>
        </text:list-item>
      </text:list>
      <text:p text:style-name="P228">En résumé, ce chapitre a défini les bases nécessaires à la mise en place d'un système de prédiction du churn des clients dans une entreprise de télécommunications. Nous avons exploré les concepts du Data Mining<text:span text:style-name="T40"> </text:span>et<text:span text:style-name="T40"> </text:span>du<text:span text:style-name="T40"> </text:span>Machine<text:span text:style-name="T40"> </text:span>Learning,<text:span text:style-name="T40"> </text:span>identifié<text:span text:style-name="T47"> </text:span>les<text:span text:style-name="T40"> </text:span>besoins<text:span text:style-name="T42"> </text:span>fonctionnels<text:span text:style-name="T40"> </text:span>et<text:span text:style-name="T40"> </text:span>non<text:span text:style-name="T40"> </text:span>fonctionnels,<text:span text:style-name="T40"> </text:span>et<text:span text:style-name="T40"> </text:span>établi<text:span text:style-name="T40"> </text:span>un<text:span text:style-name="T40"> </text:span>cahier<text:span text:style-name="T47"> </text:span>des charges répondant aux exigences des administrateurs et des décideurs. Ce cadre permettra le développement d'une solution efficace pour améliorer la gestion du churn et prendre des décisions éclairées pour réduire la perte de clients.</text:p>
      <text:h text:style-name="P229" text:outline-level="3" loext:marker-style-name="T73"><text:bookmark text:name="_bookmark29"/><text:span text:style-name="T126">CHAPITRE</text:span><text:span text:style-name="T127"> </text:span><text:span text:style-name="T126">3</text:span><text:span text:style-name="T182"> </text:span><text:span text:style-name="T126">:</text:span><text:span text:style-name="T196"> </text:span><text:span text:style-name="T126">CONCEPTION</text:span><text:span text:style-name="T182"> </text:span><text:span text:style-name="T126">DE</text:span><text:span text:style-name="T128"> </text:span><text:span text:style-name="T130">L'APPLICATION</text:span></text:h>
      <text:list text:continue-list="list191358414163531" text:style-name="WWNum14">
        <text:list-item>
          <text:list>
            <text:list-item>
              <text:h text:style-name="P230" text:outline-level="4"><text:bookmark text:name="_bookmark30"/>Introduction</text:h>
            </text:list-item>
          </text:list>
        </text:list-item>
      </text:list>
      <text:p text:style-name="P231">L'objectif<text:span text:style-name="T39"> </text:span>des<text:span text:style-name="T40"> </text:span>études<text:span text:style-name="T40"> </text:span>sur<text:span text:style-name="T39"> </text:span>le<text:span text:style-name="T47"> </text:span>churn<text:span text:style-name="T42"> </text:span>est<text:span text:style-name="T39"> </text:span>la<text:span text:style-name="T40"> </text:span>détection<text:span text:style-name="T39"> </text:span>des Ce<text:span text:style-name="T40"> </text:span>chapitre<text:span text:style-name="T47"> </text:span>se<text:span text:style-name="T40"> </text:span>concentre<text:span text:style-name="T47"> </text:span>sur<text:span text:style-name="T39"> </text:span>la<text:span text:style-name="T42"> </text:span>réalisation<text:span text:style-name="T39"> </text:span>pratique de notre projet de prédiction de la perte de clients dans le domaine des télécommunications. Nous</text:p>
      <text:p text:style-name="P232">présenterons les logiciels, les librairies et la base de données utilisés, ainsi que l'architecture globale du modèle, le dataset, les algorithmes et techniques de machine Learning sélectionnés, et enfin, l'interface utilisateur<text:span text:style-name="T43"> </text:span>conçue.<text:span text:style-name="T40"> </text:span>En<text:span text:style-name="T39"> </text:span>résumé,<text:span text:style-name="T40"> </text:span>ce<text:span text:style-name="T47"> </text:span>chapitre<text:span text:style-name="T43"> </text:span>marque<text:span text:style-name="T39"> </text:span>une<text:span text:style-name="T47"> </text:span>transition<text:span text:style-name="T40"> </text:span>vers<text:span text:style-name="T47"> </text:span>l'implémentation<text:span text:style-name="T40"> </text:span>concrète<text:span text:style-name="T40"> </text:span>de<text:span text:style-name="T43"> </text:span>notre</text:p>
      <text:p text:style-name="P144">projet,<text:span text:style-name="T47"> </text:span>nous<text:span text:style-name="T42"> </text:span>rapprochant<text:span text:style-name="T197"> </text:span>de<text:span text:style-name="T39"> </text:span>notre<text:span text:style-name="T40"> </text:span>objectif<text:span text:style-name="T42"> </text:span>de<text:span text:style-name="T39"> </text:span>fournir<text:span text:style-name="T42"> </text:span>une<text:span text:style-name="T40"> </text:span>solution<text:span text:style-name="T42"> </text:span>efficace<text:span text:style-name="T39"> </text:span>pour<text:span text:style-name="T42"> </text:span>prédire<text:span text:style-name="T40"> </text:span>la<text:span text:style-name="T39"> </text:span>perte<text:span text:style-name="T42"> </text:span>de<text:span text:style-name="T39"> clients.</text:span></text:p>
      <text:list xml:id="list191358453772422" text:continue-numbering="true" text:style-name="WWNum14">
        <text:list-item>
          <text:list>
            <text:list-item>
              <text:h text:style-name="P233" text:outline-level="4"><text:bookmark text:name="_bookmark31"/>Cycle<text:span text:style-name="T39"> </text:span>de<text:span text:style-name="T39"> </text:span>vie<text:span text:style-name="T42"> </text:span>de<text:span text:style-name="T39"> </text:span>notre<text:span text:style-name="T47"> </text:span><text:span text:style-name="T39">projet</text:span></text:h>
            </text:list-item>
          </text:list>
        </text:list-item>
      </text:list>
      <text:p text:style-name="P234" loext:marker-style-name="T198"><text:span text:style-name="T198">Le</text:span><text:span text:style-name="T199"> </text:span><text:span text:style-name="T198">cycle</text:span><text:span text:style-name="T200"> </text:span><text:span text:style-name="T198">de</text:span><text:span text:style-name="T200"> </text:span><text:span text:style-name="T198">vie</text:span><text:span text:style-name="T200"> </text:span><text:span text:style-name="T198">d’un</text:span><text:span text:style-name="T201"> </text:span><text:span text:style-name="T198">projet</text:span><text:span text:style-name="T202"> </text:span><text:span text:style-name="T198">de</text:span><text:span text:style-name="T200"> </text:span><text:span text:style-name="T198">machine</text:span><text:span text:style-name="T200"> </text:span><text:span text:style-name="T198">learning</text:span><text:span text:style-name="T200"> </text:span><text:span text:style-name="T198">peut</text:span><text:span text:style-name="T202"> </text:span><text:span text:style-name="T198">se</text:span><text:span text:style-name="T200"> </text:span><text:span text:style-name="T198">décomposer</text:span><text:span text:style-name="T200"> </text:span><text:span text:style-name="T198">en</text:span><text:span text:style-name="T201"> </text:span><text:span text:style-name="T198">plusieurs</text:span><text:span text:style-name="T203"> </text:span><text:span text:style-name="T198">phases</text:span><text:span text:style-name="T200"> </text:span><text:span text:style-name="T198">comme</text:span><text:span text:style-name="T200"> </text:span><text:span text:style-name="T198">suit</text:span><text:span text:style-name="T200"> </text:span><text:span text:style-name="T204">:</text:span></text:p>
      <text:p text:style-name="P235" loext:marker-style-name="T205"><draw:frame draw:style-name="fr2" draw:name="Image 18" text:anchor-type="char" svg:x="2.3917in" svg:y="0.1646in" svg:width="3.5035in" svg:height="2.5827in" draw:z-index="10"><draw:image xlink:href="Pictures/10000000000002DA0000021BF913477B.jpg" xlink:type="simple" xlink:show="embed" xlink:actuate="onLoad" draw:mime-type="image/jpeg"/></draw:frame></text:p>
      <text:p text:style-name="P236" loext:marker-style-name="T144"><text:bookmark text:name="_bookmark32"/><text:span text:style-name="T145">Figure</text:span><text:span text:style-name="T146"> </text:span><text:span text:style-name="T145">7:</text:span><text:span text:style-name="T147"> </text:span><text:span text:style-name="T145">Cycle</text:span><text:span text:style-name="T146"> </text:span><text:span text:style-name="T145">de</text:span><text:span text:style-name="T148"> </text:span><text:span text:style-name="T145">vie</text:span><text:span text:style-name="T148"> </text:span><text:span text:style-name="T145">d’un</text:span><text:span text:style-name="T146"> </text:span><text:span text:style-name="T145">projet</text:span><text:span text:style-name="T206"> </text:span><text:span text:style-name="T145">machine</text:span><text:span text:style-name="T146"> </text:span><text:span text:style-name="T148">Learning</text:span></text:p>
      <text:p text:style-name="P237" loext:marker-style-name="T144"/>
      <text:list text:style-name="WWNum20">
        <text:list-item>
          <text:p text:style-name="P238" loext:marker-style-name="T113"><text:span text:style-name="T207">Compréhension</text:span><text:span text:style-name="T208"> </text:span><text:span text:style-name="T207">du</text:span><text:span text:style-name="T208"> </text:span><text:span text:style-name="T207">domaine</text:span><text:span text:style-name="T209"> </text:span><text:span text:style-name="T210">:</text:span><text:span text:style-name="T211"> </text:span><text:span text:style-name="T113">Le</text:span><text:span text:style-name="T136"> </text:span><text:span text:style-name="T113">responsable</text:span><text:span text:style-name="T136"> </text:span><text:span text:style-name="T113">du</text:span><text:span text:style-name="T138"> </text:span><text:span text:style-name="T113">projet</text:span><text:span text:style-name="T138"> </text:span><text:span text:style-name="T113">s'efforce</text:span><text:span text:style-name="T137"> </text:span><text:span text:style-name="T113">de</text:span><text:span text:style-name="T136"> </text:span><text:span text:style-name="T113">comprendre</text:span><text:span text:style-name="T136"> </text:span><text:span text:style-name="T113">les</text:span><text:span text:style-name="T137"> </text:span><text:span text:style-name="T113">objectifs</text:span><text:span text:style-name="T137"> </text:span><text:span text:style-name="T140">de</text:span></text:p>
        </text:list-item>
      </text:list>
      <text:p text:style-name="P239">l'entreprise<text:span text:style-name="T47"> </text:span>et<text:span text:style-name="T40"> </text:span>du<text:span text:style-name="T42"> </text:span>client,<text:span text:style-name="T40"> </text:span>tels<text:span text:style-name="T47"> </text:span>que<text:span text:style-name="T40"> </text:span>l'acquisition<text:span text:style-name="T40"> </text:span>de<text:span text:style-name="T47"> </text:span>nouveaux<text:span text:style-name="T40"> </text:span>clients<text:span text:style-name="T47"> </text:span>ou<text:span text:style-name="T40"> </text:span>l'augmentation<text:span text:style-name="T40"> </text:span>des<text:span text:style-name="T47"> </text:span>ventes<text:span text:style-name="T47"> </text:span>de<text:span text:style-name="T39"> </text:span>produits dans le domaine des télécommunications.</text:p>
      <text:list text:continue-numbering="true" text:style-name="WWNum20">
        <text:list-item>
          <text:p text:style-name="P240" loext:marker-style-name="T113"><text:span text:style-name="T207">Compréhension des données : </text:span><text:span text:style-name="T113">Cette phase implique une analyse approfondie des données collectées à partir</text:span><text:span text:style-name="T136"> </text:span><text:span text:style-name="T113">de</text:span><text:span text:style-name="T140"> </text:span><text:span text:style-name="T113">différentes</text:span><text:span text:style-name="T139"> </text:span><text:span text:style-name="T113">sources</text:span><text:span text:style-name="T139"> </text:span><text:span text:style-name="T113">disponibles</text:span><text:span text:style-name="T139"> </text:span><text:span text:style-name="T113">dans</text:span><text:span text:style-name="T139"> </text:span><text:span text:style-name="T113">l'entreprise.</text:span><text:span text:style-name="T136"> </text:span><text:span text:style-name="T113">Des</text:span><text:span text:style-name="T139"> </text:span><text:span text:style-name="T113">contrôles</text:span><text:span text:style-name="T139"> </text:span><text:span text:style-name="T113">de</text:span><text:span text:style-name="T137"> </text:span><text:span text:style-name="T113">cohérence</text:span><text:span text:style-name="T139"> </text:span><text:span text:style-name="T113">sont</text:span><text:span text:style-name="T136"> </text:span><text:span text:style-name="T113">effectués</text:span><text:span text:style-name="T137"> </text:span><text:span text:style-name="T113">pour vérifier si les données répondent aux objectifs du projet.</text:span></text:p>
        </text:list-item>
        <text:list-item>
          <text:p text:style-name="P241" loext:marker-style-name="T113"><text:span text:style-name="T207">Préparation</text:span><text:span text:style-name="T212"> </text:span><text:span text:style-name="T207">des</text:span><text:span text:style-name="T208"> </text:span><text:span text:style-name="T207">données</text:span><text:span text:style-name="T208"> </text:span><text:span text:style-name="T207">: </text:span><text:span text:style-name="T113">Considérée comme</text:span><text:span text:style-name="T137"> </text:span><text:span text:style-name="T113">la phase</text:span><text:span text:style-name="T136"> </text:span><text:span text:style-name="T113">la</text:span><text:span text:style-name="T138"> </text:span><text:span text:style-name="T113">plus</text:span><text:span text:style-name="T137"> </text:span><text:span text:style-name="T113">longue</text:span><text:span text:style-name="T137"> </text:span><text:span text:style-name="T113">et</text:span><text:span text:style-name="T138"> </text:span><text:span text:style-name="T113">critique,</text:span><text:span text:style-name="T138"> </text:span><text:span text:style-name="T113">la</text:span><text:span text:style-name="T137"> </text:span><text:span text:style-name="T113">préparation</text:span><text:span text:style-name="T138"> </text:span><text:span text:style-name="T140">des</text:span></text:p>
        </text:list-item>
      </text:list>
      <text:p text:style-name="P242">données consiste à organiser et structurer les données de manière spécifique. Cela inclut le nettoyage des données,<text:span text:style-name="T39"> </text:span>la<text:span text:style-name="T39"> </text:span>transformation<text:span text:style-name="T39"> </text:span>des<text:span text:style-name="T40"> </text:span>données<text:span text:style-name="T40"> </text:span>et<text:span text:style-name="T39"> </text:span>la<text:span text:style-name="T40"> </text:span>sélection<text:span text:style-name="T39"> </text:span>des<text:span text:style-name="T40"> </text:span>variables<text:span text:style-name="T40"> </text:span>pour<text:span text:style-name="T42"> </text:span>créer<text:span text:style-name="T39"> </text:span>un<text:span text:style-name="T39"> </text:span>tableau<text:span text:style-name="T39"> </text:span>de<text:span text:style-name="T40"> </text:span>données<text:span text:style-name="T40"> </text:span>bien <text:span text:style-name="T39">formé.</text:span></text:p>
      <text:p text:style-name="Text_20_body"/>
      <text:list text:continue-numbering="true" text:style-name="WWNum20">
        <text:list-item>
          <text:p text:style-name="P243" loext:marker-style-name="T113"><text:span text:style-name="T207">Modélisation : </text:span><text:span text:style-name="T113">Plusieurs algorithmes d'apprentissage automatique sont sélectionnés pour créer plusieurs modèles</text:span><text:span text:style-name="T139"> </text:span><text:span text:style-name="T113">candidats.</text:span><text:span text:style-name="T136"> </text:span><text:span text:style-name="T113">Ces</text:span><text:span text:style-name="T138"> </text:span><text:span text:style-name="T113">modèles</text:span><text:span text:style-name="T139"> </text:span><text:span text:style-name="T113">sont</text:span><text:span text:style-name="T136"> </text:span><text:span text:style-name="T113">ensuite</text:span><text:span text:style-name="T136"> </text:span><text:span text:style-name="T113">évalués</text:span><text:span text:style-name="T139"> </text:span><text:span text:style-name="T113">pour</text:span><text:span text:style-name="T139"> </text:span><text:span text:style-name="T113">déterminer</text:span><text:span text:style-name="T136"> </text:span><text:span text:style-name="T113">le</text:span><text:span text:style-name="T137"> </text:span><text:span text:style-name="T113">meilleur</text:span><text:span text:style-name="T136"> </text:span><text:span text:style-name="T113">modèle</text:span><text:span text:style-name="T136"> </text:span><text:span text:style-name="T113">à</text:span><text:span text:style-name="T140"> </text:span><text:span text:style-name="T113">utiliser</text:span><text:span text:style-name="T136"> </text:span><text:span text:style-name="T113">dans</text:span><text:span text:style-name="T139"> </text:span><text:span text:style-name="T113">le projet de prédiction de la perte de clients.</text:span></text:p>
        </text:list-item>
      </text:list>
      <text:p text:style-name="Text_20_body"/>
      <text:list text:continue-numbering="true" text:style-name="WWNum20">
        <text:list-item>
          <text:p text:style-name="P244" loext:marker-style-name="T113"><text:span text:style-name="T207">Évaluation</text:span><text:span text:style-name="T213"> </text:span><text:span text:style-name="T207">:</text:span><text:span text:style-name="T214"> </text:span><text:span text:style-name="T113">Avant</text:span><text:span text:style-name="T139"> </text:span><text:span text:style-name="T113">l'adoption</text:span><text:span text:style-name="T139"> </text:span><text:span text:style-name="T113">finale,</text:span><text:span text:style-name="T139"> </text:span><text:span text:style-name="T113">les</text:span><text:span text:style-name="T140"> </text:span><text:span text:style-name="T113">modèles</text:span><text:span text:style-name="T136"> </text:span><text:span text:style-name="T113">sont</text:span><text:span text:style-name="T139"> </text:span><text:span text:style-name="T113">soumis</text:span><text:span text:style-name="T140"> </text:span><text:span text:style-name="T113">à</text:span><text:span text:style-name="T139"> </text:span><text:span text:style-name="T113">une</text:span><text:span text:style-name="T215"> </text:span><text:span text:style-name="T113">évaluation</text:span><text:span text:style-name="T139"> </text:span><text:span text:style-name="T113">minutieuse</text:span><text:span text:style-name="T140"> </text:span><text:span text:style-name="T113">pour</text:span><text:span text:style-name="T140"> </text:span><text:span text:style-name="T113">mesurer leur capacité de généralisation et éviter les problèmes de sur-apprentissage ou de sous-apprentissage.</text:span></text:p>
        </text:list-item>
      </text:list>
      <text:p text:style-name="Text_20_body"/>
      <text:list text:continue-numbering="true" text:style-name="WWNum20">
        <text:list-item>
          <text:p text:style-name="P238" loext:marker-style-name="T113"><text:soft-page-break/><text:span text:style-name="T207">Déploiement</text:span><text:span text:style-name="T216"> </text:span><text:span text:style-name="T207">:</text:span><text:span text:style-name="T212"> </text:span><text:span text:style-name="T113">La</text:span><text:span text:style-name="T139"> </text:span><text:span text:style-name="T113">phase finale</text:span><text:span text:style-name="T137"> </text:span><text:span text:style-name="T113">implique</text:span><text:span text:style-name="T137"> </text:span><text:span text:style-name="T113">l'intégration</text:span><text:span text:style-name="T137"> </text:span><text:span text:style-name="T113">du</text:span><text:span text:style-name="T138"> </text:span><text:span text:style-name="T113">modèle</text:span><text:span text:style-name="T136"> </text:span><text:span text:style-name="T113">sélectionné</text:span><text:span text:style-name="T138"> </text:span><text:span text:style-name="T113">dans</text:span><text:span text:style-name="T136"> </text:span><text:span text:style-name="T113">l'organisation.</text:span><text:span text:style-name="T138"> </text:span><text:span text:style-name="T140">Le </text:span>modèle<text:span text:style-name="T40"> </text:span>est<text:span text:style-name="T39"> </text:span>déployé<text:span text:style-name="T40"> </text:span>dans le<text:span text:style-name="T39"> </text:span>monde<text:span text:style-name="T40"> </text:span>réel<text:span text:style-name="T39"> </text:span>pour<text:span text:style-name="T39"> </text:span>accomplir<text:span text:style-name="T39"> </text:span>la<text:span text:style-name="T40"> </text:span>tâche<text:span text:style-name="T40"> </text:span>pour<text:span text:style-name="T40"> </text:span>laquelle<text:span text:style-name="T40"> </text:span>il<text:span text:style-name="T39"> </text:span>a<text:span text:style-name="T40"> </text:span>été<text:span text:style-name="T39"> </text:span>développé,<text:span text:style-name="T42"> </text:span>c'est-à- dire prédire la perte de clients dans le domaine des télécommunications.</text:p>
        </text:list-item>
      </text:list>
      <text:list text:continue-list="list191358453772422" text:style-name="WWNum14">
        <text:list-item>
          <text:list>
            <text:list-item>
              <text:h text:style-name="P245" text:outline-level="4"><text:bookmark text:name="_bookmark33"/>Architecture<text:span text:style-name="T47"> </text:span>globale<text:span text:style-name="T47"> </text:span>du<text:span text:style-name="T40"> </text:span><text:span text:style-name="T39">modèle</text:span></text:h>
            </text:list-item>
          </text:list>
        </text:list-item>
      </text:list>
      <text:p text:style-name="P246">L'architecture<text:span text:style-name="T47"> </text:span>du<text:span text:style-name="T39"> </text:span>modèle<text:span text:style-name="T39"> </text:span>est<text:span text:style-name="T39"> </text:span>conçue<text:span text:style-name="T40"> </text:span>pour<text:span text:style-name="T39"> </text:span>capturer<text:span text:style-name="T39"> </text:span>et<text:span text:style-name="T39"> </text:span>analyser<text:span text:style-name="T40"> </text:span>les<text:span text:style-name="T40"> </text:span>données<text:span text:style-name="T40"> </text:span>pertinentes<text:span text:style-name="T40"> </text:span>afin<text:span text:style-name="T39"> </text:span>de<text:span text:style-name="T40"> </text:span>prédire<text:span text:style-name="T39"> </text:span>la<text:span text:style-name="T39"> </text:span>perte de clients. Elle comprend plusieurs composants essentiels, notamment :</text:p>
      <text:p text:style-name="P247" loext:marker-style-name="T143"><draw:frame draw:style-name="fr2" draw:name="Image 19" text:anchor-type="char" svg:x="1.0154in" svg:y="0.2445in" svg:width="5.9335in" svg:height="1.3543in" draw:z-index="11"><draw:image xlink:href="Pictures/1000000000000352000000C279C9AAB6.jpg" xlink:type="simple" xlink:show="embed" xlink:actuate="onLoad" draw:mime-type="image/jpeg"/></draw:frame></text:p>
      <text:p text:style-name="P248"/>
      <text:p text:style-name="P249" loext:marker-style-name="T144"><text:bookmark text:name="_bookmark34"/><text:span text:style-name="T145">Figure</text:span><text:span text:style-name="T148"> </text:span><text:span text:style-name="T145">8:</text:span><text:span text:style-name="T206"> </text:span><text:span text:style-name="T145">Architecture</text:span><text:span text:style-name="T206"> </text:span><text:span text:style-name="T145">globale</text:span><text:span text:style-name="T147"> </text:span><text:span text:style-name="T145">du</text:span><text:span text:style-name="T206"> </text:span><text:span text:style-name="T148">modèle</text:span></text:p>
      <text:p text:style-name="P250"><text:span text:style-name="T217">Collecte</text:span><text:span text:style-name="T218"> </text:span><text:span text:style-name="T217">des</text:span><text:span text:style-name="T219"> </text:span><text:span text:style-name="T217">données</text:span><text:span text:style-name="T219"> </text:span><text:span text:style-name="T217">:</text:span><text:span text:style-name="T220"> </text:span>Cette<text:span text:style-name="T40"> </text:span>phase<text:span text:style-name="T40"> </text:span>implique<text:span text:style-name="T40"> </text:span>la<text:span text:style-name="T39"> </text:span>collecte<text:span text:style-name="T39"> </text:span>des<text:span text:style-name="T40"> </text:span>données<text:span text:style-name="T40"> </text:span>provenant<text:span text:style-name="T39"> </text:span>de<text:span text:style-name="T39"> </text:span>diverses<text:span text:style-name="T40"> </text:span>sources telles que les historiques des transactions, les interactions client, les données démographiques, etc.</text:p>
      <text:p text:style-name="P251" loext:marker-style-name="T113"><text:span text:style-name="T217">Prétraitement</text:span><text:span text:style-name="T221"> </text:span><text:span text:style-name="T217">des</text:span><text:span text:style-name="T221"> </text:span><text:span text:style-name="T217">données</text:span><text:span text:style-name="T222"> </text:span><text:span text:style-name="T217">:</text:span><text:span text:style-name="T219"> </text:span><text:span text:style-name="T113">Les</text:span><text:span text:style-name="T140"> </text:span><text:span text:style-name="T113">données</text:span><text:span text:style-name="T140"> </text:span><text:span text:style-name="T113">collectées</text:span><text:span text:style-name="T140"> </text:span><text:span text:style-name="T113">sont</text:span><text:span text:style-name="T139"> </text:span><text:span text:style-name="T113">nettoyées,</text:span><text:span text:style-name="T139"> </text:span><text:span text:style-name="T113">transformées</text:span><text:span text:style-name="T140"> </text:span><text:span text:style-name="T113">et</text:span><text:span text:style-name="T139"> </text:span><text:span text:style-name="T113">préparées</text:span><text:span text:style-name="T139"> pour</text:span></text:p>
      <text:p text:style-name="P252">l'analyse.<text:span text:style-name="T40"> </text:span>Cela<text:span text:style-name="T40"> </text:span>peut<text:span text:style-name="T40"> </text:span>inclure<text:span text:style-name="T47"> </text:span>le<text:span text:style-name="T40"> </text:span>traitement<text:span text:style-name="T40"> </text:span>des<text:span text:style-name="T40"> </text:span>valeurs<text:span text:style-name="T47"> </text:span>manquantes,<text:span text:style-name="T40"> </text:span>la<text:span text:style-name="T40"> </text:span>normalisation<text:span text:style-name="T40"> </text:span>des<text:span text:style-name="T40"> </text:span>données,<text:span text:style-name="T40"> </text:span>la<text:span text:style-name="T40"> </text:span>gestion des outliers, etc.</text:p>
      <text:p text:style-name="P253"><text:span text:style-name="T217">Modélisation</text:span><text:span text:style-name="T221"> </text:span><text:span text:style-name="T217">:</text:span><text:span text:style-name="T219"> </text:span>Les<text:span text:style-name="T43"> </text:span>données<text:span text:style-name="T47"> </text:span>prétraitées<text:span text:style-name="T47"> </text:span>sont<text:span text:style-name="T47"> </text:span>utilisées<text:span text:style-name="T47"> </text:span>pour<text:span text:style-name="T40"> </text:span>former<text:span text:style-name="T47"> </text:span>différents<text:span text:style-name="T47"> </text:span>modèles<text:span text:style-name="T47"> </text:span>de<text:span text:style-name="T46"> </text:span>prédiction.<text:span text:style-name="T42"> </text:span><text:span text:style-name="T43">Ces</text:span></text:p>
      <text:p text:style-name="P254">modèles<text:span text:style-name="T47"> </text:span>peuvent<text:span text:style-name="T40"> </text:span>inclure<text:span text:style-name="T39"> </text:span>des<text:span text:style-name="T47"> </text:span>techniques<text:span text:style-name="T47"> </text:span>telles<text:span text:style-name="T47"> </text:span>que<text:span text:style-name="T39"> </text:span>la<text:span text:style-name="T40"> </text:span>régression<text:span text:style-name="T40"> </text:span>logistique,<text:span text:style-name="T40"> </text:span>les<text:span text:style-name="T47"> </text:span>arbres<text:span text:style-name="T47"> </text:span>de<text:span text:style-name="T47"> </text:span>décision,<text:span text:style-name="T40"> </text:span>les<text:span text:style-name="T47"> </text:span>réseaux neuronaux, etc.</text:p>
      <text:p text:style-name="P255"><text:span text:style-name="T217">Évaluation</text:span><text:span text:style-name="T218"> </text:span><text:span text:style-name="T217">du</text:span><text:span text:style-name="T218"> </text:span><text:span text:style-name="T217">modèle</text:span><text:span text:style-name="T220"> </text:span><text:span text:style-name="T217">:</text:span><text:span text:style-name="T223"> </text:span>Les<text:span text:style-name="T40"> </text:span>modèles<text:span text:style-name="T40"> </text:span>formés<text:span text:style-name="T40"> </text:span>sont<text:span text:style-name="T39"> </text:span>évalués<text:span text:style-name="T40"> </text:span>en<text:span text:style-name="T39"> </text:span>utilisant<text:span text:style-name="T39"> </text:span>des<text:span text:style-name="T40"> </text:span>métriques<text:span text:style-name="T40"> </text:span>appropriées<text:span text:style-name="T40"> </text:span>telles<text:span text:style-name="T40"> </text:span>que la précision, le rappel, la F-mesure, etc. Cela permet de sélectionner le meilleur modèle pour la prédiction.</text:p>
      <text:p text:style-name="P256"><text:span text:style-name="T217">Déploiement</text:span><text:span text:style-name="T223"> </text:span><text:span text:style-name="T217">:</text:span><text:span text:style-name="T219"> </text:span>Le<text:span text:style-name="T43"> </text:span>modèle<text:span text:style-name="T40"> </text:span>sélectionné<text:span text:style-name="T47"> </text:span>est<text:span text:style-name="T40"> </text:span>déployé<text:span text:style-name="T40"> </text:span>dans<text:span text:style-name="T47"> </text:span>un<text:span text:style-name="T40"> </text:span>environnement<text:span text:style-name="T42"> </text:span>de<text:span text:style-name="T47"> </text:span>production<text:span text:style-name="T40"> </text:span>pour<text:span text:style-name="T47"> </text:span>effectuer<text:span text:style-name="T43"> </text:span>des prédictions en temps réel sur de nouvelles données clients.</text:p>
      <text:list text:continue-numbering="true" text:style-name="WWNum14">
        <text:list-item>
          <text:list>
            <text:list-item>
              <text:h text:style-name="P257" text:outline-level="4"><text:bookmark text:name="_bookmark35"/>Data<text:span text:style-name="T42"> </text:span><text:span text:style-name="T43">set</text:span></text:h>
            </text:list-item>
          </text:list>
        </text:list-item>
      </text:list>
      <text:p text:style-name="P258">Le<text:span text:style-name="T40"> </text:span>choix<text:span text:style-name="T42"> </text:span>d'un<text:span text:style-name="T42"> </text:span>ensemble<text:span text:style-name="T39"> </text:span>de<text:span text:style-name="T39"> </text:span>données<text:span text:style-name="T42"> </text:span>de qualité<text:span text:style-name="T42"> </text:span>est<text:span text:style-name="T42"> </text:span>essentiel<text:span text:style-name="T42"> </text:span>pour<text:span text:style-name="T42"> </text:span>la<text:span text:style-name="T42"> </text:span>construction<text:span text:style-name="T42"> </text:span>d'un<text:span text:style-name="T42"> </text:span>modèle<text:span text:style-name="T42"> </text:span>précis<text:span text:style-name="T42"> </text:span><text:span text:style-name="T43">de</text:span></text:p>
      <text:p text:style-name="P171">prédiction<text:span text:style-name="T39"> </text:span>de<text:span text:style-name="T39"> </text:span>la<text:span text:style-name="T40"> </text:span>perte<text:span text:style-name="T47"> </text:span>de<text:span text:style-name="T42"> </text:span>clients.<text:span text:style-name="T39"> </text:span>Dans<text:span text:style-name="T40"> </text:span>cette<text:span text:style-name="T40"> </text:span>section,<text:span text:style-name="T39"> </text:span>nous<text:span text:style-name="T40"> </text:span>présenterons<text:span text:style-name="T40"> </text:span>le<text:span text:style-name="T40"> </text:span>jeu<text:span text:style-name="T39"> </text:span>de<text:span text:style-name="T40"> </text:span>données<text:span text:style-name="T40"> </text:span>utilisé<text:span text:style-name="T39"> </text:span>pour<text:span text:style-name="T42"> </text:span>notre projet, en expliquant sa source, sa taille, sa structure et les variables pertinentes pour notre objectif de</text:p>
      <text:p text:style-name="P176">prédiction.</text:p>
      <text:p text:style-name="P171"><draw:frame draw:style-name="fr3" draw:name="Image 20" text:anchor-type="char" svg:x="5.852in" svg:y="0.3154in" svg:width="0.9008in" svg:height="0.3535in" draw:z-index="93"><draw:image xlink:href="Pictures/10000001000000C60000004ED1B1A4DF.png" xlink:type="simple" xlink:show="embed" xlink:actuate="onLoad" draw:mime-type="image/png"/></draw:frame>Pour<text:span text:style-name="T39"> </text:span>notre<text:span text:style-name="T47"> </text:span>étude<text:span text:style-name="T39"> </text:span>nous<text:span text:style-name="T40"> </text:span>avons<text:span text:style-name="T40"> </text:span>choisi<text:span text:style-name="T42"> </text:span>une<text:span text:style-name="T40"> </text:span>base<text:span text:style-name="T40"> </text:span>de<text:span text:style-name="T40"> </text:span>données<text:span text:style-name="T40"> </text:span>sur<text:span text:style-name="T39"> </text:span>le<text:span text:style-name="T39"> </text:span>site<text:span text:style-name="T42"> </text:span>«<text:span text:style-name="T39"> </text:span>kaggle.com<text:span text:style-name="T39"> </text:span>»<text:span text:style-name="T39"> </text:span>Notre<text:span text:style-name="T40"> </text:span>ensemble<text:span text:style-name="T40"> </text:span>de données contient 7043 lignes et 21 variables.</text:p>
      <text:p text:style-name="P259">Le<text:span text:style-name="T47"> </text:span>tableau<text:span text:style-name="T197"> </text:span>ci-dessous<text:span text:style-name="T42"> </text:span>explique<text:span text:style-name="T39"> </text:span>le<text:span text:style-name="T42"> </text:span>rôle<text:span text:style-name="T42"> </text:span>de<text:span text:style-name="T40"> </text:span>chaque fonctionnalité<text:span text:style-name="T197"> </text:span><text:span text:style-name="T41">:</text:span></text:p>
      <text:p text:style-name="P260" loext:marker-style-name="T224"><text:bookmark text:name="_bookmark36"/><text:span text:style-name="T225">Tableau</text:span><text:span text:style-name="T226"> </text:span><text:span text:style-name="T225">1</text:span><text:span text:style-name="T227"> </text:span><text:span text:style-name="T225">:Description</text:span><text:span text:style-name="T228"> </text:span><text:span text:style-name="T225">des</text:span><text:span text:style-name="T227"> </text:span><text:span text:style-name="T225">variables</text:span><text:span text:style-name="T227"> </text:span><text:span text:style-name="T225">de</text:span><text:span text:style-name="T227"> </text:span><text:span text:style-name="T229">DataSet</text:span></text:p>
      <text:p text:style-name="P261" loext:marker-style-name="T23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2" loext:marker-style-name="T231"><text:span text:style-name="T232">FEATURES</text:span><text:span text:style-name="T232"/></text:p>
          </table:table-cell>
          <table:table-cell table:style-name="Table2.A1" office:value-type="string">
            <text:p text:style-name="P262" loext:marker-style-name="T231"><text:span text:style-name="T232">DESCRIPTION</text:span><text:span text:style-name="T232"/></text:p>
          </table:table-cell>
          <table:table-cell table:style-name="Table2.A1" office:value-type="string">
            <text:p text:style-name="P263" loext:marker-style-name="T231"><text:span text:style-name="T232">UNIQUE</text:span><text:span text:style-name="T232"/></text:p>
          </table:table-cell>
          <table:table-cell table:style-name="Table2.A1" office:value-type="string">
            <text:p text:style-name="P264" loext:marker-style-name="T231"><text:span text:style-name="T233">TYPE</text:span><text:span text:style-name="T233"/></text:p>
          </table:table-cell>
        </table:table-row>
        <table:table-row table:style-name="Table2.2">
          <table:table-cell table:style-name="Table2.A2" office:value-type="string">
            <text:p text:style-name="P265" loext:marker-style-name="T234"><text:span text:style-name="T235">GENDER</text:span><text:span text:style-name="T235"/></text:p>
          </table:table-cell>
          <table:table-cell table:style-name="Table2.B2" office:value-type="string">
            <text:p text:style-name="Table_20_Paragraph" loext:marker-style-name="T236"><text:span text:style-name="T236">Sexe</text:span><text:span text:style-name="T237"> </text:span><text:span text:style-name="T236">du</text:span><text:span text:style-name="T238"> </text:span><text:span text:style-name="T239">client</text:span></text:p>
          </table:table-cell>
          <table:table-cell table:style-name="Table2.C2" office:value-type="string">
            <text:p text:style-name="P266" loext:marker-style-name="T236"><text:span text:style-name="T240">2</text:span><text:span text:style-name="T240"/></text:p>
          </table:table-cell>
          <table:table-cell table:style-name="Table2.C2" office:value-type="string">
            <text:p text:style-name="P267" loext:marker-style-name="T236"><text:span text:style-name="T239">Object</text:span><text:span text:style-name="T239"/></text:p>
          </table:table-cell>
        </table:table-row>
        <table:table-row table:style-name="Table2.3">
          <table:table-cell table:style-name="Table2.A3" office:value-type="string">
            <text:p text:style-name="P265" loext:marker-style-name="T234"><text:span text:style-name="T235">SENIORCITIZEN</text:span><text:span text:style-name="T235"/></text:p>
          </table:table-cell>
          <table:table-cell table:style-name="Table2.B3" office:value-type="string">
            <text:p text:style-name="Table_20_Paragraph" loext:marker-style-name="T236"><text:span text:style-name="T236">Si</text:span><text:span text:style-name="T241"> </text:span><text:span text:style-name="T236">le</text:span><text:span text:style-name="T242"> </text:span><text:span text:style-name="T236">client</text:span><text:span text:style-name="T243"> </text:span><text:span text:style-name="T236">est</text:span><text:span text:style-name="T243"> </text:span><text:span text:style-name="T236">une</text:span><text:span text:style-name="T244"> </text:span><text:span text:style-name="T236">personne</text:span><text:span text:style-name="T242"> </text:span><text:span text:style-name="T244">âgée</text:span></text:p>
          </table:table-cell>
          <table:table-cell table:style-name="Table2.C3" office:value-type="string">
            <text:p text:style-name="P266" loext:marker-style-name="T236"><text:span text:style-name="T240">2</text:span><text:span text:style-name="T240"/></text:p>
          </table:table-cell>
          <table:table-cell table:style-name="Table2.D3" office:value-type="string">
            <text:p text:style-name="P267" loext:marker-style-name="T236"><text:span text:style-name="T239">Int64</text:span><text:span text:style-name="T239"/></text:p>
          </table:table-cell>
        </table:table-row>
        <table:table-row table:style-name="Table2.4">
          <table:table-cell table:style-name="Table2.A4" office:value-type="string">
            <text:p text:style-name="P265" loext:marker-style-name="T234"><text:span text:style-name="T235">PARTNER</text:span><text:span text:style-name="T235"/></text:p>
          </table:table-cell>
          <table:table-cell table:style-name="Table2.B4" office:value-type="string">
            <text:p text:style-name="Table_20_Paragraph" loext:marker-style-name="T236"><text:span text:style-name="T236">Si</text:span><text:span text:style-name="T244"> </text:span><text:span text:style-name="T236">le</text:span><text:span text:style-name="T239"> </text:span><text:span text:style-name="T236">client</text:span><text:span text:style-name="T241"> </text:span><text:span text:style-name="T236">a</text:span><text:span text:style-name="T239"> </text:span><text:span text:style-name="T236">un</text:span><text:span text:style-name="T244"> </text:span><text:span text:style-name="T236">partenaire</text:span><text:span text:style-name="T242"> </text:span><text:span text:style-name="T236">(Oui</text:span><text:span text:style-name="T244"> </text:span><text:span text:style-name="T236">/</text:span><text:span text:style-name="T245"> </text:span><text:span text:style-name="T244">Non)</text:span></text:p>
          </table:table-cell>
          <table:table-cell table:style-name="Table2.C4" office:value-type="string">
            <text:p text:style-name="P266" loext:marker-style-name="T236"><text:span text:style-name="T240">2</text:span><text:span text:style-name="T240"/></text:p>
          </table:table-cell>
          <table:table-cell table:style-name="Table2.C4" office:value-type="string">
            <text:p text:style-name="P267" loext:marker-style-name="T236"><text:span text:style-name="T239">Object</text:span><text:span text:style-name="T239"/></text:p>
          </table:table-cell>
        </table:table-row>
        <table:table-row table:style-name="Table2.4">
          <table:table-cell table:style-name="Table2.A5" office:value-type="string">
            <text:p text:style-name="P265" loext:marker-style-name="T234"><text:span text:style-name="T235">DEPENDENTS</text:span><text:span text:style-name="T235"/></text:p>
          </table:table-cell>
          <table:table-cell table:style-name="Table2.B5" office:value-type="string">
            <text:p text:style-name="Table_20_Paragraph" loext:marker-style-name="T236"><text:span text:style-name="T236">Nombre</text:span><text:span text:style-name="T241"> </text:span><text:span text:style-name="T236">de</text:span><text:span text:style-name="T241"> </text:span><text:span text:style-name="T236">personnes</text:span><text:span text:style-name="T238"> </text:span><text:span text:style-name="T236">à</text:span><text:span text:style-name="T244"> </text:span><text:span text:style-name="T236">charge</text:span><text:span text:style-name="T238"> </text:span><text:span text:style-name="T236">du</text:span><text:span text:style-name="T241"> </text:span><text:span text:style-name="T239">client</text:span></text:p>
          </table:table-cell>
          <table:table-cell table:style-name="Table2.C5" office:value-type="string">
            <text:p text:style-name="P266" loext:marker-style-name="T236"><text:span text:style-name="T240">2</text:span><text:span text:style-name="T240"/></text:p>
          </table:table-cell>
          <table:table-cell table:style-name="Table2.D5" office:value-type="string">
            <text:p text:style-name="P267" loext:marker-style-name="T236"><text:span text:style-name="T239">Object</text:span><text:span text:style-name="T239"/></text:p>
          </table:table-cell>
        </table:table-row>
        <table:table-row table:style-name="Table2.6">
          <table:table-cell table:style-name="Table2.A4" office:value-type="string">
            <text:p text:style-name="P265" loext:marker-style-name="T234"><text:span text:style-name="T235">TENURE</text:span><text:span text:style-name="T235"/></text:p>
          </table:table-cell>
          <table:table-cell table:style-name="Table2.B4" office:value-type="string">
            <text:p text:style-name="Table_20_Paragraph" loext:marker-style-name="T236"><text:span text:style-name="T236">Nombre</text:span><text:span text:style-name="T241"> </text:span><text:span text:style-name="T236">de</text:span><text:span text:style-name="T242"> </text:span><text:span text:style-name="T236">mois</text:span><text:span text:style-name="T244"> </text:span><text:span text:style-name="T236">pendant</text:span><text:span text:style-name="T241"> </text:span><text:span text:style-name="T236">lesquels</text:span><text:span text:style-name="T244"> </text:span><text:span text:style-name="T236">le</text:span><text:span text:style-name="T243"> </text:span><text:span text:style-name="T236">client</text:span><text:span text:style-name="T241"> </text:span><text:span text:style-name="T236">a</text:span><text:span text:style-name="T238"> </text:span><text:span text:style-name="T236">été</text:span><text:span text:style-name="T243"> </text:span><text:span text:style-name="T244">avec</text:span></text:p>
            <text:p text:style-name="P268" loext:marker-style-name="T236"><text:span text:style-name="T239">l'entreprise</text:span><text:span text:style-name="T239"/></text:p>
          </table:table-cell>
          <table:table-cell table:style-name="Table2.C4" office:value-type="string">
            <text:p text:style-name="P266" loext:marker-style-name="T236"><text:span text:style-name="T241">73</text:span><text:span text:style-name="T241"/></text:p>
          </table:table-cell>
          <table:table-cell table:style-name="Table2.C4" office:value-type="string">
            <text:p text:style-name="P267" loext:marker-style-name="T236"><text:span text:style-name="T239">Int64</text:span><text:span text:style-name="T239"/></text:p>
          </table:table-cell>
        </table:table-row>
        <table:table-row table:style-name="Table2.2">
          <table:table-cell table:style-name="Table2.A7" office:value-type="string">
            <text:p text:style-name="P265" loext:marker-style-name="T234"><text:span text:style-name="T235">PHONESERVICE</text:span><text:span text:style-name="T235"/></text:p>
          </table:table-cell>
          <table:table-cell table:style-name="Table2.B7" office:value-type="string">
            <text:p text:style-name="P269" loext:marker-style-name="T236"><text:span text:style-name="T236">Si</text:span><text:span text:style-name="T241"> </text:span><text:span text:style-name="T236">le</text:span><text:span text:style-name="T242"> </text:span><text:span text:style-name="T236">client</text:span><text:span text:style-name="T241"> </text:span><text:span text:style-name="T236">a</text:span><text:span text:style-name="T244"> </text:span><text:span text:style-name="T236">un</text:span><text:span text:style-name="T244"> </text:span><text:span text:style-name="T236">service</text:span><text:span text:style-name="T244"> </text:span><text:span text:style-name="T236">téléphonique</text:span><text:span text:style-name="T242"> </text:span><text:span text:style-name="T239">(oui/non)</text:span></text:p>
          </table:table-cell>
          <table:table-cell table:style-name="Table2.C7" office:value-type="string">
            <text:p text:style-name="P270" loext:marker-style-name="T236"><text:span text:style-name="T240">2</text:span><text:span text:style-name="T240"/></text:p>
          </table:table-cell>
          <table:table-cell table:style-name="Table2.D7" office:value-type="string">
            <text:p text:style-name="P271" loext:marker-style-name="T236"><text:span text:style-name="T239">Object</text:span><text:span text:style-name="T239"/></text:p>
          </table:table-cell>
        </table:table-row>
        <table:table-row table:style-name="Table2.8">
          <table:table-cell table:style-name="Table2.A4" office:value-type="string">
            <text:p text:style-name="P265" loext:marker-style-name="T234"><text:span text:style-name="T235">MULTIPLELINES</text:span><text:span text:style-name="T235"/></text:p>
          </table:table-cell>
          <table:table-cell table:style-name="Table2.B4" office:value-type="string">
            <text:p text:style-name="P268" loext:marker-style-name="T236"><text:span text:style-name="T236">Si</text:span><text:span text:style-name="T243"> </text:span><text:span text:style-name="T236">le</text:span><text:span text:style-name="T244"> </text:span><text:span text:style-name="T236">client</text:span><text:span text:style-name="T238"> </text:span><text:span text:style-name="T236">a</text:span><text:span text:style-name="T241"> </text:span><text:span text:style-name="T236">plusieurs</text:span><text:span text:style-name="T241"> </text:span><text:span text:style-name="T236">lignes</text:span><text:span text:style-name="T241"> </text:span><text:span text:style-name="T236">téléphones</text:span><text:span text:style-name="T243"> </text:span><text:span text:style-name="T239">(oui/non)</text:span></text:p>
          </table:table-cell>
          <table:table-cell table:style-name="Table2.C4" office:value-type="string">
            <text:p text:style-name="P272" loext:marker-style-name="T236"><text:span text:style-name="T240">3</text:span><text:span text:style-name="T240"/></text:p>
          </table:table-cell>
          <table:table-cell table:style-name="Table2.C4" office:value-type="string">
            <text:p text:style-name="P273" loext:marker-style-name="T236"><text:span text:style-name="T239">Object</text:span><text:span text:style-name="T239"/></text:p>
          </table:table-cell>
        </table:table-row>
        <table:table-row table:style-name="Table2.8">
          <table:table-cell table:style-name="Table2.A9" office:value-type="string">
            <text:p text:style-name="P265" loext:marker-style-name="T234"><text:span text:style-name="T235">INTERNETSERVICE</text:span><text:span text:style-name="T235"/></text:p>
          </table:table-cell>
          <table:table-cell table:style-name="Table2.B9" office:value-type="string">
            <text:p text:style-name="P268" loext:marker-style-name="T236"><text:span text:style-name="T236">Type</text:span><text:span text:style-name="T238"> </text:span><text:span text:style-name="T236">de</text:span><text:span text:style-name="T243"> </text:span><text:span text:style-name="T236">service</text:span><text:span text:style-name="T244"> </text:span><text:span text:style-name="T236">Internet</text:span><text:span text:style-name="T246"> </text:span><text:span text:style-name="T236">dont</text:span><text:span text:style-name="T243"> </text:span><text:span text:style-name="T236">dispose</text:span><text:span text:style-name="T241"> </text:span><text:span text:style-name="T236">le</text:span><text:span text:style-name="T243"> </text:span><text:span text:style-name="T239">client</text:span></text:p>
          </table:table-cell>
          <table:table-cell table:style-name="Table2.C9" office:value-type="string">
            <text:p text:style-name="P272" loext:marker-style-name="T236"><text:span text:style-name="T240">3</text:span><text:span text:style-name="T240"/></text:p>
          </table:table-cell>
          <table:table-cell table:style-name="Table2.D9" office:value-type="string">
            <text:p text:style-name="P273" loext:marker-style-name="T236"><text:span text:style-name="T239">Object</text:span><text:span text:style-name="T239"/></text:p>
          </table:table-cell>
        </table:table-row>
        <table:table-row table:style-name="Table2.4">
          <table:table-cell table:style-name="Table2.A4" office:value-type="string">
            <text:p text:style-name="P265" loext:marker-style-name="T234"><text:span text:style-name="T235">ONLINESECURITY</text:span><text:span text:style-name="T235"/></text:p>
          </table:table-cell>
          <table:table-cell table:style-name="Table2.B4" office:value-type="string">
            <text:p text:style-name="Table_20_Paragraph" loext:marker-style-name="T236"><text:span text:style-name="T236">Si</text:span><text:span text:style-name="T244"> </text:span><text:span text:style-name="T236">le</text:span><text:span text:style-name="T245"> </text:span><text:span text:style-name="T236">client</text:span><text:span text:style-name="T244"> </text:span><text:span text:style-name="T236">a</text:span><text:span text:style-name="T239"> </text:span><text:span text:style-name="T236">un</text:span><text:span text:style-name="T242"> </text:span><text:span text:style-name="T236">service</text:span><text:span text:style-name="T239"> </text:span><text:span text:style-name="T236">de</text:span><text:span text:style-name="T244"> </text:span><text:span text:style-name="T236">sécurité</text:span><text:span text:style-name="T244"> </text:span><text:span text:style-name="T236">en</text:span><text:span text:style-name="T239"> </text:span><text:span text:style-name="T244">ligne</text:span></text:p>
          </table:table-cell>
          <table:table-cell table:style-name="Table2.C4" office:value-type="string">
            <text:p text:style-name="P266" loext:marker-style-name="T236"><text:span text:style-name="T240">3</text:span><text:span text:style-name="T240"/></text:p>
          </table:table-cell>
          <table:table-cell table:style-name="Table2.C4" office:value-type="string">
            <text:p text:style-name="P267" loext:marker-style-name="T236"><text:span text:style-name="T239">Object</text:span><text:span text:style-name="T239"/></text:p>
          </table:table-cell>
        </table:table-row>
        <table:table-row table:style-name="Table2.2">
          <table:table-cell table:style-name="Table2.A11" office:value-type="string">
            <text:p text:style-name="P265" loext:marker-style-name="T234"><text:span text:style-name="T235">ONLINEBACKUP</text:span><text:span text:style-name="T235"/></text:p>
          </table:table-cell>
          <table:table-cell table:style-name="Table2.B11" office:value-type="string">
            <text:p text:style-name="Table_20_Paragraph" loext:marker-style-name="T236"><text:span text:style-name="T236">Si</text:span><text:span text:style-name="T241"> </text:span><text:span text:style-name="T236">le</text:span><text:span text:style-name="T239"> </text:span><text:span text:style-name="T236">client</text:span><text:span text:style-name="T243"> </text:span><text:span text:style-name="T236">a</text:span><text:span text:style-name="T242"> </text:span><text:span text:style-name="T236">un</text:span><text:span text:style-name="T244"> </text:span><text:span text:style-name="T236">service</text:span><text:span text:style-name="T244"> </text:span><text:span text:style-name="T236">de</text:span><text:span text:style-name="T241"> </text:span><text:span text:style-name="T236">sauvegarde</text:span><text:span text:style-name="T241"> </text:span><text:span text:style-name="T236">en</text:span><text:span text:style-name="T242"> </text:span><text:span text:style-name="T244">ligne</text:span></text:p>
          </table:table-cell>
          <table:table-cell table:style-name="Table2.C11" office:value-type="string">
            <text:p text:style-name="P266" loext:marker-style-name="T236"><text:span text:style-name="T240">3</text:span><text:span text:style-name="T240"/></text:p>
          </table:table-cell>
          <table:table-cell table:style-name="Table2.D11" office:value-type="string">
            <text:p text:style-name="P267" loext:marker-style-name="T236"><text:span text:style-name="T239">Object</text:span><text:span text:style-name="T239"/></text:p>
          </table:table-cell>
        </table:table-row>
        <table:table-row table:style-name="Table2.12">
          <table:table-cell table:style-name="Table2.A4" office:value-type="string">
            <text:p text:style-name="P265" loext:marker-style-name="T234"><text:span text:style-name="T235">DEVICEPROTECTION</text:span><text:span text:style-name="T235"/></text:p>
          </table:table-cell>
          <table:table-cell table:style-name="Table2.B4" office:value-type="string">
            <text:p text:style-name="P274" loext:marker-style-name="T236"><text:span text:style-name="T236">Si</text:span><text:span text:style-name="T241"> </text:span><text:span text:style-name="T236">le</text:span><text:span text:style-name="T244"> </text:span><text:span text:style-name="T236">client</text:span><text:span text:style-name="T241"> </text:span><text:span text:style-name="T236">a</text:span><text:span text:style-name="T244"> </text:span><text:span text:style-name="T236">disposé</text:span><text:span text:style-name="T244"> </text:span><text:span text:style-name="T236">d’un</text:span><text:span text:style-name="T241"> </text:span><text:span text:style-name="T236">service</text:span><text:span text:style-name="T244"> </text:span><text:span text:style-name="T236">de</text:span><text:span text:style-name="T242"> </text:span><text:span text:style-name="T236">protection</text:span><text:span text:style-name="T241"> </text:span><text:span text:style-name="T236">des</text:span><text:span text:style-name="T242"> </text:span><text:span text:style-name="T239">appareils</text:span></text:p>
          </table:table-cell>
          <table:table-cell table:style-name="Table2.C4" office:value-type="string">
            <text:p text:style-name="P275" loext:marker-style-name="T236"><text:span text:style-name="T240">3</text:span><text:span text:style-name="T240"/></text:p>
          </table:table-cell>
          <table:table-cell table:style-name="Table2.C4" office:value-type="string">
            <text:p text:style-name="P276" loext:marker-style-name="T236"><text:span text:style-name="T239">Object</text:span><text:span text:style-name="T239"/></text:p>
          </table:table-cell>
        </table:table-row>
        <table:table-row table:style-name="Table2.3">
          <table:table-cell table:style-name="Table2.A13" office:value-type="string">
            <text:p text:style-name="P265" loext:marker-style-name="T234"><text:span text:style-name="T235">TECHSUPPORT</text:span><text:span text:style-name="T235"/></text:p>
          </table:table-cell>
          <table:table-cell table:style-name="Table2.B13" office:value-type="string">
            <text:p text:style-name="Table_20_Paragraph" loext:marker-style-name="T236"><text:span text:style-name="T236">Si</text:span><text:span text:style-name="T237"> </text:span><text:span text:style-name="T236">le</text:span><text:span text:style-name="T243"> </text:span><text:span text:style-name="T236">client</text:span><text:span text:style-name="T237"> </text:span><text:span text:style-name="T236">a</text:span><text:span text:style-name="T238"> </text:span><text:span text:style-name="T236">dispose</text:span><text:span text:style-name="T238"> </text:span><text:span text:style-name="T236">d’un</text:span><text:span text:style-name="T246"> </text:span><text:span text:style-name="T236">service</text:span><text:span text:style-name="T246"> </text:span><text:span text:style-name="T236">d’assistance</text:span><text:span text:style-name="T246"> </text:span><text:span text:style-name="T239">technique</text:span></text:p>
          </table:table-cell>
          <table:table-cell table:style-name="Table2.C13" office:value-type="string">
            <text:p text:style-name="P266" loext:marker-style-name="T236"><text:span text:style-name="T240">3</text:span><text:span text:style-name="T240"/></text:p>
          </table:table-cell>
          <table:table-cell table:style-name="Table2.D13" office:value-type="string">
            <text:p text:style-name="P267" loext:marker-style-name="T236"><text:span text:style-name="T239">Object</text:span><text:span text:style-name="T239"/></text:p>
          </table:table-cell>
        </table:table-row>
        <table:table-row table:style-name="Table2.4">
          <table:table-cell table:style-name="Table2.A4" office:value-type="string">
            <text:p text:style-name="P265" loext:marker-style-name="T234"><text:span text:style-name="T235">STREAMINGTV</text:span><text:span text:style-name="T235"/></text:p>
          </table:table-cell>
          <table:table-cell table:style-name="Table2.B4" office:value-type="string">
            <text:p text:style-name="Table_20_Paragraph" loext:marker-style-name="T236"><text:span text:style-name="T236">Si</text:span><text:span text:style-name="T244"> </text:span><text:span text:style-name="T236">le</text:span><text:span text:style-name="T239"> </text:span><text:span text:style-name="T236">client</text:span><text:span text:style-name="T241"> </text:span><text:span text:style-name="T236">a</text:span><text:span text:style-name="T242"> </text:span><text:span text:style-name="T236">un</text:span><text:span text:style-name="T244"> </text:span><text:span text:style-name="T236">service</text:span><text:span text:style-name="T242"> </text:span><text:span text:style-name="T236">de</text:span><text:span text:style-name="T241"> </text:span><text:span text:style-name="T236">streaming</text:span><text:span text:style-name="T245"> </text:span><text:span text:style-name="T236">TV</text:span><text:span text:style-name="T239"> (oui/non)</text:span></text:p>
          </table:table-cell>
          <table:table-cell table:style-name="Table2.C4" office:value-type="string">
            <text:p text:style-name="P266" loext:marker-style-name="T236"><text:span text:style-name="T240">3</text:span><text:span text:style-name="T240"/></text:p>
          </table:table-cell>
          <table:table-cell table:style-name="Table2.C4" office:value-type="string">
            <text:p text:style-name="P267" loext:marker-style-name="T236"><text:span text:style-name="T239">Object</text:span><text:span text:style-name="T239"/></text:p>
          </table:table-cell>
        </table:table-row>
        <table:table-row table:style-name="Table2.4">
          <table:table-cell table:style-name="Table2.A15" office:value-type="string">
            <text:p text:style-name="P265" loext:marker-style-name="T234"><text:span text:style-name="T235">STREAMINGMOVIES</text:span><text:span text:style-name="T235"/></text:p>
          </table:table-cell>
          <table:table-cell table:style-name="Table2.B15" office:value-type="string">
            <text:p text:style-name="Table_20_Paragraph" loext:marker-style-name="T236"><text:span text:style-name="T236">Si</text:span><text:span text:style-name="T244"> </text:span><text:span text:style-name="T236">le</text:span><text:span text:style-name="T239"> </text:span><text:span text:style-name="T236">client</text:span><text:span text:style-name="T241"> </text:span><text:span text:style-name="T236">a</text:span><text:span text:style-name="T242"> </text:span><text:span text:style-name="T236">un</text:span><text:span text:style-name="T242"> </text:span><text:span text:style-name="T236">service</text:span><text:span text:style-name="T242"> </text:span><text:span text:style-name="T236">de</text:span><text:span text:style-name="T241"> </text:span><text:span text:style-name="T236">streaming</text:span><text:span text:style-name="T244"> </text:span><text:span text:style-name="T236">de</text:span><text:span text:style-name="T239"> </text:span><text:span text:style-name="T244">films</text:span></text:p>
          </table:table-cell>
          <table:table-cell table:style-name="Table2.C15" office:value-type="string">
            <text:p text:style-name="P266" loext:marker-style-name="T236"><text:span text:style-name="T240">3</text:span><text:span text:style-name="T240"/></text:p>
          </table:table-cell>
          <table:table-cell table:style-name="Table2.D15" office:value-type="string">
            <text:p text:style-name="P267" loext:marker-style-name="T236"><text:span text:style-name="T239">Object</text:span><text:span text:style-name="T239"/></text:p>
          </table:table-cell>
        </table:table-row>
        <table:table-row table:style-name="Table2.2">
          <table:table-cell table:style-name="Table2.A4" office:value-type="string">
            <text:p text:style-name="P265" loext:marker-style-name="T234"><text:span text:style-name="T235">CONTRACT</text:span><text:span text:style-name="T235"/></text:p>
          </table:table-cell>
          <table:table-cell table:style-name="Table2.B4" office:value-type="string">
            <text:p text:style-name="Table_20_Paragraph" loext:marker-style-name="T236"><text:span text:style-name="T236">Durée</text:span><text:span text:style-name="T243"> </text:span><text:span text:style-name="T236">du</text:span><text:span text:style-name="T241"> </text:span><text:span text:style-name="T236">contrat</text:span><text:span text:style-name="T241"> </text:span><text:span text:style-name="T236">du</text:span><text:span text:style-name="T241"> </text:span><text:span text:style-name="T236">client</text:span><text:span text:style-name="T241"> </text:span><text:span text:style-name="T236">(Mois</text:span><text:span text:style-name="T243"> </text:span><text:span text:style-name="T236">par</text:span><text:span text:style-name="T244"> </text:span><text:span text:style-name="T236">mois,</text:span><text:span text:style-name="T244"> </text:span><text:span text:style-name="T236">Un</text:span><text:span text:style-name="T242"> </text:span><text:span text:style-name="T236">an,</text:span><text:span text:style-name="T243"> </text:span><text:span text:style-name="T236">Deux</text:span><text:span text:style-name="T242"> </text:span><text:span text:style-name="T244">ans)</text:span></text:p>
          </table:table-cell>
          <table:table-cell table:style-name="Table2.C4" office:value-type="string">
            <text:p text:style-name="P266" loext:marker-style-name="T236"><text:span text:style-name="T240">3</text:span><text:span text:style-name="T240"/></text:p>
          </table:table-cell>
          <table:table-cell table:style-name="Table2.C4" office:value-type="string">
            <text:p text:style-name="P267" loext:marker-style-name="T236"><text:span text:style-name="T239">Object</text:span><text:span text:style-name="T239"/></text:p>
          </table:table-cell>
        </table:table-row>
        <table:table-row table:style-name="Table2.4">
          <table:table-cell table:style-name="Table2.A17" office:value-type="string">
            <text:p text:style-name="P265" loext:marker-style-name="T234"><text:span text:style-name="T235">PAPERLESSBILLING</text:span><text:span text:style-name="T235"/></text:p>
          </table:table-cell>
          <table:table-cell table:style-name="Table2.B17" office:value-type="string">
            <text:p text:style-name="Table_20_Paragraph" loext:marker-style-name="T236"><text:span text:style-name="T236">Si</text:span><text:span text:style-name="T243"> </text:span><text:span text:style-name="T236">le</text:span><text:span text:style-name="T242"> </text:span><text:span text:style-name="T236">client</text:span><text:span text:style-name="T243"> </text:span><text:span text:style-name="T236">utilise</text:span><text:span text:style-name="T242"> </text:span><text:span text:style-name="T236">la</text:span><text:span text:style-name="T238"> </text:span><text:span text:style-name="T236">facturation</text:span><text:span text:style-name="T241"> </text:span><text:span text:style-name="T236">sans</text:span><text:span text:style-name="T241"> </text:span><text:span text:style-name="T236">papier</text:span><text:span text:style-name="T243"> </text:span><text:span text:style-name="T239">(oui/non)</text:span></text:p>
          </table:table-cell>
          <table:table-cell table:style-name="Table2.C17" office:value-type="string">
            <text:p text:style-name="P266" loext:marker-style-name="T236"><text:span text:style-name="T240">2</text:span><text:span text:style-name="T240"/></text:p>
          </table:table-cell>
          <table:table-cell table:style-name="Table2.D17" office:value-type="string">
            <text:p text:style-name="P267" loext:marker-style-name="T236"><text:span text:style-name="T239">Object</text:span><text:span text:style-name="T239"/></text:p>
          </table:table-cell>
        </table:table-row>
        <table:table-row table:style-name="Table2.18">
          <table:table-cell table:style-name="Table2.A4" office:value-type="string">
            <text:p text:style-name="P265" loext:marker-style-name="T234"><text:span text:style-name="T235">PAYMENTMETHOD</text:span><text:span text:style-name="T235"/></text:p>
          </table:table-cell>
          <table:table-cell table:style-name="Table2.B4" office:value-type="string">
            <text:p text:style-name="P274" loext:marker-style-name="T113"><text:span text:style-name="T113">Mode de paiement du client (Chèque électronique, Chèque</text:span><text:span text:style-name="T247"> </text:span><text:span text:style-name="T113">par</text:span><text:span text:style-name="T247"> </text:span><text:span text:style-name="T113">courrier</text:span><text:span text:style-name="T247"> </text:span><text:span text:style-name="T113">,Carte</text:span><text:span text:style-name="T247"> </text:span><text:span text:style-name="T113">de</text:span><text:span text:style-name="T247"> </text:span><text:span text:style-name="T113">crédit</text:span><text:span text:style-name="T248"> </text:span><text:span text:style-name="T113">,Virement</text:span><text:span text:style-name="T248"> </text:span><text:span text:style-name="T113">bancaire</text:span></text:p>
            <text:p text:style-name="P277" loext:marker-style-name="T113"><text:span text:style-name="T193">)</text:span><text:span text:style-name="T193"/></text:p>
          </table:table-cell>
          <table:table-cell table:style-name="Table2.C4" office:value-type="string">
            <text:p text:style-name="P266" loext:marker-style-name="T236"><text:span text:style-name="T240">4</text:span><text:span text:style-name="T240"/></text:p>
          </table:table-cell>
          <table:table-cell table:style-name="Table2.C4" office:value-type="string">
            <text:p text:style-name="P267" loext:marker-style-name="T236"><text:span text:style-name="T239">Object</text:span><text:span text:style-name="T239"/></text:p>
          </table:table-cell>
        </table:table-row>
        <table:table-row table:style-name="Table2.4">
          <table:table-cell table:style-name="Table2.A19" office:value-type="string">
            <text:p text:style-name="P265" loext:marker-style-name="T234"><text:span text:style-name="T235">MONTHLYCHARGES</text:span><text:span text:style-name="T235"/></text:p>
          </table:table-cell>
          <table:table-cell table:style-name="Table2.B19" office:value-type="string">
            <text:p text:style-name="Table_20_Paragraph" loext:marker-style-name="T236"><text:span text:style-name="T236">Frais</text:span><text:span text:style-name="T244"> </text:span><text:span text:style-name="T236">mensuels</text:span><text:span text:style-name="T244"> </text:span><text:span text:style-name="T236">pour</text:span><text:span text:style-name="T238"> </text:span><text:span text:style-name="T236">les</text:span><text:span text:style-name="T243"> </text:span><text:span text:style-name="T236">services</text:span><text:span text:style-name="T243"> </text:span><text:span text:style-name="T236">du</text:span><text:span text:style-name="T244"> </text:span><text:span text:style-name="T239">client</text:span></text:p>
          </table:table-cell>
          <table:table-cell table:style-name="Table2.C19" office:value-type="string">
            <text:p text:style-name="P266" loext:marker-style-name="T236"><text:span text:style-name="T244">1585</text:span><text:span text:style-name="T244"/></text:p>
          </table:table-cell>
          <table:table-cell table:style-name="Table2.D19" office:value-type="string">
            <text:p text:style-name="P267" loext:marker-style-name="T236"><text:span text:style-name="T239">Float64</text:span><text:span text:style-name="T239"/></text:p>
          </table:table-cell>
        </table:table-row>
        <table:table-row table:style-name="Table2.20">
          <table:table-cell table:style-name="Table2.A4" office:value-type="string">
            <text:p text:style-name="P265" loext:marker-style-name="T234"><text:span text:style-name="T235">TOTALCHARGES</text:span><text:span text:style-name="T235"/></text:p>
          </table:table-cell>
          <table:table-cell table:style-name="Table2.B4" office:value-type="string">
            <text:p text:style-name="P274" loext:marker-style-name="T236"><text:span text:style-name="T236">Total</text:span><text:span text:style-name="T238"> </text:span><text:span text:style-name="T236">des</text:span><text:span text:style-name="T237"> </text:span><text:span text:style-name="T236">frais</text:span><text:span text:style-name="T243"> </text:span><text:span text:style-name="T236">pour</text:span><text:span text:style-name="T240"> </text:span><text:span text:style-name="T236">le</text:span><text:span text:style-name="T241"> </text:span><text:span text:style-name="T239">client</text:span></text:p>
          </table:table-cell>
          <table:table-cell table:style-name="Table2.C4" office:value-type="string">
            <text:p text:style-name="P275" loext:marker-style-name="T236"><text:span text:style-name="T244">6531</text:span><text:span text:style-name="T244"/></text:p>
          </table:table-cell>
          <table:table-cell table:style-name="Table2.C4" office:value-type="string">
            <text:p text:style-name="P276" loext:marker-style-name="T236"><text:span text:style-name="T239">Float64</text:span><text:span text:style-name="T239"/></text:p>
          </table:table-cell>
        </table:table-row>
        <table:table-row table:style-name="Table2.21">
          <table:table-cell table:style-name="Table2.A21" office:value-type="string">
            <text:p text:style-name="P265" loext:marker-style-name="T234"><text:span text:style-name="T235">CHURN</text:span><text:span text:style-name="T235"/></text:p>
          </table:table-cell>
          <table:table-cell table:style-name="Table2.B21" office:value-type="string">
            <text:p text:style-name="P269" loext:marker-style-name="T236"><text:span text:style-name="T236">Si</text:span><text:span text:style-name="T244"> </text:span><text:span text:style-name="T236">le</text:span><text:span text:style-name="T239"> </text:span><text:span text:style-name="T236">client</text:span><text:span text:style-name="T244"> </text:span><text:span text:style-name="T236">a</text:span><text:span text:style-name="T242"> </text:span><text:span text:style-name="T236">résilié</text:span><text:span text:style-name="T242"> </text:span><text:span text:style-name="T236">son</text:span><text:span text:style-name="T242"> </text:span><text:span text:style-name="T236">service</text:span><text:span text:style-name="T242"> </text:span><text:span text:style-name="T236">au</text:span><text:span text:style-name="T242"> </text:span><text:span text:style-name="T236">cours</text:span><text:span text:style-name="T243"> </text:span><text:span text:style-name="T236">du</text:span><text:span text:style-name="T244"> </text:span><text:span text:style-name="T236">mois</text:span><text:span text:style-name="T239"> </text:span><text:span text:style-name="T236">dernier</text:span><text:span text:style-name="T242"> </text:span><text:span text:style-name="T236">(</text:span><text:span text:style-name="T245"> </text:span><text:span text:style-name="T244">oui/</text:span></text:p>
            <text:p text:style-name="P268" loext:marker-style-name="T236"><text:span text:style-name="T244">non)</text:span><text:span text:style-name="T244"/></text:p>
          </table:table-cell>
          <table:table-cell table:style-name="Table2.C21" office:value-type="string">
            <text:p text:style-name="P270" loext:marker-style-name="T236"><text:span text:style-name="T240">2</text:span><text:span text:style-name="T240"/></text:p>
          </table:table-cell>
          <table:table-cell table:style-name="Table2.D21" office:value-type="string">
            <text:p text:style-name="P271" loext:marker-style-name="T236"><text:span text:style-name="T239">object</text:span><text:span text:style-name="T239"/></text:p>
          </table:table-cell>
        </table:table-row>
      </table:table>
      <text:p text:style-name="P278" loext:marker-style-name="T224"/>
      <text:p text:style-name="P279" loext:marker-style-name="T224"/>
      <text:list xml:id="list191358439057199" text:continue-numbering="true" text:style-name="WWNum14">
        <text:list-item>
          <text:list>
            <text:list-item>
              <text:h text:style-name="P280" text:outline-level="4"><text:bookmark text:name="_bookmark37"/>Choix<text:span text:style-name="T40"> </text:span>des<text:span text:style-name="T42"> </text:span>algorithmes<text:span text:style-name="T42"> </text:span>et<text:span text:style-name="T40"> </text:span><text:span text:style-name="T39">techniques</text:span></text:h>
            </text:list-item>
          </text:list>
        </text:list-item>
      </text:list>
      <text:p text:style-name="P281" loext:marker-style-name="T249"><text:span text:style-name="T250">3.5.2</text:span><text:span text:style-name="T251"> techniques</text:span></text:p>
      <text:p text:style-name="P282">Pour<text:span text:style-name="T42"> </text:span>répondre<text:span text:style-name="T197"> </text:span>à<text:span text:style-name="T39"> </text:span>notre<text:span text:style-name="T39"> </text:span>problématique<text:span text:style-name="T39"> </text:span>de<text:span text:style-name="T42"> </text:span>prédiction<text:span text:style-name="T42"> </text:span>de<text:span text:style-name="T42"> </text:span>la<text:span text:style-name="T42"> </text:span>perte<text:span text:style-name="T39"> </text:span>de<text:span text:style-name="T39"> </text:span>clients<text:span text:style-name="T42"> </text:span>dans<text:span text:style-name="T39"> </text:span>le<text:span text:style-name="T42"> </text:span>domaine<text:span text:style-name="T42"> </text:span><text:span text:style-name="T43">des</text:span></text:p>
      <text:p text:style-name="P283">télécommunications,<text:span text:style-name="T46"> </text:span>nous<text:span text:style-name="T47"> </text:span>avons<text:span text:style-name="T47"> </text:span>soigneusement<text:span text:style-name="T47"> </text:span>sélectionné<text:span text:style-name="T47"> </text:span>les<text:span text:style-name="T47"> </text:span>algorithmes<text:span text:style-name="T43"> </text:span>et<text:span text:style-name="T40"> </text:span>techniques<text:span text:style-name="T47"> </text:span>suivants<text:span text:style-name="T47"> </text:span><text:span text:style-name="T41">:</text:span></text:p>
      <text:list text:style-name="WWNum21">
        <text:list-item>
          <text:p text:style-name="P284" loext:marker-style-name="T113"><text:span text:style-name="T252">GradientBoostingClassifier</text:span><text:span text:style-name="T253"> </text:span><text:span text:style-name="T252">:</text:span><text:span text:style-name="T254"> </text:span><text:span text:style-name="T113">C'est</text:span><text:span text:style-name="T136"> </text:span><text:span text:style-name="T113">un</text:span><text:span text:style-name="T136"> </text:span><text:span text:style-name="T113">algorithme</text:span><text:span text:style-name="T136"> </text:span><text:span text:style-name="T113">d'ensemble</text:span><text:span text:style-name="T139"> </text:span><text:span text:style-name="T113">qui</text:span><text:span text:style-name="T136"> </text:span><text:span text:style-name="T113">combine</text:span><text:span text:style-name="T139"> </text:span><text:span text:style-name="T113">plusieurs</text:span><text:span text:style-name="T139"> </text:span><text:span text:style-name="T113">modèles</text:span><text:span text:style-name="T139"> </text:span><text:span text:style-name="T113">de</text:span><text:span text:style-name="T140"> </text:span><text:span text:style-name="T113">faible qualité (généralement des arbres de décision) pour créer un modèle de prédiction plus robuste. Il</text:span></text:p>
        </text:list-item>
      </text:list>
      <text:p text:style-name="P285">fonctionne<text:span text:style-name="T40"> </text:span>en<text:span text:style-name="T39"> </text:span>ajoutant<text:span text:style-name="T39"> </text:span>séquentiellement<text:span text:style-name="T39"> </text:span>des<text:span text:style-name="T40"> </text:span>modèles<text:span text:style-name="T40"> </text:span>qui<text:span text:style-name="T39"> </text:span>corrigent<text:span text:style-name="T39"> </text:span>les<text:span text:style-name="T40"> </text:span>erreurs<text:span text:style-name="T40"> </text:span>faites<text:span text:style-name="T40"> </text:span>par<text:span text:style-name="T39"> </text:span>les<text:span text:style-name="T40"> </text:span>modèles <text:span text:style-name="T39">existants.</text:span></text:p>
      <text:list text:continue-numbering="true" text:style-name="WWNum21">
        <text:list-item>
          <text:p text:style-name="P286" loext:marker-style-name="T113"><text:span text:style-name="T255">Les</text:span><text:span text:style-name="T256"> </text:span><text:span text:style-name="T255">arbres</text:span><text:span text:style-name="T257"> </text:span><text:span text:style-name="T255">de</text:span><text:span text:style-name="T257"> </text:span><text:span text:style-name="T255">décision</text:span><text:span text:style-name="T257"> </text:span><text:span text:style-name="T255">:</text:span><text:span text:style-name="T258"> </text:span><text:span text:style-name="T113">Cet</text:span><text:span text:style-name="T138"> </text:span><text:span text:style-name="T113">algorithme</text:span><text:span text:style-name="T137"> </text:span><text:span text:style-name="T113">de</text:span><text:span text:style-name="T139"> </text:span><text:span text:style-name="T113">classification</text:span><text:span text:style-name="T138"> </text:span><text:span text:style-name="T113">crée</text:span><text:span text:style-name="T136"> </text:span><text:span text:style-name="T113">un</text:span><text:span text:style-name="T138"> </text:span><text:span text:style-name="T113">arbre</text:span><text:span text:style-name="T139"> </text:span><text:span text:style-name="T113">de</text:span><text:span text:style-name="T137"> </text:span><text:span text:style-name="T113">décision</text:span><text:span text:style-name="T137"> </text:span><text:span text:style-name="T113">en</text:span><text:span text:style-name="T138"> </text:span><text:span text:style-name="T137">divisant</text:span></text:p>
        </text:list-item>
      </text:list>
      <text:p text:style-name="P239">répétitivement<text:span text:style-name="T40"> </text:span>les<text:span text:style-name="T47"> </text:span>données<text:span text:style-name="T47"> </text:span>en<text:span text:style-name="T40"> </text:span>sous-ensembles<text:span text:style-name="T47"> </text:span>homogènes<text:span text:style-name="T47"> </text:span>basés<text:span text:style-name="T47"> </text:span>sur<text:span text:style-name="T40"> </text:span>les<text:span text:style-name="T47"> </text:span>caractéristiques.<text:span text:style-name="T40"> </text:span>Il<text:span text:style-name="T40"> </text:span>est<text:span text:style-name="T40"> </text:span>connu<text:span text:style-name="T40"> </text:span>pour être facile à interpréter et peut gérer à la fois des données numériques et catégorielles.</text:p>
      <text:list text:continue-numbering="true" text:style-name="WWNum21">
        <text:list-item>
          <text:p text:style-name="P287" loext:marker-style-name="T113"><text:soft-page-break/><text:span text:style-name="T252">Support</text:span><text:span text:style-name="T253"> </text:span><text:span text:style-name="T252">Vector</text:span><text:span text:style-name="T253"> </text:span><text:span text:style-name="T252">Classifier</text:span><text:span text:style-name="T253"> </text:span><text:span text:style-name="T252">(SVC</text:span><text:span text:style-name="T255">)</text:span><text:span text:style-name="T257"> </text:span><text:span text:style-name="T255">:</text:span><text:span text:style-name="T256"> </text:span><text:span text:style-name="T113">C'est</text:span><text:span text:style-name="T136"> </text:span><text:span text:style-name="T113">un</text:span><text:span text:style-name="T136"> </text:span><text:span text:style-name="T113">algorithme</text:span><text:span text:style-name="T136"> </text:span><text:span text:style-name="T113">de</text:span><text:span text:style-name="T140"> </text:span><text:span text:style-name="T113">classification</text:span><text:span text:style-name="T136"> </text:span><text:span text:style-name="T113">qui</text:span><text:span text:style-name="T136"> </text:span><text:span text:style-name="T113">cherche</text:span><text:span text:style-name="T139"> </text:span><text:span text:style-name="T113">à</text:span><text:span text:style-name="T139"> </text:span><text:span text:style-name="T113">trouver</text:span><text:span text:style-name="T136"> </text:span><text:span text:style-name="T113">l'hyperplan qui maximise la marge entre les classes dans un espace multidimensionnel. Il peut être utilisé avec</text:span></text:p>
        </text:list-item>
      </text:list>
      <text:p text:style-name="P285">différents<text:span text:style-name="T40"> </text:span>types<text:span text:style-name="T40"> </text:span>de<text:span text:style-name="T40"> </text:span>noyaux,<text:span text:style-name="T39"> </text:span>tels<text:span text:style-name="T40"> </text:span>que<text:span text:style-name="T40"> </text:span>linéaire<text:span text:style-name="T47"> </text:span>(utilisant<text:span text:style-name="T39"> </text:span>un<text:span text:style-name="T39"> </text:span>hyperplan<text:span text:style-name="T39"> </text:span>linéaire)<text:span text:style-name="T39"> </text:span>ou<text:span text:style-name="T39"> </text:span>non<text:span text:style-name="T39"> </text:span>linéaire<text:span text:style-name="T47"> </text:span>(utilisant<text:span text:style-name="T39"> </text:span>un noyau de base radiale, RBF).</text:p>
      <text:list text:continue-numbering="true" text:style-name="WWNum21">
        <text:list-item>
          <text:p text:style-name="P288" loext:marker-style-name="T113"><text:span text:style-name="T252">Les</text:span><text:span text:style-name="T259"> </text:span><text:span text:style-name="T252">forêts</text:span><text:span text:style-name="T259"> </text:span><text:span text:style-name="T252">d’arbres</text:span><text:span text:style-name="T259"> </text:span><text:span text:style-name="T252">décisionnels</text:span><text:span text:style-name="T259"> </text:span><text:span text:style-name="T252">(Random</text:span><text:span text:style-name="T254"> </text:span><text:span text:style-name="T252">Forest</text:span><text:span text:style-name="T255">)</text:span><text:span text:style-name="T260"> </text:span><text:span text:style-name="T255">:</text:span><text:span text:style-name="T260"> </text:span><text:span text:style-name="T113">C'est</text:span><text:span text:style-name="T136"> </text:span><text:span text:style-name="T113">un</text:span><text:span text:style-name="T136"> </text:span><text:span text:style-name="T113">algorithme</text:span><text:span text:style-name="T136"> </text:span><text:span text:style-name="T113">d'ensemble</text:span><text:span text:style-name="T139"> </text:span><text:span text:style-name="T113">qui</text:span><text:span text:style-name="T136"> </text:span><text:span text:style-name="T113">construit plusieurs arbres de décision pendant l'entraînement et les combine pour obtenir une prédiction plus </text:span>précise<text:span text:style-name="T42"> </text:span>et<text:span text:style-name="T39"> </text:span>robuste.<text:span text:style-name="T39"> </text:span>Chaque<text:span text:style-name="T40"> </text:span>arbre<text:span text:style-name="T40"> </text:span>est<text:span text:style-name="T39"> </text:span>formé<text:span text:style-name="T40"> </text:span>sur<text:span text:style-name="T39"> </text:span>un<text:span text:style-name="T39"> </text:span>sous-ensemble<text:span text:style-name="T40"> </text:span>aléatoire<text:span text:style-name="T47"> </text:span>des<text:span text:style-name="T40"> </text:span>données<text:span text:style-name="T40"> </text:span>et<text:span text:style-name="T39"> </text:span>des <text:span text:style-name="T39">caractéristiques.</text:span></text:p>
        </text:list-item>
        <text:list-item>
          <text:p text:style-name="P289" loext:marker-style-name="T113"><text:span text:style-name="T252">La</text:span><text:span text:style-name="T259"> </text:span><text:span text:style-name="T252">régression</text:span><text:span text:style-name="T261"> </text:span><text:span text:style-name="T252">logistique</text:span><text:span text:style-name="T262"> </text:span><text:span text:style-name="T252">:</text:span><text:span text:style-name="T263"> </text:span><text:span text:style-name="T113">C'est</text:span><text:span text:style-name="T138"> </text:span><text:span text:style-name="T113">un</text:span><text:span text:style-name="T137"> </text:span><text:span text:style-name="T113">algorithme</text:span><text:span text:style-name="T138"> </text:span><text:span text:style-name="T113">de</text:span><text:span text:style-name="T136"> </text:span><text:span text:style-name="T113">classification</text:span><text:span text:style-name="T138"> </text:span><text:span text:style-name="T113">qui</text:span><text:span text:style-name="T137"> </text:span><text:span text:style-name="T113">modélise</text:span><text:span text:style-name="T136"> </text:span><text:span text:style-name="T113">la</text:span><text:span text:style-name="T137"> </text:span><text:span text:style-name="T113">probabilité</text:span><text:span text:style-name="T137"> qu'une</text:span></text:p>
        </text:list-item>
      </text:list>
      <text:p text:style-name="P290">observation<text:span text:style-name="T40"> </text:span>appartienne<text:span text:style-name="T39"> </text:span>à<text:span text:style-name="T47"> </text:span>une<text:span text:style-name="T47"> </text:span>classe<text:span text:style-name="T47"> </text:span>particulière<text:span text:style-name="T39"> </text:span>en<text:span text:style-name="T40"> </text:span>utilisant<text:span text:style-name="T40"> </text:span>une<text:span text:style-name="T40"> </text:span>fonction<text:span text:style-name="T40"> </text:span>logistique.<text:span text:style-name="T40"> </text:span>Il<text:span text:style-name="T40"> </text:span>est<text:span text:style-name="T40"> </text:span>souvent<text:span text:style-name="T40"> </text:span>utilisé pour les problèmes de classification binaire, mais peut également être étendu à des cas multi-classes.</text:p>
      <text:p text:style-name="P291"/>
      <text:p text:style-name="P191" loext:marker-style-name="T249"><text:span text:style-name="T250">3.5.2</text:span><text:span text:style-name="T251"> techniques</text:span></text:p>
      <text:p text:style-name="P292" loext:marker-style-name="T264"/>
      <text:p text:style-name="P144">Pour<text:span text:style-name="T40"> </text:span>développer,<text:span text:style-name="T40"> </text:span>déployer<text:span text:style-name="T40"> </text:span>et<text:span text:style-name="T40"> </text:span>évaluer<text:span text:style-name="T40"> </text:span>un<text:span text:style-name="T40"> </text:span>modèle<text:span text:style-name="T40"> </text:span>de<text:span text:style-name="T39"> </text:span>prédiction<text:span text:style-name="T40"> </text:span>du<text:span text:style-name="T40"> </text:span>churn<text:span text:style-name="T42"> </text:span>client,<text:span text:style-name="T40"> </text:span>nous<text:span text:style-name="T40"> </text:span>utiliserons<text:span text:style-name="T47"> </text:span>un<text:span text:style-name="T40"> </text:span>ensemble d'outils et de technologies avancés. Voici un aperçu :</text:p>
      <text:p text:style-name="P197"/>
      <text:h text:style-name="Heading_20_6" text:outline-level="7">Éditeur<text:span text:style-name="T39"> </text:span>de<text:span text:style-name="T39"> Texte</text:span></text:h>
      <text:p text:style-name="P293" loext:marker-style-name="T187"/>
      <text:list text:style-name="WWNum22">
        <text:list-item>
          <text:p text:style-name="P294" loext:marker-style-name="T113"><text:span text:style-name="T160">Visual</text:span><text:span text:style-name="T164"> </text:span><text:span text:style-name="T160">Studio</text:span><text:span text:style-name="T161"> </text:span><text:span text:style-name="T160">Code</text:span><text:span text:style-name="T162"> </text:span><text:span text:style-name="T113">:</text:span><text:span text:style-name="T138"> </text:span><text:span text:style-name="T113">Utilisé</text:span><text:span text:style-name="T138"> </text:span><text:span text:style-name="T113">pour</text:span><text:span text:style-name="T137"> </text:span><text:span text:style-name="T113">écrire</text:span><text:span text:style-name="T137"> </text:span><text:span text:style-name="T113">et</text:span><text:span text:style-name="T138"> </text:span><text:span text:style-name="T113">structurer</text:span><text:span text:style-name="T138"> </text:span><text:span text:style-name="T113">le code</text:span><text:span text:style-name="T137"> </text:span><text:span text:style-name="T113">HTML,</text:span><text:span text:style-name="T138"> </text:span><text:span text:style-name="T113">CSS,</text:span><text:span text:style-name="T138"> </text:span><text:span text:style-name="T113">JavaScript</text:span><text:span text:style-name="T138"> </text:span><text:span text:style-name="T113">et </text:span><text:span text:style-name="T137">Python.</text:span></text:p>
        </text:list-item>
      </text:list>
      <text:p text:style-name="P197"/>
      <text:h text:style-name="Heading_20_6" text:outline-level="7">Langages<text:span text:style-name="T42"> </text:span>de<text:span text:style-name="T42"> </text:span><text:span text:style-name="T39">Programmation</text:span></text:h>
      <text:p text:style-name="P190" loext:marker-style-name="T187"/>
      <text:list text:continue-numbering="true" text:style-name="WWNum22">
        <text:list-item>
          <text:p text:style-name="P295" loext:marker-style-name="T113"><text:span text:style-name="T160">Python</text:span><text:span text:style-name="T164"> </text:span><text:span text:style-name="T113">:</text:span><text:span text:style-name="T139"> </text:span><text:span text:style-name="T113">Utilisé</text:span><text:span text:style-name="T139"> </text:span><text:span text:style-name="T113">pour</text:span><text:span text:style-name="T140"> </text:span><text:span text:style-name="T113">l'implémentation</text:span><text:span text:style-name="T139"> </text:span><text:span text:style-name="T113">du</text:span><text:span text:style-name="T139"> </text:span><text:span text:style-name="T113">projet,</text:span><text:span text:style-name="T139"> </text:span><text:span text:style-name="T113">offrant</text:span><text:span text:style-name="T139"> </text:span><text:span text:style-name="T113">des</text:span><text:span text:style-name="T140"> </text:span><text:span text:style-name="T113">bibliothèques</text:span><text:span text:style-name="T140"> </text:span><text:span text:style-name="T113">extensives</text:span><text:span text:style-name="T140"> </text:span><text:span text:style-name="T113">pour</text:span><text:span text:style-name="T139"> </text:span><text:span text:style-name="T113">l'analyse des données et le machine learning.</text:span></text:p>
        </text:list-item>
        <text:list-item>
          <text:p text:style-name="P296" loext:marker-style-name="T113"><text:span text:style-name="T160">HTML/CSS/JavaScript</text:span><text:span text:style-name="T164"> </text:span><text:span text:style-name="T113">:</text:span><text:span text:style-name="T139"> </text:span><text:span text:style-name="T113">Utilisés</text:span><text:span text:style-name="T139"> </text:span><text:span text:style-name="T113">pour</text:span><text:span text:style-name="T139"> </text:span><text:span text:style-name="T113">concevoir</text:span><text:span text:style-name="T136"> </text:span><text:span text:style-name="T113">et</text:span><text:span text:style-name="T139"> </text:span><text:span text:style-name="T113">styliser</text:span><text:span text:style-name="T139"> </text:span><text:span text:style-name="T113">l'interface</text:span><text:span text:style-name="T140"> </text:span><text:span text:style-name="T113">utilisateur,</text:span><text:span text:style-name="T139"> </text:span><text:span text:style-name="T113">garantissant</text:span><text:span text:style-name="T139"> </text:span><text:span text:style-name="T113">une expérience conviviale et interactive.</text:span></text:p>
        </text:list-item>
      </text:list>
      <text:p text:style-name="P205"/>
      <text:h text:style-name="Heading_20_6" text:outline-level="7">Bibliothèques<text:span text:style-name="T39"> </text:span>et<text:span text:style-name="T39"> Frameworks</text:span></text:h>
      <text:p text:style-name="P190" loext:marker-style-name="T187"/>
      <text:list text:style-name="WWNum23">
        <text:list-item>
          <text:p text:style-name="P297" loext:marker-style-name="T113"><text:span text:style-name="T160">Flask</text:span><text:span text:style-name="T162"> </text:span><text:span text:style-name="T113">:</text:span><text:span text:style-name="T136"> </text:span><text:span text:style-name="T113">Pour</text:span><text:span text:style-name="T136"> </text:span><text:span text:style-name="T113">créer</text:span><text:span text:style-name="T136"> </text:span><text:span text:style-name="T113">une</text:span><text:span text:style-name="T136"> </text:span><text:span text:style-name="T113">application</text:span><text:span text:style-name="T136"> </text:span><text:span text:style-name="T113">web</text:span><text:span text:style-name="T136"> </text:span><text:span text:style-name="T113">légère</text:span><text:span text:style-name="T139"> </text:span><text:span text:style-name="T113">et</text:span><text:span text:style-name="T136"> </text:span><text:span text:style-name="T113">évolutive</text:span><text:span text:style-name="T136"> </text:span><text:span text:style-name="T113">permettant</text:span><text:span text:style-name="T136"> </text:span><text:span text:style-name="T113">de</text:span><text:span text:style-name="T136"> </text:span><text:span text:style-name="T113">déployer</text:span><text:span text:style-name="T140"> </text:span><text:span text:style-name="T113">le</text:span><text:span text:style-name="T136"> </text:span><text:span text:style-name="T113">modèle </text:span><text:span text:style-name="T137">prédictif.</text:span></text:p>
        </text:list-item>
        <text:list-item>
          <text:p text:style-name="P298" loext:marker-style-name="T113"><text:span text:style-name="T160">Scikit-learn</text:span><text:span text:style-name="T162"> </text:span><text:span text:style-name="T113">:</text:span><text:span text:style-name="T136"> </text:span><text:span text:style-name="T113">Pour</text:span><text:span text:style-name="T136"> </text:span><text:span text:style-name="T113">les</text:span><text:span text:style-name="T136"> </text:span><text:span text:style-name="T113">tâches</text:span><text:span text:style-name="T136"> </text:span><text:span text:style-name="T113">de</text:span><text:span text:style-name="T139"> </text:span><text:span text:style-name="T113">machine</text:span><text:span text:style-name="T136"> </text:span><text:span text:style-name="T113">learning,</text:span><text:span text:style-name="T136"> </text:span><text:span text:style-name="T113">y</text:span><text:span text:style-name="T136"> </text:span><text:span text:style-name="T113">compris</text:span><text:span text:style-name="T136"> </text:span><text:span text:style-name="T113">le</text:span><text:span text:style-name="T139"> </text:span><text:span text:style-name="T113">développement,</text:span><text:span text:style-name="T136"> </text:span><text:span text:style-name="T113">l'évaluation</text:span><text:span text:style-name="T136"> </text:span><text:span text:style-name="T113">et l'ingénierie des fonctionnalités du modèle.</text:span></text:p>
        </text:list-item>
        <text:list-item>
          <text:p text:style-name="P299" loext:marker-style-name="T113"><text:span text:style-name="T160">Pandas</text:span><text:span text:style-name="T164"> </text:span><text:span text:style-name="T113">:</text:span><text:span text:style-name="T138"> </text:span><text:span text:style-name="T113">Pour</text:span><text:span text:style-name="T138"> </text:span><text:span text:style-name="T113">la</text:span><text:span text:style-name="T137"> </text:span><text:span text:style-name="T113">manipulation</text:span><text:span text:style-name="T138"> </text:span><text:span text:style-name="T113">et</text:span><text:span text:style-name="T138"> </text:span><text:span text:style-name="T113">l'analyse</text:span><text:span text:style-name="T138"> </text:span><text:span text:style-name="T113">efficace</text:span><text:span text:style-name="T138"> </text:span><text:span text:style-name="T113">des</text:span><text:span text:style-name="T138"> </text:span><text:span text:style-name="T113">données,</text:span><text:span text:style-name="T166"> </text:span><text:span text:style-name="T113">facilitant</text:span><text:span text:style-name="T138"> </text:span><text:span text:style-name="T113">le</text:span><text:span text:style-name="T138"> </text:span><text:span text:style-name="T137">prétraitement.</text:span></text:p>
        </text:list-item>
        <text:list-item>
          <text:p text:style-name="P300" loext:marker-style-name="T113"><text:span text:style-name="T160">NumPy</text:span><text:span text:style-name="T163"> </text:span><text:span text:style-name="T113">:</text:span><text:span text:style-name="T139"> </text:span><text:span text:style-name="T113">Essentiel</text:span><text:span text:style-name="T139"> </text:span><text:span text:style-name="T113">pour</text:span><text:span text:style-name="T139"> </text:span><text:span text:style-name="T113">les</text:span><text:span text:style-name="T139"> </text:span><text:span text:style-name="T113">opérations</text:span><text:span text:style-name="T139"> </text:span><text:span text:style-name="T113">numériques</text:span><text:span text:style-name="T139"> </text:span><text:span text:style-name="T113">et</text:span><text:span text:style-name="T139"> </text:span><text:span text:style-name="T113">les</text:span><text:span text:style-name="T139"> </text:span><text:span text:style-name="T113">manipulations</text:span><text:span text:style-name="T139"> </text:span><text:span text:style-name="T113">de</text:span><text:span text:style-name="T140"> </text:span><text:span text:style-name="T113">tableaux,</text:span><text:span text:style-name="T139"> </text:span><text:span text:style-name="T113">améliorant l'efficacité computationnelle.</text:span></text:p>
        </text:list-item>
        <text:list-item>
          <text:p text:style-name="P301" loext:marker-style-name="T113"><text:span text:style-name="T160">Matplotlib</text:span><text:span text:style-name="T164"> </text:span><text:span text:style-name="T160">et</text:span><text:span text:style-name="T164"> </text:span><text:span text:style-name="T160">Seaborn</text:span><text:span text:style-name="T162"> </text:span><text:span text:style-name="T113">:</text:span><text:span text:style-name="T136"> </text:span><text:span text:style-name="T113">Pour</text:span><text:span text:style-name="T136"> </text:span><text:span text:style-name="T113">la</text:span><text:span text:style-name="T140"> </text:span><text:span text:style-name="T113">visualisation</text:span><text:span text:style-name="T136"> </text:span><text:span text:style-name="T113">des</text:span><text:span text:style-name="T136"> </text:span><text:span text:style-name="T113">données</text:span><text:span text:style-name="T136"> </text:span><text:span text:style-name="T113">afin</text:span><text:span text:style-name="T136"> </text:span><text:span text:style-name="T113">d'obtenir</text:span><text:span text:style-name="T136"> </text:span><text:span text:style-name="T113">des</text:span><text:span text:style-name="T136"> </text:span><text:span text:style-name="T113">insights</text:span><text:span text:style-name="T136"> </text:span><text:span text:style-name="T113">et</text:span><text:span text:style-name="T136"> </text:span><text:span text:style-name="T113">générer</text:span><text:span text:style-name="T136"> </text:span><text:span text:style-name="T113">des graphiques informatifs.</text:span></text:p>
        </text:list-item>
        <text:list-item>
          <text:p text:style-name="P302" loext:marker-style-name="T113"><text:span text:style-name="T160">Jupyter</text:span><text:span text:style-name="T163"> </text:span><text:span text:style-name="T160">Notebooks</text:span><text:span text:style-name="T164"> </text:span><text:span text:style-name="T113">:</text:span><text:span text:style-name="T139"> </text:span><text:span text:style-name="T113">Utilisés</text:span><text:span text:style-name="T139"> </text:span><text:span text:style-name="T113">pour</text:span><text:span text:style-name="T139"> </text:span><text:span text:style-name="T113">le</text:span><text:span text:style-name="T140"> </text:span><text:span text:style-name="T113">développement</text:span><text:span text:style-name="T139"> </text:span><text:span text:style-name="T113">interactif</text:span><text:span text:style-name="T139"> </text:span><text:span text:style-name="T113">et</text:span><text:span text:style-name="T139"> </text:span><text:span text:style-name="T113">la</text:span><text:span text:style-name="T136"> </text:span><text:span text:style-name="T113">création</text:span><text:span text:style-name="T139"> </text:span><text:span text:style-name="T113">d'une</text:span><text:span text:style-name="T140"> </text:span><text:span text:style-name="T113">documentation </text:span><text:span text:style-name="T137">complète.</text:span></text:p>
        </text:list-item>
      </text:list>
      <text:p text:style-name="P197"/>
      <text:h text:style-name="Heading_20_6" text:outline-level="7">Plateforme<text:span text:style-name="T47"> </text:span><text:span text:style-name="T39">d'Hébergement</text:span></text:h>
      <text:p text:style-name="P293" loext:marker-style-name="T187"/>
      <text:list text:continue-numbering="true" text:style-name="WWNum23">
        <text:list-item>
          <text:list>
            <text:list-item>
              <text:p text:style-name="P303" loext:marker-style-name="T113"><text:span text:style-name="T160">PythonAnywhere</text:span><text:span text:style-name="T163"> </text:span><text:span text:style-name="T113">:</text:span><text:span text:style-name="T139"> </text:span><text:span text:style-name="T113">Sélectionné</text:span><text:span text:style-name="T140"> </text:span><text:span text:style-name="T113">comme</text:span><text:span text:style-name="T140"> </text:span><text:span text:style-name="T113">plateforme</text:span><text:span text:style-name="T139"> </text:span><text:span text:style-name="T113">d'hébergement</text:span><text:span text:style-name="T139"> </text:span><text:span text:style-name="T113">pour</text:span><text:span text:style-name="T140"> </text:span><text:span text:style-name="T113">déployer</text:span><text:span text:style-name="T215"> </text:span><text:span text:style-name="T113">l'application</text:span><text:span text:style-name="T139"> </text:span><text:span text:style-name="T113">web, offrant une accessibilité via une URL unique.</text:span></text:p>
            </text:list-item>
          </text:list>
        </text:list-item>
      </text:list>
      <text:p text:style-name="P197"/>
      <text:h text:style-name="P304" text:outline-level="7">Outils de<text:span text:style-name="T42"> </text:span>Gestion<text:span text:style-name="T197"> </text:span>de <text:span text:style-name="T39">Versions</text:span></text:h>
      <text:p text:style-name="P305" loext:marker-style-name="T187"/>
      <text:list text:continue-numbering="true" text:style-name="WWNum23">
        <text:list-item>
          <text:list>
            <text:list-item>
              <text:p text:style-name="P299" loext:marker-style-name="T113"><text:span text:style-name="T160">GitHub</text:span><text:span text:style-name="T164"> </text:span><text:span text:style-name="T113">:</text:span><text:span text:style-name="T138"> </text:span><text:span text:style-name="T113">Utilisé</text:span><text:span text:style-name="T138"> </text:span><text:span text:style-name="T113">pour</text:span><text:span text:style-name="T138"> </text:span><text:span text:style-name="T113">gérer</text:span><text:span text:style-name="T138"> </text:span><text:span text:style-name="T113">les</text:span><text:span text:style-name="T138"> </text:span><text:span text:style-name="T113">versions</text:span><text:span text:style-name="T138"> </text:span><text:span text:style-name="T113">du</text:span><text:span text:style-name="T138"> </text:span><text:span text:style-name="T113">code, faciliter</text:span><text:span text:style-name="T138"> </text:span><text:span text:style-name="T113">la</text:span><text:span text:style-name="T137"> </text:span><text:span text:style-name="T113">collaboration et</text:span><text:span text:style-name="T138"> </text:span><text:span text:style-name="T113">suivre</text:span><text:span text:style-name="T137"> </text:span><text:span text:style-name="T113">les</text:span><text:span text:style-name="T138"> </text:span><text:span text:style-name="T137">modifications.</text:span></text:p>
            </text:list-item>
          </text:list>
        </text:list-item>
      </text:list>
      <text:p text:style-name="P205"/>
      <text:p text:style-name="P306"><text:soft-page-break/>En<text:span text:style-name="T40"> </text:span>combinant<text:span text:style-name="T40"> </text:span>stratégiquement<text:span text:style-name="T40"> </text:span>ces<text:span text:style-name="T40"> </text:span>outils<text:span text:style-name="T40"> </text:span>et<text:span text:style-name="T40"> </text:span>technologies,<text:span text:style-name="T40"> </text:span>le<text:span text:style-name="T40"> </text:span>projet<text:span text:style-name="T40"> </text:span>de<text:span text:style-name="T47"> </text:span>prédiction<text:span text:style-name="T40"> </text:span>du<text:span text:style-name="T40"> </text:span>churn<text:span text:style-name="T40"> </text:span>client<text:span text:style-name="T40"> </text:span>atteint<text:span text:style-name="T40"> </text:span>un équilibre entre efficacité, précision et accessibilité utilisateur.</text:p>
      <text:h text:style-name="P307" text:outline-level="7">Fonctionnalités<text:span text:style-name="T47"> </text:span>de<text:span text:style-name="T47"> </text:span>l'Interface<text:span text:style-name="T40"> </text:span><text:span text:style-name="T39">Utilisateur</text:span></text:h>
      <text:p text:style-name="P190" loext:marker-style-name="T187"/>
      <text:list text:style-name="WWNum24">
        <text:list-item>
          <text:p text:style-name="P308" loext:marker-style-name="T113"><text:span text:style-name="T160">Prédiction pour un seul client </text:span><text:span text:style-name="T113">: L'interface contiendra des champs que l'utilisateur remplira pour entrer</text:span><text:span text:style-name="T136"> </text:span><text:span text:style-name="T113">les</text:span><text:span text:style-name="T136"> </text:span><text:span text:style-name="T113">données</text:span><text:span text:style-name="T136"> </text:span><text:span text:style-name="T113">d'un</text:span><text:span text:style-name="T136"> </text:span><text:span text:style-name="T113">client</text:span><text:span text:style-name="T136"> </text:span><text:span text:style-name="T113">spécifique.</text:span><text:span text:style-name="T136"> </text:span><text:span text:style-name="T113">Le</text:span><text:span text:style-name="T139"> </text:span><text:span text:style-name="T113">modèle</text:span><text:span text:style-name="T136"> </text:span><text:span text:style-name="T113">prédira</text:span><text:span text:style-name="T136"> </text:span><text:span text:style-name="T113">ensuite</text:span><text:span text:style-name="T136"> </text:span><text:span text:style-name="T113">le</text:span><text:span text:style-name="T136"> </text:span><text:span text:style-name="T113">risque</text:span><text:span text:style-name="T136"> </text:span><text:span text:style-name="T113">de</text:span><text:span text:style-name="T136"> </text:span><text:span text:style-name="T113">churn</text:span><text:span text:style-name="T136"> </text:span><text:span text:style-name="T113">pour</text:span><text:span text:style-name="T136"> </text:span><text:span text:style-name="T113">ce</text:span><text:span text:style-name="T136"> </text:span><text:span text:style-name="T113">client.</text:span></text:p>
        </text:list-item>
      </text:list>
      <text:p text:style-name="P309" loext:marker-style-name="T143"><draw:frame draw:style-name="fr2" draw:name="Image 21" text:anchor-type="char" svg:x="1.9252in" svg:y="0.1945in" svg:width="4.8638in" svg:height="2.3516in" draw:z-index="12"><draw:image xlink:href="Pictures/100000010000020700000187871CFFA5.png" xlink:type="simple" xlink:show="embed" xlink:actuate="onLoad" draw:mime-type="image/png"/></draw:frame></text:p>
      <text:p text:style-name="P310" loext:marker-style-name="T144"><text:bookmark text:name="_bookmark39"/><text:span text:style-name="T145">Figure</text:span><text:span text:style-name="T148"> </text:span><text:span text:style-name="T145">9:</text:span><text:span text:style-name="T147"> </text:span><text:span text:style-name="T145">Prédiction</text:span><text:span text:style-name="T147"> </text:span><text:span text:style-name="T145">pour</text:span><text:span text:style-name="T148"> </text:span><text:span text:style-name="T145">un</text:span><text:span text:style-name="T148"> </text:span><text:span text:style-name="T145">seul</text:span><text:span text:style-name="T159"> </text:span><text:span text:style-name="T148">client</text:span></text:p>
      <text:p text:style-name="P188" loext:marker-style-name="T144"/>
      <text:list xml:id="list191359530942872" text:continue-numbering="true" text:style-name="WWNum24">
        <text:list-item>
          <text:p text:style-name="P311" loext:marker-style-name="T113"><text:span text:style-name="T160">Prédiction</text:span><text:span text:style-name="T162"> </text:span><text:span text:style-name="T160">pour</text:span><text:span text:style-name="T165"> </text:span><text:span text:style-name="T160">un</text:span><text:span text:style-name="T164"> </text:span><text:span text:style-name="T160">groupe</text:span><text:span text:style-name="T165"> </text:span><text:span text:style-name="T160">de</text:span><text:span text:style-name="T165"> </text:span><text:span text:style-name="T160">clients</text:span><text:span text:style-name="T161"> </text:span><text:span text:style-name="T113">:</text:span><text:span text:style-name="T136"> </text:span><text:span text:style-name="T113">L'utilisateur</text:span><text:span text:style-name="T136"> </text:span><text:span text:style-name="T113">pourra</text:span><text:span text:style-name="T139"> </text:span><text:span text:style-name="T113">importer</text:span><text:span text:style-name="T136"> </text:span><text:span text:style-name="T113">un</text:span><text:span text:style-name="T136"> </text:span><text:span text:style-name="T113">fichier</text:span><text:span text:style-name="T140"> </text:span><text:span text:style-name="T113">CSV</text:span><text:span text:style-name="T136"> </text:span><text:span text:style-name="T113">contenant</text:span><text:span text:style-name="T136"> </text:span><text:span text:style-name="T113">les données de plusieurs clients. Le modèle analysera ces données et affichera les résultats de la prédiction pour l'ensemble du groupe.</text:span></text:p>
        </text:list-item>
      </text:list>
      <text:p text:style-name="P312" loext:marker-style-name="T143"><draw:frame draw:style-name="fr2" draw:name="Image 22" text:anchor-type="char" svg:x="1.8374in" svg:y="0.1953in" svg:width="5.1398in" svg:height="2.4839in" draw:z-index="13"><draw:image xlink:href="Pictures/10000001000001B80000014A23D36171.png" xlink:type="simple" xlink:show="embed" xlink:actuate="onLoad" draw:mime-type="image/png"/></draw:frame></text:p>
      <text:p text:style-name="P313" loext:marker-style-name="T265"/>
      <text:section text:style-name="Sect2" text:name="Section2">
        <text:p text:style-name="P314" loext:marker-style-name="T169"/>
        <text:list text:continue-list="list191358439057199" text:style-name="WWNum14">
          <text:list-item>
            <text:list>
              <text:list-item>
                <text:h text:style-name="P230" text:outline-level="4"><text:bookmark text:name="_bookmark40"/><text:bookmark text:name="_bookmark41"/>Conclusion</text:h>
              </text:list-item>
            </text:list>
          </text:list-item>
        </text:list>
        <text:p text:style-name="P315" loext:marker-style-name="T144"><text:span text:style-name="T145">Figure</text:span><text:span text:style-name="T146"> </text:span><text:span text:style-name="T145">10</text:span><text:span text:style-name="T148"> </text:span><text:span text:style-name="T145">:</text:span><text:span text:style-name="T148"> </text:span><text:span text:style-name="T145">Prédiction</text:span><text:span text:style-name="T206"> </text:span><text:span text:style-name="T145">pour</text:span><text:span text:style-name="T148"> </text:span><text:span text:style-name="T145">un</text:span><text:span text:style-name="T146"> </text:span><text:span text:style-name="T145">groupe</text:span><text:span text:style-name="T206"> </text:span><text:span text:style-name="T145">de</text:span><text:span text:style-name="T146"> </text:span><text:span text:style-name="T148">clients</text:span></text:p>
      </text:section>
      <text:section text:style-name="Sect1" text:name="Section3">
        <text:p text:style-name="P316" loext:marker-style-name="T30"><text:span text:style-name="T30">En conclusion,</text:span><text:span text:style-name="T97"> </text:span><text:span text:style-name="T30">ce chapitre a</text:span><text:span text:style-name="T97"> </text:span><text:span text:style-name="T30">détaillé la</text:span><text:span text:style-name="T97"> </text:span><text:span text:style-name="T30">conception</text:span><text:span text:style-name="T98"> </text:span><text:span text:style-name="T30">et la mise</text:span><text:span text:style-name="T97"> </text:span><text:span text:style-name="T30">en</text:span><text:span text:style-name="T98"> </text:span><text:span text:style-name="T30">œuvre de</text:span><text:span text:style-name="T98"> </text:span><text:span text:style-name="T30">notre projet de</text:span><text:span text:style-name="T98"> </text:span><text:span text:style-name="T30">prédiction du churn client dans le secteur des télécommunications. Nous avons décrit le cycle de vie complet du projet, de la compréhension des données à leur préparation, en passant par la modélisation, l'évaluation et le déploiement. Nous avons également présenté l'architecture globale du modèle, les algorithmes de machine learning sélectionnés, les outils et technologies utilisés, et les fonctionnalités de l'interface utilisateur. En intégrant ces composants, nous avons créé une solution robuste et efficace pour prédire la perte</text:span><text:span text:style-name="T97"> </text:span><text:span text:style-name="T30">de</text:span><text:span text:style-name="T97"> </text:span><text:span text:style-name="T30">clients,</text:span><text:span text:style-name="T32"> </text:span><text:span text:style-name="T30">permettant</text:span><text:span text:style-name="T35"> </text:span><text:span text:style-name="T30">ainsi</text:span><text:span text:style-name="T100"> </text:span><text:span text:style-name="T30">aux</text:span><text:span text:style-name="T35"> </text:span><text:span text:style-name="T30">entreprises</text:span><text:span text:style-name="T266"> </text:span><text:span text:style-name="T30">de</text:span><text:span text:style-name="T97"> </text:span><text:span text:style-name="T30">mettre</text:span><text:span text:style-name="T97"> </text:span><text:span text:style-name="T30">en</text:span><text:span text:style-name="T35"> </text:span><text:span text:style-name="T30">place</text:span><text:span text:style-name="T32"> </text:span><text:span text:style-name="T30">des</text:span><text:span text:style-name="T100"> </text:span><text:span text:style-name="T30">stratégies</text:span><text:span text:style-name="T100"> </text:span><text:span text:style-name="T30">de</text:span><text:span text:style-name="T97"> </text:span><text:span text:style-name="T30">rétention</text:span><text:span text:style-name="T35"> </text:span><text:soft-page-break/><text:span text:style-name="T30">proactives et d'améliorer la satisfaction et la fidélité de leur clientèle.</text:span></text:p>
        <text:h text:style-name="P317" text:outline-level="3"><text:bookmark text:name="_bookmark42"/>CHAPITRE 4: DEVELOPPEMENT ET IMPLEMENTATION</text:h>
      </text:section>
      <text:p text:style-name="P318" loext:marker-style-name="T168"/>
      <text:list text:style-name="WWNum25">
        <text:list-item>
          <text:list>
            <text:list-item>
              <text:h text:style-name="P319" text:outline-level="4"><text:bookmark text:name="_bookmark43"/>Introduction</text:h>
            </text:list-item>
          </text:list>
        </text:list-item>
      </text:list>
      <text:p text:style-name="P320">Ce<text:span text:style-name="T40"> </text:span>chapitre<text:span text:style-name="T47"> </text:span>est<text:span text:style-name="T39"> </text:span>consacré<text:span text:style-name="T47"> </text:span>à<text:span text:style-name="T40"> </text:span>la<text:span text:style-name="T42"> </text:span>réalisation<text:span text:style-name="T39"> </text:span>pratique<text:span text:style-name="T40"> </text:span>et<text:span text:style-name="T39"> </text:span>aux<text:span text:style-name="T39"> </text:span>tests<text:span text:style-name="T39"> </text:span>de<text:span text:style-name="T40"> </text:span>notre<text:span text:style-name="T40"> </text:span>projet<text:span text:style-name="T39"> </text:span>de<text:span text:style-name="T40"> </text:span>prédiction<text:span text:style-name="T39"> </text:span>de<text:span text:style-name="T39"> </text:span>la<text:span text:style-name="T40"> </text:span>perte<text:span text:style-name="T39"> </text:span>de clients (churn) dans le domaine des télécommunications. Nous détaillerons les différentes étapes du</text:p>
      <text:p text:style-name="P321">développement<text:span text:style-name="T40"> </text:span>et<text:span text:style-name="T42"> </text:span>de<text:span text:style-name="T42"> </text:span>l'implémentation,<text:span text:style-name="T42"> </text:span>de<text:span text:style-name="T39"> </text:span>la compréhension<text:span text:style-name="T42"> </text:span>de<text:span text:style-name="T42"> </text:span>la<text:span text:style-name="T42"> </text:span>problématique<text:span text:style-name="T39"> </text:span>à<text:span text:style-name="T42"> </text:span>la<text:span text:style-name="T42"> </text:span>préparation <text:span text:style-name="T43">des</text:span></text:p>
      <text:p text:style-name="P174">données,<text:span text:style-name="T40"> </text:span>en<text:span text:style-name="T40"> </text:span>passant<text:span text:style-name="T40"> </text:span>par<text:span text:style-name="T40"> </text:span>la<text:span text:style-name="T47"> </text:span>modélisation,<text:span text:style-name="T40"> </text:span>l'évaluation<text:span text:style-name="T40"> </text:span>et<text:span text:style-name="T40"> </text:span>le<text:span text:style-name="T40"> </text:span>déploiement.<text:span text:style-name="T40"> </text:span>Enfin,<text:span text:style-name="T40"> </text:span>nous<text:span text:style-name="T40"> </text:span>discuterons<text:span text:style-name="T47"> </text:span>des<text:span text:style-name="T47"> </text:span>résultats obtenus et proposerons des améliorations pour optimiser notre modèle.projet, nous rapprochant de notre</text:p>
      <text:p text:style-name="P322">objectif<text:span text:style-name="T40"> </text:span>de<text:span text:style-name="T40"> </text:span>fournir une<text:span text:style-name="T40"> </text:span>solution efficace<text:span text:style-name="T39"> </text:span>pour<text:span text:style-name="T42"> </text:span>prédire<text:span text:style-name="T40"> </text:span>la perte<text:span text:style-name="T40"> </text:span>de<text:span text:style-name="T197"> </text:span><text:span text:style-name="T39">clients.</text:span></text:p>
      <text:list text:continue-numbering="true" text:style-name="WWNum25">
        <text:list-item>
          <text:list>
            <text:list-item>
              <text:h text:style-name="P323" text:outline-level="4"><text:bookmark text:name="_bookmark44"/>Compréhension<text:span text:style-name="T47"> </text:span>de<text:span text:style-name="T40"> </text:span>la<text:span text:style-name="T40"> </text:span><text:span text:style-name="T39">problématique</text:span></text:h>
            </text:list-item>
          </text:list>
        </text:list-item>
      </text:list>
      <text:p text:style-name="P324">Dans cette phase initiale, nous visons à bien cerner les objectifs du projet. L'objectif principal de la prédiction<text:span text:style-name="T39"> </text:span>du<text:span text:style-name="T39"> </text:span>churn est<text:span text:style-name="T39"> </text:span>d'identifier<text:span text:style-name="T39"> </text:span>les<text:span text:style-name="T40"> </text:span>clients<text:span text:style-name="T40"> </text:span>susceptibles<text:span text:style-name="T40"> </text:span>de<text:span text:style-name="T47"> </text:span>se<text:span text:style-name="T40"> </text:span>désabonner<text:span text:style-name="T42"> </text:span>afin<text:span text:style-name="T39"> </text:span>de<text:span text:style-name="T47"> </text:span>mettre<text:span text:style-name="T42"> </text:span>en<text:span text:style-name="T39"> </text:span>place<text:span text:style-name="T40"> </text:span>des</text:p>
      <text:p text:style-name="P122">actions<text:span text:style-name="T40"> </text:span>de<text:span text:style-name="T40"> </text:span>rétention<text:span text:style-name="T39"> </text:span>efficaces.<text:span text:style-name="T39"> </text:span>Pour<text:span text:style-name="T39"> </text:span>cela,<text:span text:style-name="T39"> </text:span>nous<text:span text:style-name="T40"> </text:span>analysons<text:span text:style-name="T40"> </text:span>les<text:span text:style-name="T40"> </text:span>données<text:span text:style-name="T40"> </text:span>des<text:span text:style-name="T40"> </text:span>clients<text:span text:style-name="T40"> </text:span>ayant<text:span text:style-name="T39"> </text:span>déjà<text:span text:style-name="T40"> </text:span>quitté<text:span text:style-name="T39"> </text:span>l'entreprise et cherchons des patterns sur une période donnée.</text:p>
      <text:p text:style-name="P142"/>
      <text:list text:continue-numbering="true" text:style-name="WWNum25">
        <text:list-item>
          <text:list>
            <text:list-item>
              <text:h text:style-name="P325" text:outline-level="4"><text:bookmark text:name="_bookmark45"/>Compréhension<text:span text:style-name="T40"> </text:span>des<text:span text:style-name="T40"> </text:span><text:span text:style-name="T39">données</text:span></text:h>
            </text:list-item>
          </text:list>
        </text:list-item>
      </text:list>
      <text:p text:style-name="P326">Notre<text:span text:style-name="T47"> </text:span>dataset<text:span text:style-name="T39"> </text:span>provient<text:span text:style-name="T42"> </text:span>de<text:span text:style-name="T40"> </text:span>Kaggle<text:span text:style-name="T42"> </text:span>et<text:span text:style-name="T39"> </text:span>contient<text:span text:style-name="T39"> </text:span>les<text:span text:style-name="T42"> </text:span>données<text:span text:style-name="T40"> </text:span>de<text:span text:style-name="T40"> </text:span>7044 clients<text:span text:style-name="T40"> </text:span>et<text:span text:style-name="T39"> </text:span>21<text:span text:style-name="T39"> </text:span>colonnes,<text:span text:style-name="T39"> </text:span>dont<text:span text:style-name="T39"> </text:span>la<text:span text:style-name="T40"> </text:span>dernière colonne est "Churn". La première colonne est le Customer ID d'une entreprise de télécommunications</text:p>
      <text:p text:style-name="P327">quelconque.<text:span text:style-name="T39"> </text:span>Bien<text:span text:style-name="T39"> </text:span>que<text:span text:style-name="T47"> </text:span>plusieurs<text:span text:style-name="T40"> </text:span>approches<text:span text:style-name="T40"> </text:span>aient<text:span text:style-name="T39"> </text:span>été<text:span text:style-name="T39"> </text:span>explorées<text:span text:style-name="T40"> </text:span>dans<text:span text:style-name="T40"> </text:span>ce<text:span text:style-name="T40"> </text:span>domaine<text:span text:style-name="T39"> </text:span>ces<text:span text:style-name="T40"> </text:span>dernières années,<text:span text:style-name="T39"> </text:span>il<text:span text:style-name="T42"> </text:span>reste encore<text:span text:style-name="T47"> </text:span>de<text:span text:style-name="T40"> </text:span>nombreuses<text:span text:style-name="T40"> </text:span>opportunités<text:span text:style-name="T40"> </text:span>pour<text:span text:style-name="T40"> </text:span>améliorer<text:span text:style-name="T39"> </text:span>les<text:span text:style-name="T40"> </text:span>méthodes<text:span text:style-name="T40"> </text:span>existantes.<text:span text:style-name="T39"> </text:span>La<text:span text:style-name="T47"> </text:span>qualité<text:span text:style-name="T40"> </text:span>des<text:span text:style-name="T40"> </text:span>données<text:span text:style-name="T40"> </text:span>utilisées est cruciale pour assurer l'efficacité de la solution finale.</text:p>
      <text:p text:style-name="Text_20_body"/>
      <text:p text:style-name="Text_20_body"/>
      <text:p text:style-name="P328"/>
      <text:list text:style-name="WWNum26">
        <text:list-item>
          <text:list>
            <text:list-item>
              <text:h text:style-name="P329" text:outline-level="4"><text:bookmark text:name="_bookmark46"/>Préparation<text:span text:style-name="T47"> </text:span>des<text:span text:style-name="T47"> </text:span><text:span text:style-name="T39">données</text:span></text:h>
            </text:list-item>
          </text:list>
        </text:list-item>
      </text:list>
      <text:p text:style-name="P330" loext:marker-style-name="T104"><text:span text:style-name="T104">La</text:span><text:span text:style-name="T109"> </text:span><text:span text:style-name="T104">préparation</text:span><text:span text:style-name="T188"> </text:span><text:span text:style-name="T104">des</text:span><text:span text:style-name="T109"> </text:span><text:span text:style-name="T104">données</text:span><text:span text:style-name="T109"> </text:span><text:span text:style-name="T104">consiste</text:span><text:span text:style-name="T109"> </text:span><text:span text:style-name="T104">à</text:span><text:span text:style-name="T107"> </text:span><text:span text:style-name="T104">nettoyer,</text:span><text:span text:style-name="T107"> </text:span><text:span text:style-name="T104">transformer</text:span><text:span text:style-name="T107"> </text:span><text:span text:style-name="T104">et</text:span><text:span text:style-name="T109"> </text:span><text:span text:style-name="T104">préparer</text:span><text:span text:style-name="T109"> </text:span><text:span text:style-name="T104">les</text:span><text:span text:style-name="T109"> </text:span><text:span text:style-name="T104">données</text:span><text:span text:style-name="T109"> </text:span><text:span text:style-name="T104">pour</text:span><text:span text:style-name="T109"> </text:span><text:span text:style-name="T104">l'analyse.</text:span><text:span text:style-name="T106"> </text:span><text:span text:style-name="T104">Nous vérifions les valeurs manquantes et les types de données pour assurer la qualité des données.</text:span></text:p>
      <text:list text:continue-list="list191359530942872" text:style-name="WWNum24">
        <text:list-item>
          <text:list>
            <text:list-item>
              <text:p text:style-name="P331" loext:marker-style-name="T267"><text:span text:style-name="T268">Valeurs</text:span><text:span text:style-name="T269"> </text:span><text:span text:style-name="T268">manquantes</text:span><text:span text:style-name="T270"> </text:span><text:span text:style-name="T268">et</text:span><text:span text:style-name="T271"> </text:span><text:span text:style-name="T268">types</text:span><text:span text:style-name="T270"> </text:span><text:span text:style-name="T268">de</text:span><text:span text:style-name="T271"> données</text:span></text:p>
            </text:list-item>
          </text:list>
        </text:list-item>
      </text:list>
      <text:p text:style-name="P332">Lors<text:span text:style-name="T39"> </text:span>de<text:span text:style-name="T40"> </text:span>l'EDA,<text:span text:style-name="T39"> </text:span>nous<text:span text:style-name="T39"> </text:span>avons<text:span text:style-name="T39"> </text:span>utilisé<text:span text:style-name="T39"> </text:span>la<text:span text:style-name="T40"> </text:span>bibliothèque<text:span text:style-name="T46"> </text:span>Pandas<text:span text:style-name="T39"> </text:span>pour<text:span text:style-name="T39"> </text:span>en<text:span text:style-name="T39"> </text:span>apprendre<text:span text:style-name="T40"> </text:span>le<text:span text:style-name="T39"> </text:span>plus<text:span text:style-name="T39"> </text:span>possible<text:span text:style-name="T39"> </text:span>sur<text:span text:style-name="T40"> </text:span>les<text:span text:style-name="T39"> </text:span>données. La méthode <text:span text:style-name="T272">DataFrame.info</text:span><text:span text:style-name="T273"> </text:span>est particulièrement utile car elle fournit un résumé des données, incluant les noms des colonnes, leurs types de données, le nombre de valeurs non nulles, et la consommation de <text:span text:style-name="T39">mémoire.</text:span></text:p>
      <text:p text:style-name="P333" loext:marker-style-name="T143"><draw:frame draw:style-name="fr4" draw:name="Image 23" text:anchor-type="as-char" svg:width="5.2244in" svg:height="5.202in" draw:z-index="82"><draw:image xlink:href="Pictures/10000000000001BC000002193C1259CD.png" xlink:type="simple" xlink:show="embed" xlink:actuate="onLoad" draw:mime-type="image/png"/></draw:frame></text:p>
      <text:p text:style-name="P334" loext:marker-style-name="T144"><text:bookmark text:name="_bookmark47"/><text:span text:style-name="T145">Figure</text:span><text:span text:style-name="T148"> </text:span><text:span text:style-name="T145">11:</text:span><text:span text:style-name="T147"> </text:span><text:span text:style-name="T145">résumé</text:span><text:span text:style-name="T206"> </text:span><text:span text:style-name="T145">des</text:span><text:span text:style-name="T147"> </text:span><text:span text:style-name="T148">données</text:span></text:p>
      <text:p text:style-name="P335" loext:marker-style-name="T144"/>
      <text:p text:style-name="P336" loext:marker-style-name="T144"/>
      <text:p text:style-name="P337" loext:marker-style-name="T104"><text:span text:style-name="T104">L'ensemble de données comprend</text:span><text:span text:style-name="T109"> </text:span><text:span text:style-name="T104">21 colonnes et 7043 observations.</text:span><text:span text:style-name="T274"> </text:span><text:span text:style-name="T104">Aucune valeur nulle n'apparaît, mais nous remarquons que la colonne </text:span><text:span text:style-name="T272">TotalCharges</text:span><text:span text:style-name="T275"> </text:span><text:span text:style-name="T104">a été incorrectement identifiée comme un objet (</text:span><text:span text:style-name="T272">object</text:span><text:span text:style-name="T104">). Cette colonne est en fait une variable numérique car elle représente le coût total encouru par le client. Nous devons convertir cette colonne en type de données numérique pour pouvoir l'analyser plus en détail. Nous utilisons pour cela</text:span><text:span text:style-name="T109"> </text:span><text:span text:style-name="T104">la</text:span><text:span text:style-name="T109"> </text:span><text:span text:style-name="T104">fonction</text:span><text:span text:style-name="T109"> </text:span><text:span text:style-name="T272">pd.to_numeric</text:span><text:span text:style-name="T104">.</text:span><text:span text:style-name="T109"> </text:span><text:span text:style-name="T104">En</text:span><text:span text:style-name="T109"> </text:span><text:span text:style-name="T104">cas</text:span><text:span text:style-name="T109"> </text:span><text:span text:style-name="T104">de</text:span><text:span text:style-name="T107"> </text:span><text:span text:style-name="T104">données</text:span><text:span text:style-name="T107"> </text:span><text:span text:style-name="T104">non</text:span><text:span text:style-name="T188"> </text:span><text:span text:style-name="T104">numériques,</text:span><text:span text:style-name="T109"> </text:span><text:span text:style-name="T104">cette</text:span><text:span text:style-name="T109"> </text:span><text:span text:style-name="T104">fonction</text:span><text:span text:style-name="T188"> </text:span><text:span text:style-name="T104">lève</text:span><text:span text:style-name="T109"> </text:span><text:span text:style-name="T104">une</text:span><text:span text:style-name="T107"> </text:span><text:span text:style-name="T104">exception</text:span><text:span text:style-name="T188"> </text:span><text:span text:style-name="T104">par</text:span><text:span text:style-name="T109"> </text:span><text:span text:style-name="T104">défaut. Cependant, nous pouvons utiliser l'argument </text:span><text:span text:style-name="T272">errors='coerce'</text:span><text:span text:style-name="T276"> </text:span><text:span text:style-name="T104">pour contourner ces cas et les remplacer par des valeurs NaN.</text:span></text:p>
      <text:p text:style-name="P338" loext:marker-style-name="T189"><draw:frame draw:style-name="fr2" draw:name="Image 24" text:anchor-type="char" svg:x="0.75in" svg:y="0.1866in" svg:width="6.3134in" svg:height="0.6563in" draw:z-index="14"><draw:image xlink:href="Pictures/10000000000003870000005EF2801B71.jpg" xlink:type="simple" xlink:show="embed" xlink:actuate="onLoad" draw:mime-type="image/jpeg"/></draw:frame></text:p>
      <text:list text:continue-numbering="true" text:style-name="WWNum24">
        <text:list-item>
          <text:list>
            <text:list-item>
              <text:p text:style-name="P339" loext:marker-style-name="T267"><text:span text:style-name="T268">Vérification</text:span><text:span text:style-name="T277"> </text:span><text:span text:style-name="T268">des</text:span><text:span text:style-name="T270"> </text:span><text:span text:style-name="T268">valeurs</text:span><text:span text:style-name="T277"> </text:span><text:span text:style-name="T271">manquantes</text:span></text:p>
            </text:list-item>
          </text:list>
        </text:list-item>
      </text:list>
      <text:p text:style-name="P340" loext:marker-style-name="T267"/>
      <text:p text:style-name="P122">Nous<text:span text:style-name="T40"> </text:span>observons<text:span text:style-name="T40"> </text:span>qu'il<text:span text:style-name="T40"> </text:span>y<text:span text:style-name="T40"> </text:span>a<text:span text:style-name="T39"> </text:span>11<text:span text:style-name="T40"> </text:span>valeurs<text:span text:style-name="T40"> </text:span>manquantes<text:span text:style-name="T40"> </text:span>dans<text:span text:style-name="T40"> </text:span>la<text:span text:style-name="T47"> </text:span>colonne<text:span text:style-name="T42"> </text:span><text:span text:style-name="T272">TotalCharges</text:span>.<text:span text:style-name="T40"> </text:span>Nous<text:span text:style-name="T40"> </text:span>allons<text:span text:style-name="T40"> </text:span>les<text:span text:style-name="T40"> </text:span>supprimer car leur quantité n'est pas suffisante pour affecter significativement notre analyse des données.</text:p>
      <text:p text:style-name="P341" loext:marker-style-name="T143"><draw:frame draw:style-name="fr2" draw:name="Image 25" text:anchor-type="char" svg:x="0.528in" svg:y="0.2563in" svg:width="2.6398in" svg:height="0.5445in" draw:z-index="15"><draw:image xlink:href="Pictures/100000000000017A0000004EA11DAA4E.png" xlink:type="simple" xlink:show="embed" xlink:actuate="onLoad" draw:mime-type="image/png"/></draw:frame></text:p>
      <text:p text:style-name="P342"><text:soft-page-break/></text:p>
      <text:list text:style-name="L1">
        <text:list-header>
          <text:p text:style-name="P343">Supprimer<text:span text:style-name="T43"> </text:span>les lignes<text:span text:style-name="T42"> </text:span>avec<text:span text:style-name="T42"> </text:span>des<text:span text:style-name="T42"> </text:span>valeurs manquantes dans la<text:span text:style-name="T39"> </text:span>colonne <text:span text:style-name="T39">TotalCharges</text:span></text:p>
          <text:p text:style-name="P344"/>
        </text:list-header>
      </text:list>
      <text:list text:style-name="WWNum28">
        <text:list-item>
          <text:h text:style-name="P345" text:outline-level="6"><text:bookmark text:name="_bookmark48"/>Modélisation</text:h>
        </text:list-item>
      </text:list>
      <text:p text:style-name="P346">Nous<text:span text:style-name="T40"> </text:span>passons<text:span text:style-name="T39"> </text:span>à<text:span text:style-name="T40"> </text:span>la<text:span text:style-name="T39"> </text:span>modélisation<text:span text:style-name="T39"> </text:span>de<text:span text:style-name="T40"> </text:span>la<text:span text:style-name="T39"> </text:span>prédiction<text:span text:style-name="T39"> </text:span>de<text:span text:style-name="T42"> </text:span>la<text:span text:style-name="T39"> </text:span>perte<text:span text:style-name="T47"> </text:span>de<text:span text:style-name="T42"> </text:span>clients.<text:span text:style-name="T39"> </text:span>L'objectif<text:span text:style-name="T39"> </text:span>est<text:span text:style-name="T39"> </text:span>de<text:span text:style-name="T39"> </text:span>développer<text:span text:style-name="T47"> </text:span>des modèles précis pour anticiper les départs des clients. Nous utilisons différents algorithmes de Machine</text:p>
      <text:p text:style-name="P321">Learning<text:span text:style-name="T40"> </text:span>et<text:span text:style-name="T42"> </text:span>évaluons<text:span text:style-name="T40"> </text:span>leurs<text:span text:style-name="T40"> </text:span><text:span text:style-name="T39">performances.</text:span></text:p>
      <text:list text:continue-numbering="true" text:style-name="WWNum28">
        <text:list-item>
          <text:h text:style-name="P347" text:outline-level="6">Utilisation<text:span text:style-name="T41"> </text:span>d'algorithmes<text:span text:style-name="T41"> </text:span>de<text:span text:style-name="T41"> </text:span>Machine<text:span text:style-name="T44"> </text:span><text:span text:style-name="T39">Learning</text:span></text:h>
        </text:list-item>
      </text:list>
      <text:p text:style-name="P348">Sélection<text:span text:style-name="T43"> </text:span>et<text:span text:style-name="T43"> </text:span>application<text:span text:style-name="T43"> </text:span>d'algorithmes<text:span text:style-name="T46"> </text:span>tels<text:span text:style-name="T46"> </text:span>que<text:span text:style-name="T43"> </text:span>GradientBoostingClassifier,<text:span text:style-name="T45"> </text:span>arbres<text:span text:style-name="T46"> </text:span>de<text:span text:style-name="T46"> </text:span>décision,<text:span text:style-name="T43"> </text:span>SVC, Random Forest, régression logistique, etc.</text:p>
      <text:p text:style-name="P349">Cette<text:span text:style-name="T47"> </text:span>sélection<text:span text:style-name="T40"> </text:span>nous<text:span text:style-name="T47"> </text:span>permet<text:span text:style-name="T40"> </text:span>de<text:span text:style-name="T47"> </text:span>couvrir<text:span text:style-name="T47"> </text:span>un<text:span text:style-name="T40"> </text:span>large<text:span text:style-name="T39"> </text:span>éventail<text:span text:style-name="T40"> </text:span>d'approches<text:span text:style-name="T47"> </text:span>pour<text:span text:style-name="T39"> </text:span>modéliser<text:span text:style-name="T40"> </text:span>la<text:span text:style-name="T43"> </text:span>relation<text:span text:style-name="T40"> </text:span>entre<text:span text:style-name="T47"> </text:span>les caractéristiques des clients et leur propension à se désabonner.</text:p>
      <text:list text:continue-numbering="true" text:style-name="WWNum28">
        <text:list-item>
          <text:h text:style-name="P350" text:outline-level="6">Génération<text:span text:style-name="T48"> </text:span>des<text:span text:style-name="T41"> </text:span>Jeux<text:span text:style-name="T38"> </text:span>de<text:span text:style-name="T48"> </text:span>Données<text:span text:style-name="T41"> </text:span>d'Entraînement<text:span text:style-name="T41"> </text:span>et<text:span text:style-name="T48"> </text:span>de<text:span text:style-name="T16"> </text:span><text:span text:style-name="T47">Test</text:span></text:h>
        </text:list-item>
      </text:list>
      <text:p text:style-name="P351">La<text:span text:style-name="T40"> </text:span>partition<text:span text:style-name="T42"> </text:span>choisie<text:span text:style-name="T39"> </text:span>pour les<text:span text:style-name="T42"> </text:span>données<text:span text:style-name="T39"> </text:span>pour<text:span text:style-name="T42"> </text:span>la création<text:span text:style-name="T42"> </text:span>des<text:span text:style-name="T42"> </text:span>modèles<text:span text:style-name="T39"> </text:span>est<text:span text:style-name="T42"> </text:span>la<text:span text:style-name="T39"> </text:span>suivante <text:span text:style-name="T41">:</text:span></text:p>
      <text:list text:continue-numbering="true" text:style-name="WWNum28">
        <text:list-item>
          <text:list>
            <text:list-item>
              <text:p text:style-name="P352" loext:marker-style-name="T113"><text:span text:style-name="T113">80%</text:span><text:span text:style-name="T137"> </text:span><text:span text:style-name="T113">des</text:span><text:span text:style-name="T138"> </text:span><text:span text:style-name="T113">données</text:span><text:span text:style-name="T138"> </text:span><text:span text:style-name="T113">pour </text:span><text:span text:style-name="T137">l’apprentissage</text:span></text:p>
            </text:list-item>
            <text:list-item>
              <text:p text:style-name="P353" loext:marker-style-name="T113"><text:span text:style-name="T113">20%</text:span><text:span text:style-name="T137"> </text:span><text:span text:style-name="T113">des</text:span><text:span text:style-name="T138"> </text:span><text:span text:style-name="T113">données</text:span><text:span text:style-name="T138"> </text:span><text:span text:style-name="T113">pour</text:span><text:span text:style-name="T166"> </text:span><text:span text:style-name="T113">le </text:span><text:span text:style-name="T139">test</text:span></text:p>
            </text:list-item>
          </text:list>
        </text:list-item>
        <text:list-item>
          <text:h text:style-name="P350" text:outline-level="6">Construction<text:span text:style-name="T38"> </text:span>du<text:span text:style-name="T38"> </text:span><text:span text:style-name="T39">Modèle</text:span></text:h>
        </text:list-item>
      </text:list>
      <text:p text:style-name="P354" loext:marker-style-name="T30"><text:span text:style-name="T30">Nous</text:span><text:span text:style-name="T278"> </text:span><text:span text:style-name="T30">avons</text:span><text:span text:style-name="T31"> </text:span><text:span text:style-name="T30">entraîné</text:span><text:span text:style-name="T100"> </text:span><text:span text:style-name="T30">chaque</text:span><text:span text:style-name="T31"> </text:span><text:span text:style-name="T30">algorithme</text:span><text:span text:style-name="T32"> </text:span><text:span text:style-name="T30">individuellement</text:span><text:span text:style-name="T100"> </text:span><text:span text:style-name="T30">en</text:span><text:span text:style-name="T32"> </text:span><text:span text:style-name="T30">utilisant</text:span><text:span text:style-name="T32"> </text:span><text:span text:style-name="T30">les</text:span><text:span text:style-name="T31"> </text:span><text:span text:style-name="T30">données</text:span><text:span text:style-name="T100"> </text:span><text:span text:style-name="T97">d'entraînement.</text:span></text:p>
      <text:p text:style-name="P122" loext:marker-style-name="T30"><text:span text:style-name="T30">Nous</text:span><text:span text:style-name="T97"> </text:span><text:span text:style-name="T30">avons ajusté les</text:span><text:span text:style-name="T97"> </text:span><text:span text:style-name="T30">hyperparamètres</text:span><text:span text:style-name="T97"> </text:span><text:span text:style-name="T30">de manière manuelle</text:span><text:span text:style-name="T98"> </text:span><text:span text:style-name="T30">pour</text:span><text:span text:style-name="T97"> </text:span><text:span text:style-name="T30">optimiser les</text:span><text:span text:style-name="T97"> </text:span><text:span text:style-name="T30">performances de</text:span><text:span text:style-name="T98"> </text:span><text:span text:style-name="T30">chaque modèle. Cette approche systématique nous a permis d'explorer différentes combinaisons d'hyperparamètres,</text:span><text:span text:style-name="T32"> </text:span><text:span text:style-name="T30">garantissant</text:span><text:span text:style-name="T97"> </text:span><text:span text:style-name="T30">ainsi</text:span><text:span text:style-name="T100"> </text:span><text:span text:style-name="T30">la</text:span><text:span text:style-name="T32"> </text:span><text:span text:style-name="T30">construction</text:span><text:span text:style-name="T35"> </text:span><text:span text:style-name="T30">de</text:span><text:span text:style-name="T32"> </text:span><text:span text:style-name="T30">modèles</text:span><text:span text:style-name="T100"> </text:span><text:span text:style-name="T30">adaptés</text:span><text:span text:style-name="T32"> </text:span><text:span text:style-name="T30">à</text:span><text:span text:style-name="T100"> </text:span><text:span text:style-name="T30">notre</text:span><text:span text:style-name="T35"> </text:span><text:span text:style-name="T30">problème</text:span><text:span text:style-name="T35"> </text:span><text:span text:style-name="T30">de</text:span><text:span text:style-name="T35"> </text:span><text:span text:style-name="T30">prédiction de la perte de clients.</text:span></text:p>
      <text:p text:style-name="P355" loext:marker-style-name="T104"><text:span text:style-name="T104">=&gt;</text:span><text:span text:style-name="T108"> </text:span><text:span text:style-name="T104">Exemple</text:span><text:span text:style-name="T106"> </text:span><text:span text:style-name="T104">d'Implémentation</text:span><text:span text:style-name="T108"> </text:span><text:span text:style-name="T104">du</text:span><text:span text:style-name="T106"> </text:span><text:span text:style-name="T104">modèle</text:span><text:span text:style-name="T108"> </text:span><text:span text:style-name="T104">:</text:span><text:span text:style-name="T108"> </text:span><text:span text:style-name="T104">Forêt</text:span><text:span text:style-name="T106"> </text:span><text:span text:style-name="T104">d'arbres</text:span><text:span text:style-name="T106"> </text:span><text:span text:style-name="T104">décisionnels</text:span><text:span text:style-name="T105"> </text:span><text:span text:style-name="T104">(Random</text:span><text:span text:style-name="T107"> </text:span><text:span text:style-name="T109">Forest)</text:span></text:p>
      <text:p text:style-name="P356" loext:marker-style-name="T189"><draw:frame draw:style-name="fr4" draw:name="Image 26" text:anchor-type="as-char" svg:width="6.2457in" svg:height="1.5098in" draw:z-index="83"><draw:image xlink:href="Pictures/100000000000040C0000012E49383091.jpg" xlink:type="simple" xlink:show="embed" xlink:actuate="onLoad" draw:mime-type="image/jpeg"/></draw:frame></text:p>
      <text:section text:style-name="Sect3" text:name="Section4">
        <text:p text:style-name="P357" loext:marker-style-name="T89"/>
        <text:list text:style-name="WWNum29">
          <text:list-item>
            <text:list>
              <text:list-item>
                <text:h text:style-name="P358" text:outline-level="4"><text:bookmark text:name="_bookmark49"/><text:bookmark text:name="_bookmark50"/>Évaluation</text:h>
              </text:list-item>
            </text:list>
          </text:list-item>
        </text:list>
        <text:p text:style-name="P315" loext:marker-style-name="T144"><text:span text:style-name="T145">Figure</text:span><text:span text:style-name="T148"> </text:span><text:span text:style-name="T145">12</text:span><text:span text:style-name="T147"> </text:span><text:span text:style-name="T145">:</text:span><text:span text:style-name="T147"> </text:span><text:span text:style-name="T145">Algorithme</text:span><text:span text:style-name="T206"> </text:span><text:span text:style-name="T145">de</text:span><text:span text:style-name="T147"> </text:span><text:span text:style-name="T145">Random</text:span><text:span text:style-name="T147"> </text:span><text:span text:style-name="T148">Forest</text:span></text:p>
      </text:section>
      <text:section text:style-name="Sect1" text:name="Section5">
        <text:p text:style-name="P359" loext:marker-style-name="T279"/>
        <text:p text:style-name="P349" loext:marker-style-name="T30"><text:span text:style-name="T30">L'évaluation</text:span><text:span text:style-name="T35"> </text:span><text:span text:style-name="T30">du</text:span><text:span text:style-name="T35"> </text:span><text:span text:style-name="T30">modèle</text:span><text:span text:style-name="T35"> </text:span><text:span text:style-name="T30">est</text:span><text:span text:style-name="T97"> </text:span><text:span text:style-name="T30">cruciale</text:span><text:span text:style-name="T35"> </text:span><text:span text:style-name="T30">pour</text:span><text:span text:style-name="T32"> </text:span><text:span text:style-name="T30">déterminer</text:span><text:span text:style-name="T97"> </text:span><text:span text:style-name="T30">l'efficacité</text:span><text:span text:style-name="T35"> </text:span><text:span text:style-name="T30">des</text:span><text:span text:style-name="T100"> </text:span><text:span text:style-name="T30">modèles</text:span><text:span text:style-name="T100"> </text:span><text:span text:style-name="T30">entraînés.</text:span><text:span text:style-name="T100"> </text:span><text:span text:style-name="T30">Nous</text:span><text:span text:style-name="T32"> </text:span><text:span text:style-name="T30">utilisons différentes métriques et visualisations pour comprendre leur performance globale.</text:span></text:p>
        <text:p text:style-name="P360" loext:marker-style-name="T30"/>
        <text:p text:style-name="P361" loext:marker-style-name="T30"><text:span text:style-name="T30">La fonction modelmetricsplot crée un graphique à barres groupées comparant les principales métriques</text:span><text:span text:style-name="T100"> </text:span><text:span text:style-name="T30">de</text:span><text:span text:style-name="T100"> </text:span><text:span text:style-name="T30">performance entre</text:span><text:span text:style-name="T97"> </text:span><text:span text:style-name="T30">différents</text:span><text:span text:style-name="T100"> </text:span><text:span text:style-name="T30">modèles.</text:span><text:span text:style-name="T98"> </text:span><text:span text:style-name="T30">Cela offre</text:span><text:span text:style-name="T97"> </text:span><text:span text:style-name="T30">une vue</text:span><text:span text:style-name="T97"> </text:span><text:span text:style-name="T30">d'ensemble rapide des</text:span><text:span text:style-name="T98"> </text:span><text:span text:style-name="T30">forces</text:span><text:span text:style-name="T98"> </text:span><text:span text:style-name="T30">de chaque</text:span><text:span text:style-name="T32"> </text:span><text:span text:style-name="T30">modèle</text:span><text:span text:style-name="T35"> </text:span><text:span text:style-name="T30">en</text:span><text:span text:style-name="T35"> </text:span><text:span text:style-name="T30">termes</text:span><text:span text:style-name="T100"> </text:span><text:span text:style-name="T30">d'exactitude,</text:span><text:span text:style-name="T97"> </text:span><text:span text:style-name="T30">de</text:span><text:span text:style-name="T97"> </text:span><text:span text:style-name="T30">rappel,</text:span><text:span text:style-name="T32"> </text:span><text:span text:style-name="T30">de</text:span><text:span text:style-name="T35"> </text:span><text:span text:style-name="T30">précision, de</text:span><text:span text:style-name="T97"> </text:span><text:span text:style-name="T30">score</text:span><text:span text:style-name="T32"> </text:span><text:span text:style-name="T30">F1,</text:span><text:span text:style-name="T97"> </text:span><text:span text:style-name="T30">d'aire</text:span><text:span text:style-name="T97"> </text:span><text:span text:style-name="T30">sous</text:span><text:span text:style-name="T100"> </text:span><text:span text:style-name="T30">la</text:span><text:span text:style-name="T100"> </text:span><text:span text:style-name="T30">courbe</text:span><text:span text:style-name="T97"> </text:span><text:span text:style-name="T30">ROC</text:span><text:span text:style-name="T35"> </text:span><text:span text:style-name="T30">et du coefficient Kappa de Cohen.</text:span></text:p>
      </text:section>
      <text:p text:style-name="P362" loext:marker-style-name="T189"><draw:frame draw:style-name="fr4" draw:name="Image 27" text:anchor-type="as-char" svg:width="7.311in" svg:height="1.8689in" draw:z-index="84"><draw:image xlink:href="Pictures/1000000000000382000000E64FA0A5B7.png" xlink:type="simple" xlink:show="embed" xlink:actuate="onLoad" draw:mime-type="image/png"/></draw:frame></text:p>
      <text:p text:style-name="P363" loext:marker-style-name="T144"><text:bookmark text:name="_bookmark51"/><text:span text:style-name="T145">Figure</text:span><text:span text:style-name="T146"> </text:span><text:span text:style-name="T145">13</text:span><text:span text:style-name="T146"> </text:span><text:span text:style-name="T145">:</text:span><text:span text:style-name="T280"> </text:span><text:span text:style-name="T145">model</text:span><text:span text:style-name="T146"> </text:span><text:span text:style-name="T148">metrics</text:span></text:p>
      <text:p text:style-name="P364" loext:marker-style-name="T104"><text:span text:style-name="T104">La</text:span><text:span text:style-name="T109"> </text:span><text:span text:style-name="T104">fonction</text:span><text:span text:style-name="T108"> </text:span><text:span text:style-name="T104">confmatplot</text:span><text:span text:style-name="T107"> </text:span><text:span text:style-name="T104">génère</text:span><text:span text:style-name="T274"> </text:span><text:span text:style-name="T104">des</text:span><text:span text:style-name="T107"> </text:span><text:span text:style-name="T104">matrices</text:span><text:span text:style-name="T107"> </text:span><text:span text:style-name="T104">de</text:span><text:span text:style-name="T109"> </text:span><text:span text:style-name="T104">confusion,</text:span><text:span text:style-name="T107"> </text:span><text:span text:style-name="T104">visualisant</text:span><text:span text:style-name="T109"> </text:span><text:span text:style-name="T104">les</text:span><text:span text:style-name="T107"> </text:span><text:span text:style-name="T104">vrais</text:span><text:span text:style-name="T109"> </text:span><text:span text:style-name="T104">positifs,</text:span><text:span text:style-name="T109"> </text:span><text:span text:style-name="T104">les</text:span><text:span text:style-name="T106"> </text:span><text:span text:style-name="T104">vrais</text:span><text:span text:style-name="T109"> </text:span><text:span text:style-name="T104">négatifs,</text:span><text:span text:style-name="T109"> </text:span><text:span text:style-name="T104">les</text:span><text:span text:style-name="T108"> </text:span><text:span text:style-name="T104">faux positifs et les faux négatifs. Cela aide à identifier les domaines spécifiques d'amélioration pour chaque modèle, offrant ainsi un aperçu de sa capacité à classer correctement les instances.</text:span></text:p>
      <text:p text:style-name="P365" loext:marker-style-name="T281"><draw:frame draw:style-name="fr2" draw:name="Image 28" text:anchor-type="char" svg:x="0.75in" svg:y="0.0835in" svg:width="7.2547in" svg:height="4.7335in" draw:z-index="16"><draw:image xlink:href="Pictures/10000000000003D500000280958524F4.png" xlink:type="simple" xlink:show="embed" xlink:actuate="onLoad" draw:mime-type="image/png"/></draw:frame></text:p>
      <text:p text:style-name="P366" loext:marker-style-name="T144"><text:bookmark text:name="_bookmark52"/><text:span text:style-name="T145">Figure</text:span><text:span text:style-name="T148"> </text:span><text:span text:style-name="T145">14</text:span><text:span text:style-name="T147"> </text:span><text:span text:style-name="T145">:</text:span><text:span text:style-name="T147"> </text:span><text:span text:style-name="T145">Confusion</text:span><text:span text:style-name="T148"> Matrices</text:span></text:p>
      <text:p text:style-name="P367" loext:marker-style-name="T144"/>
      <text:p text:style-name="P368" loext:marker-style-name="T30"><text:span text:style-name="T30">Nous</text:span><text:span text:style-name="T35"> </text:span><text:span text:style-name="T30">avons</text:span><text:span text:style-name="T35"> </text:span><text:span text:style-name="T30">évalué</text:span><text:span text:style-name="T35"> </text:span><text:span text:style-name="T30">les</text:span><text:span text:style-name="T35"> </text:span><text:span text:style-name="T30">performances</text:span><text:span text:style-name="T97"> </text:span><text:span text:style-name="T30">des</text:span><text:span text:style-name="T97"> </text:span><text:span text:style-name="T30">différents</text:span><text:span text:style-name="T97"> </text:span><text:span text:style-name="T30">modèles</text:span><text:span text:style-name="T97"> </text:span><text:span text:style-name="T30">en</text:span><text:span text:style-name="T98"> </text:span><text:span text:style-name="T30">utilisant</text:span><text:span text:style-name="T100"> </text:span><text:span text:style-name="T30">plusieurs</text:span><text:span text:style-name="T35"> </text:span><text:span text:style-name="T30">métriques</text:span><text:span text:style-name="T97"> </text:span><text:span text:style-name="T30">:</text:span><text:span text:style-name="T35"> </text:span><text:span text:style-name="T30">la</text:span><text:span text:style-name="T35"> </text:span><text:span text:style-name="T30">précision, le</text:span><text:span text:style-name="T98"> </text:span><text:span text:style-name="T30">rappel,</text:span><text:span text:style-name="T35"> </text:span><text:span text:style-name="T30">la</text:span><text:span text:style-name="T35"> </text:span><text:span text:style-name="T30">précision</text:span><text:span text:style-name="T100"> </text:span><text:span text:style-name="T30">(precision),</text:span><text:span text:style-name="T97"> </text:span><text:span text:style-name="T30">le</text:span><text:span text:style-name="T98"> </text:span><text:span text:style-name="T30">F1-score,</text:span><text:span text:style-name="T35"> </text:span><text:span text:style-name="T30">le</text:span><text:span text:style-name="T35"> </text:span><text:span text:style-name="T30">ROC-AUC</text:span><text:span text:style-name="T100"> </text:span><text:span text:style-name="T30">et le</text:span><text:span text:style-name="T35"> </text:span><text:span text:style-name="T30">Cohen's</text:span><text:span text:style-name="T100"> </text:span><text:span text:style-name="T30">Kappa.</text:span><text:span text:style-name="T97"> </text:span><text:span text:style-name="T30">Les</text:span><text:span text:style-name="T35"> </text:span><text:span text:style-name="T30">résultats</text:span><text:span text:style-name="T35"> </text:span><text:span text:style-name="T30">montrent</text:span><text:span text:style-name="T100"> </text:span><text:span text:style-name="T30">que le modèle RandomForestClassifier offre la meilleure performance avec des scores élevés sur toutes les métriques, indiquant une précision et une capacité de généralisation élevées pour la prédiction du churn des clients.</text:span></text:p>
      <text:p text:style-name="P369" loext:marker-style-name="T30"><text:span text:style-name="T30">En</text:span><text:span text:style-name="T100"> </text:span><text:span text:style-name="T30">résumé,</text:span><text:span text:style-name="T35"> </text:span><text:span text:style-name="T30">ces</text:span><text:span text:style-name="T35"> </text:span><text:span text:style-name="T30">fonctions</text:span><text:span text:style-name="T35"> </text:span><text:span text:style-name="T30">et</text:span><text:span text:style-name="T35"> </text:span><text:span text:style-name="T30">visualisations</text:span><text:span text:style-name="T35"> </text:span><text:span text:style-name="T30">contribuent</text:span><text:span text:style-name="T35"> </text:span><text:span text:style-name="T30">à</text:span><text:span text:style-name="T35"> </text:span><text:span text:style-name="T30">un</text:span><text:span text:style-name="T35"> </text:span><text:span text:style-name="T30">processus</text:span><text:span text:style-name="T32"> </text:span><text:span text:style-name="T30">d'évaluation</text:span><text:span text:style-name="T35"> </text:span><text:span text:style-name="T30">des</text:span><text:span text:style-name="T35"> </text:span><text:span text:style-name="T30">modèles</text:span><text:span text:style-name="T35"> </text:span><text:span text:style-name="T30">robuste, permettant une comparaison approfondie des modèles entraînés et facilitant une prise de décision éclairée pour leur déploiement.</text:span></text:p>
      <text:list xml:id="list191359220039076" text:continue-numbering="true" text:style-name="WWNum29">
        <text:list-item>
          <text:list>
            <text:list-item>
              <text:h text:style-name="P370" text:outline-level="4"><text:bookmark text:name="_bookmark53"/>Déploiement<text:span text:style-name="T40"> </text:span>du<text:span text:style-name="T40"> </text:span><text:span text:style-name="T39">Modèle</text:span></text:h>
            </text:list-item>
          </text:list>
        </text:list-item>
      </text:list>
      <text:p text:style-name="P371">Le<text:span text:style-name="T43"> </text:span>déploiement<text:span text:style-name="T40"> </text:span>du<text:span text:style-name="T40"> </text:span>projet<text:span text:style-name="T42"> </text:span>de<text:span text:style-name="T47"> </text:span>prédiction<text:span text:style-name="T40"> </text:span>du<text:span text:style-name="T40"> </text:span>churn<text:span text:style-name="T40"> </text:span>des<text:span text:style-name="T40"> </text:span>clients<text:span text:style-name="T40"> </text:span>sur<text:span text:style-name="T40"> </text:span>PythonAnywhere<text:span text:style-name="T40"> </text:span>a<text:span text:style-name="T47"> </text:span>impliqué<text:span text:style-name="T47"> </text:span>les<text:span text:style-name="T40"> </text:span>étapes suivantes :</text:p>
      <text:p text:style-name="P124"/>
      <text:list xml:id="list2924072416" text:style-name="WWNum30">
        <text:list-item>
          <text:p text:style-name="P372" loext:marker-style-name="T113"><text:span text:style-name="T160">Sélection</text:span><text:span text:style-name="T164"> </text:span><text:span text:style-name="T160">de</text:span><text:span text:style-name="T165"> </text:span><text:span text:style-name="T160">la</text:span><text:span text:style-name="T164"> </text:span><text:span text:style-name="T160">Plateforme</text:span><text:span text:style-name="T165"> </text:span><text:span text:style-name="T160">d'Hébergement</text:span><text:span text:style-name="T161"> </text:span><text:span text:style-name="T113">:</text:span><text:span text:style-name="T136"> </text:span><text:span text:style-name="T113">PythonAnywhere</text:span><text:span text:style-name="T136"> </text:span><text:span text:style-name="T113">a</text:span><text:span text:style-name="T139"> </text:span><text:span text:style-name="T113">été</text:span><text:span text:style-name="T137"> </text:span><text:span text:style-name="T113">choisi</text:span><text:span text:style-name="T136"> </text:span><text:span text:style-name="T113">pour</text:span><text:span text:style-name="T139"> </text:span><text:span text:style-name="T113">sa</text:span><text:span text:style-name="T139"> </text:span><text:span text:style-name="T113">compatibilité avec les applications web Python.</text:span></text:p>
        </text:list-item>
        <text:list-item>
          <text:p text:style-name="P373" loext:marker-style-name="T113"><text:span text:style-name="T160">Configuration</text:span><text:span text:style-name="T165"> </text:span><text:span text:style-name="T160">du</text:span><text:span text:style-name="T161"> </text:span><text:span text:style-name="T160">Compte</text:span><text:span text:style-name="T162"> </text:span><text:span text:style-name="T113">:</text:span><text:span text:style-name="T137"> </text:span><text:span text:style-name="T113">Création</text:span><text:span text:style-name="T138"> </text:span><text:span text:style-name="T113">et</text:span><text:span text:style-name="T138"> </text:span><text:span text:style-name="T113">configuration</text:span><text:span text:style-name="T137"> </text:span><text:span text:style-name="T113">d'un</text:span><text:span text:style-name="T138"> </text:span><text:span text:style-name="T113">compte</text:span><text:span text:style-name="T137"> PythonAnywhere.</text:span></text:p>
        </text:list-item>
        <text:list-item>
          <text:p text:style-name="P374" loext:marker-style-name="T113"><text:span text:style-name="T160">Préparation</text:span><text:span text:style-name="T165"> </text:span><text:span text:style-name="T160">du</text:span><text:span text:style-name="T161"> </text:span><text:span text:style-name="T160">Projet</text:span><text:span text:style-name="T161"> </text:span><text:span text:style-name="T113">: Adaptation</text:span><text:span text:style-name="T138"> </text:span><text:span text:style-name="T113">du</text:span><text:span text:style-name="T138"> </text:span><text:span text:style-name="T113">projet</text:span><text:span text:style-name="T137"> </text:span><text:span text:style-name="T113">aux exigences</text:span><text:span text:style-name="T138"> </text:span><text:span text:style-name="T113">de</text:span><text:span text:style-name="T137"> PythonAnywhere.</text:span></text:p>
        </text:list-item>
        <text:list-item>
          <text:p text:style-name="P375" loext:marker-style-name="T113"><text:span text:style-name="T160">Processus</text:span><text:span text:style-name="T164"> </text:span><text:span text:style-name="T160">de</text:span><text:span text:style-name="T165"> </text:span><text:span text:style-name="T160">Déploiement</text:span><text:span text:style-name="T162"> </text:span><text:span text:style-name="T113">:</text:span><text:span text:style-name="T136"> </text:span><text:span text:style-name="T113">Déploiement</text:span><text:span text:style-name="T136"> </text:span><text:span text:style-name="T113">du</text:span><text:span text:style-name="T136"> </text:span><text:span text:style-name="T113">projet</text:span><text:span text:style-name="T136"> </text:span><text:span text:style-name="T113">en</text:span><text:span text:style-name="T136"> </text:span><text:span text:style-name="T113">suivant</text:span><text:span text:style-name="T136"> </text:span><text:span text:style-name="T113">les</text:span><text:span text:style-name="T136"> </text:span><text:span text:style-name="T113">outils</text:span><text:span text:style-name="T136"> </text:span><text:span text:style-name="T113">et</text:span><text:span text:style-name="T136"> </text:span><text:span text:style-name="T113">instructions</text:span><text:span text:style-name="T136"> </text:span><text:span text:style-name="T113">spécifiques</text:span><text:span text:style-name="T136"> </text:span><text:span text:style-name="T113">à </text:span><text:span text:style-name="T137">PythonAnywhere.</text:span></text:p>
        </text:list-item>
        <text:list-item>
          <text:p text:style-name="P376" loext:marker-style-name="T113"><text:span text:style-name="T160">Accès</text:span><text:span text:style-name="T164"> </text:span><text:span text:style-name="T160">au</text:span><text:span text:style-name="T164"> </text:span><text:span text:style-name="T160">Projet</text:span><text:span text:style-name="T162"> </text:span><text:span text:style-name="T160">Déployé</text:span><text:span text:style-name="T162"> </text:span><text:span text:style-name="T113">:</text:span><text:span text:style-name="T136"> </text:span><text:span text:style-name="T113">Une</text:span><text:span text:style-name="T139"> </text:span><text:span text:style-name="T113">URL</text:span><text:span text:style-name="T136"> </text:span><text:span text:style-name="T113">unique</text:span><text:span text:style-name="T136"> </text:span><text:span text:style-name="T113">a</text:span><text:span text:style-name="T136"> </text:span><text:span text:style-name="T113">été</text:span><text:span text:style-name="T137"> </text:span><text:span text:style-name="T113">fournie</text:span><text:span text:style-name="T136"> </text:span><text:span text:style-name="T113">pour</text:span><text:span text:style-name="T140"> </text:span><text:span text:style-name="T113">permettre</text:span><text:span text:style-name="T136"> </text:span><text:span text:style-name="T113">aux</text:span><text:span text:style-name="T136"> </text:span><text:span text:style-name="T113">utilisateurs</text:span><text:span text:style-name="T136"> </text:span><text:span text:style-name="T113">d'accéder</text:span><text:span text:style-name="T137"> </text:span><text:span text:style-name="T113">à l'application de prédiction du churn des clients.</text:span></text:p>
        </text:list-item>
      </text:list>
      <text:p text:style-name="P377"/>
      <text:p text:style-name="P144">Ce<text:span text:style-name="T47"> </text:span>déploiement<text:span text:style-name="T40"> </text:span>rend<text:span text:style-name="T40"> </text:span>le<text:span text:style-name="T39"> </text:span>modèle<text:span text:style-name="T47"> </text:span>accessible<text:span text:style-name="T40"> </text:span>aux<text:span text:style-name="T40"> </text:span>utilisateurs,<text:span text:style-name="T40"> </text:span>leur<text:span text:style-name="T40"> </text:span>permettant<text:span text:style-name="T42"> </text:span>de<text:span text:style-name="T47"> </text:span>bénéficier<text:span text:style-name="T43"> </text:span>de<text:span text:style-name="T47"> </text:span>prédictions<text:span text:style-name="T40"> </text:span>pour prendre des décisions éclairées.</text:p>
      <text:p text:style-name="P124"/>
      <text:list text:continue-list="list191359220039076" text:style-name="WWNum29">
        <text:list-item>
          <text:list>
            <text:list-item>
              <text:h text:style-name="P378" text:outline-level="4"><text:bookmark text:name="_bookmark54"/>Conclusion</text:h>
            </text:list-item>
          </text:list>
        </text:list-item>
      </text:list>
      <text:p text:style-name="P141">Ce<text:span text:style-name="T40"> </text:span>chapitre<text:span text:style-name="T40"> </text:span>a<text:span text:style-name="T40"> </text:span>détaillé<text:span text:style-name="T40"> </text:span>le<text:span text:style-name="T40"> </text:span>processus<text:span text:style-name="T40"> </text:span>de<text:span text:style-name="T40"> </text:span>développement<text:span text:style-name="T40"> </text:span>et<text:span text:style-name="T40"> </text:span>d'implémentation<text:span text:style-name="T40"> </text:span>de<text:span text:style-name="T40"> </text:span>notre<text:span text:style-name="T40"> </text:span>projet<text:span text:style-name="T40"> </text:span>de<text:span text:style-name="T40"> </text:span>prédiction<text:span text:style-name="T40"> </text:span>de<text:span text:style-name="T40"> </text:span>la perte de clients dans le secteur des télécommunications. Nous avons commencé par comprendre la problématique et préparer les données, en les nettoyant et en vérifiant leur qualité. Ensuite, nous avons modélisé la prédiction du churn en utilisant divers algorithmes de Machine Learning, avec le modèle RandomForestClassifier offrant les meilleures performances. Enfin, nous avons déployé notre modèle sur PythonAnywhere, le rendant accessible aux utilisateurs pour des décisions éclairées sur la rétention des <text:span text:style-name="T39">clients.</text:span></text:p>
      <text:h text:style-name="P379" text:outline-level="3" loext:marker-style-name="T73"><text:bookmark text:name="_bookmark55"/><text:span text:style-name="T126">CHAPITRE</text:span><text:span text:style-name="T181"> </text:span><text:span text:style-name="T126">5</text:span><text:span text:style-name="T282"> </text:span><text:span text:style-name="T126">:</text:span><text:span text:style-name="T196"> </text:span><text:span text:style-name="T126">RESULTATS</text:span><text:span text:style-name="T282"> </text:span><text:span text:style-name="T126">ET</text:span><text:span text:style-name="T181"> </text:span><text:span text:style-name="T130">DISCUSSION</text:span></text:h>
      <text:p text:style-name="P380" loext:marker-style-name="T168"/>
      <text:list text:continue-list="list2924072416" text:style-name="WWNum30">
        <text:list-item>
          <text:list>
            <text:list-item>
              <text:h text:style-name="P381" text:outline-level="4"><text:bookmark text:name="_bookmark56"/>Introduction</text:h>
            </text:list-item>
          </text:list>
        </text:list-item>
      </text:list>
      <text:p text:style-name="P382" loext:marker-style-name="T104"><text:span text:style-name="T104">Dans</text:span><text:span text:style-name="T107"> </text:span><text:span text:style-name="T104">ce</text:span><text:span text:style-name="T274"> </text:span><text:span text:style-name="T104">chapitre,</text:span><text:span text:style-name="T109"> </text:span><text:span text:style-name="T104">nous</text:span><text:span text:style-name="T107"> </text:span><text:span text:style-name="T104">présentons</text:span><text:span text:style-name="T109"> </text:span><text:span text:style-name="T104">les</text:span><text:span text:style-name="T107"> </text:span><text:span text:style-name="T104">résultats</text:span><text:span text:style-name="T274"> </text:span><text:span text:style-name="T104">finaux</text:span><text:span text:style-name="T109"> </text:span><text:span text:style-name="T104">de</text:span><text:span text:style-name="T109"> </text:span><text:span text:style-name="T104">notre</text:span><text:span text:style-name="T107"> </text:span><text:span text:style-name="T104">modèle</text:span><text:span text:style-name="T107"> </text:span><text:span text:style-name="T104">de</text:span><text:span text:style-name="T109"> </text:span><text:span text:style-name="T104">prédiction</text:span><text:span text:style-name="T188"> </text:span><text:span text:style-name="T104">de</text:span><text:span text:style-name="T109"> </text:span><text:span text:style-name="T104">la</text:span><text:span text:style-name="T109"> </text:span><text:span text:style-name="T104">perte</text:span><text:span text:style-name="T274"> </text:span><text:span text:style-name="T104">de</text:span><text:span text:style-name="T109"> </text:span><text:span text:style-name="T104">clients</text:span><text:span text:style-name="T274"> </text:span><text:span text:style-name="T104">dans</text:span><text:span text:style-name="T109"> </text:span><text:span text:style-name="T104">le secteur des télécommunications. Nous interpréterons les performances du modèle, comparerons les résultats obtenus avec d'autres approches, discuterons des limitations rencontrées, et proposerons des pistes d'amélioration pour des travaux futurs.</text:span></text:p>
      <text:list text:continue-numbering="true" text:style-name="WWNum30">
        <text:list-item>
          <text:list>
            <text:list-item>
              <text:h text:style-name="P383" text:outline-level="4"><text:bookmark text:name="_bookmark57"/>Résultats</text:h>
            </text:list-item>
          </text:list>
        </text:list-item>
      </text:list>
      <text:p text:style-name="P384" loext:marker-style-name="T104"><text:span text:style-name="T104">Nous avons développé un modèle de prédiction du churn basé sur l'algorithme de l'arbre de décision. Voici l'interface</text:span><text:span text:style-name="T109"> </text:span><text:span text:style-name="T104">finale</text:span><text:span text:style-name="T109"> </text:span><text:span text:style-name="T104">de</text:span><text:span text:style-name="T109"> </text:span><text:span text:style-name="T104">prédiction</text:span><text:span text:style-name="T188"> </text:span><text:span text:style-name="T104">du</text:span><text:span text:style-name="T188"> </text:span><text:span text:style-name="T104">churn,</text:span><text:span text:style-name="T109"> </text:span><text:span text:style-name="T104">qui</text:span><text:span text:style-name="T109"> </text:span><text:span text:style-name="T104">permet</text:span><text:span text:style-name="T107"> </text:span><text:span text:style-name="T104">de</text:span><text:span text:style-name="T109"> </text:span><text:span text:style-name="T104">prédire</text:span><text:span text:style-name="T109"> </text:span><text:span text:style-name="T104">l'état</text:span><text:span text:style-name="T109"> </text:span><text:span text:style-name="T104">de</text:span><text:span text:style-name="T109"> </text:span><text:span text:style-name="T104">churn</text:span><text:span text:style-name="T188"> </text:span><text:span text:style-name="T104">pour</text:span><text:span text:style-name="T109"> </text:span><text:span text:style-name="T104">un</text:span><text:span text:style-name="T107"> </text:span><text:span text:style-name="T104">seul</text:span><text:span text:style-name="T109"> </text:span><text:span text:style-name="T104">client</text:span><text:span text:style-name="T107"> </text:span><text:span text:style-name="T104">en</text:span><text:span text:style-name="T106"> </text:span><text:span text:style-name="T104">entrant</text:span><text:span text:style-name="T107"> </text:span><text:span text:style-name="T104">ses informations. En cliquant sur "Predict", l'état de churn du client apparaîtra.</text:span></text:p>
      <text:p text:style-name="P385" loext:marker-style-name="T283"><draw:frame draw:style-name="fr2" draw:name="Image 29" text:anchor-type="char" svg:x="1.3728in" svg:y="0.139in" svg:width="5.5193in" svg:height="2.6701in" draw:z-index="17"><draw:image xlink:href="Pictures/100000010000020700000187871CFFA5.png" xlink:type="simple" xlink:show="embed" xlink:actuate="onLoad" draw:mime-type="image/png"/></draw:frame></text:p>
      <text:p text:style-name="P386" loext:marker-style-name="T144"><text:bookmark text:name="_bookmark58"/><text:span text:style-name="T145">Figure</text:span><text:span text:style-name="T148"> </text:span><text:span text:style-name="T145">15</text:span><text:span text:style-name="T148"> </text:span><text:span text:style-name="T145">:</text:span><text:span text:style-name="T147"> </text:span><text:span text:style-name="T145">Interface</text:span><text:span text:style-name="T206"> </text:span><text:span text:style-name="T145">de</text:span><text:span text:style-name="T148"> </text:span><text:span text:style-name="T145">Prédiction</text:span><text:span text:style-name="T148"> </text:span><text:span text:style-name="T145">du</text:span><text:span text:style-name="T148"> </text:span><text:span text:style-name="T145">Churn</text:span><text:span text:style-name="T148"> </text:span><text:span text:style-name="T145">pour</text:span><text:span text:style-name="T148"> </text:span><text:span text:style-name="T145">un</text:span><text:span text:style-name="T148"> Client</text:span></text:p>
      <text:p text:style-name="P387" loext:marker-style-name="T104"><text:span text:style-name="T104">De</text:span><text:span text:style-name="T109"> </text:span><text:span text:style-name="T104">plus,</text:span><text:span text:style-name="T109"> </text:span><text:span text:style-name="T104">notre</text:span><text:span text:style-name="T107"> </text:span><text:span text:style-name="T104">modèle</text:span><text:span text:style-name="T274"> </text:span><text:span text:style-name="T104">permet</text:span><text:span text:style-name="T107"> </text:span><text:span text:style-name="T104">également</text:span><text:span text:style-name="T109"> </text:span><text:span text:style-name="T104">de</text:span><text:span text:style-name="T109"> </text:span><text:span text:style-name="T104">prédire</text:span><text:span text:style-name="T109"> </text:span><text:span text:style-name="T104">le</text:span><text:span text:style-name="T109"> </text:span><text:span text:style-name="T104">churn</text:span><text:span text:style-name="T188"> </text:span><text:span text:style-name="T104">pour</text:span><text:span text:style-name="T109"> </text:span><text:span text:style-name="T104">plusieurs</text:span><text:span text:style-name="T109"> </text:span><text:span text:style-name="T104">clients</text:span><text:span text:style-name="T274"> </text:span><text:span text:style-name="T104">à</text:span><text:span text:style-name="T109"> </text:span><text:span text:style-name="T104">la</text:span><text:span text:style-name="T109"> </text:span><text:span text:style-name="T104">fois</text:span><text:span text:style-name="T106"> </text:span><text:span text:style-name="T104">en</text:span><text:span text:style-name="T109"> </text:span><text:span text:style-name="T104">important</text:span><text:span text:style-name="T109"> </text:span><text:span text:style-name="T104">un</text:span><text:span text:style-name="T188"> </text:span><text:span text:style-name="T104">fichier CSV</text:span><text:span text:style-name="T109"> </text:span><text:span text:style-name="T104">contenant les</text:span><text:span text:style-name="T188"> </text:span><text:span text:style-name="T104">données</text:span><text:span text:style-name="T109"> </text:span><text:span text:style-name="T104">des clients. Voici un</text:span><text:span text:style-name="T274"> </text:span><text:span text:style-name="T104">aperçu</text:span><text:span text:style-name="T274"> </text:span><text:span text:style-name="T104">du</text:span><text:span text:style-name="T274"> </text:span><text:span text:style-name="T104">résultat</text:span><text:span text:style-name="T109"> </text:span><text:span text:style-name="T104">obtenu</text:span><text:span text:style-name="T109"> </text:span><text:span text:style-name="T104">pour la prédiction</text:span><text:span text:style-name="T274"> </text:span><text:span text:style-name="T104">du</text:span><text:span text:style-name="T274"> </text:span><text:span text:style-name="T104">churn</text:span><text:span text:style-name="T274"> </text:span><text:span text:style-name="T104">de plusieurs clients :</text:span></text:p>
      <text:p text:style-name="P385" loext:marker-style-name="T283"><draw:frame draw:style-name="fr2" draw:name="Image 30" text:anchor-type="char" svg:x="0.5in" svg:y="0.1398in" svg:width="7.1925in" svg:height="3.0366in" draw:z-index="18"><draw:image xlink:href="Pictures/10000001000003BB0000027E89DD0224.png" xlink:type="simple" xlink:show="embed" xlink:actuate="onLoad" draw:mime-type="image/png"/></draw:frame></text:p>
      <text:p text:style-name="P388" loext:marker-style-name="T144"><text:bookmark text:name="_bookmark59"/><text:soft-page-break/><text:span text:style-name="T145">Figure</text:span><text:span text:style-name="T146"> </text:span><text:span text:style-name="T145">16</text:span><text:span text:style-name="T148"> </text:span><text:span text:style-name="T145">:</text:span><text:span text:style-name="T147"> </text:span><text:span text:style-name="T145">Prédiction</text:span><text:span text:style-name="T206"> </text:span><text:span text:style-name="T145">du</text:span><text:span text:style-name="T146"> </text:span><text:span text:style-name="T145">Churn</text:span><text:span text:style-name="T206"> </text:span><text:span text:style-name="T145">pour</text:span><text:span text:style-name="T206"> </text:span><text:span text:style-name="T145">Plusieurs</text:span><text:span text:style-name="T148"> Clients</text:span></text:p>
      <text:list xml:id="list191358910060261" text:continue-numbering="true" text:style-name="WWNum30">
        <text:list-item>
          <text:list>
            <text:list-item>
              <text:h text:style-name="P389" text:outline-level="4"><text:bookmark text:name="_bookmark60"/>Discussion</text:h>
            </text:list-item>
          </text:list>
        </text:list-item>
      </text:list>
      <text:p text:style-name="P390">Dans<text:span text:style-name="T40"> </text:span>cette<text:span text:style-name="T47"> </text:span>section,<text:span text:style-name="T40"> </text:span>nous<text:span text:style-name="T40"> </text:span>évaluons<text:span text:style-name="T40"> </text:span>les<text:span text:style-name="T40"> </text:span>performances<text:span text:style-name="T40"> </text:span>de<text:span text:style-name="T47"> </text:span>notre<text:span text:style-name="T43"> </text:span>modèle<text:span text:style-name="T47"> </text:span>de<text:span text:style-name="T47"> </text:span>prédiction<text:span text:style-name="T40"> </text:span>du<text:span text:style-name="T40"> </text:span>churn<text:span text:style-name="T40"> </text:span>basé<text:span text:style-name="T47"> </text:span>sur l'algorithme RandomForestClassifier. Nous discutons de sa précision, de sa sensibilité et de sa spécificité pour évaluer son efficacité.</text:p>
      <text:p text:style-name="P142"/>
      <text:p text:style-name="P123">Notre<text:span text:style-name="T47"> </text:span>modèle<text:span text:style-name="T40"> </text:span>basé<text:span text:style-name="T40"> </text:span>sur<text:span text:style-name="T39"> </text:span>l'algorithme<text:span text:style-name="T39"> </text:span>de<text:span text:style-name="T47"> </text:span>l'arbre<text:span text:style-name="T47"> </text:span>de<text:span text:style-name="T40"> </text:span>décision<text:span text:style-name="T39"> </text:span>représente<text:span text:style-name="T39"> </text:span>une<text:span text:style-name="T39"> </text:span>avancée<text:span text:style-name="T40"> </text:span>significative<text:span text:style-name="T40"> </text:span>dans<text:span text:style-name="T39"> </text:span>la réduction du churn des clients. Voyons maintenant ses performances en détail :</text:p>
      <text:p text:style-name="P197"/>
      <text:list xml:id="list3375857179" text:style-name="WWNum31">
        <text:list-item>
          <text:p text:style-name="P391" loext:marker-style-name="T113"><text:span text:style-name="T160">Précision</text:span><text:span text:style-name="T113">:</text:span><text:span text:style-name="T136"> </text:span><text:span text:style-name="T113">Notre</text:span><text:span text:style-name="T140"> </text:span><text:span text:style-name="T113">modèle</text:span><text:span text:style-name="T137"> </text:span><text:span text:style-name="T113">présente</text:span><text:span text:style-name="T136"> </text:span><text:span text:style-name="T113">une</text:span><text:span text:style-name="T139"> </text:span><text:span text:style-name="T113">précision</text:span><text:span text:style-name="T136"> </text:span><text:span text:style-name="T113">de</text:span><text:span text:style-name="T137"> </text:span><text:span text:style-name="T113">97%,</text:span><text:span text:style-name="T136"> </text:span><text:span text:style-name="T113">ce</text:span><text:span text:style-name="T139"> </text:span><text:span text:style-name="T113">qui</text:span><text:span text:style-name="T136"> </text:span><text:span text:style-name="T113">indique</text:span><text:span text:style-name="T136"> </text:span><text:span text:style-name="T113">que</text:span><text:span text:style-name="T136"> </text:span><text:span text:style-name="T113">97%</text:span><text:span text:style-name="T139"> </text:span><text:span text:style-name="T113">des</text:span><text:span text:style-name="T136"> </text:span><text:span text:style-name="T113">prédictions</text:span><text:span text:style-name="T136"> </text:span><text:span text:style-name="T113">de churn sont correctes, fournissant ainsi des informations fiables pour la prise de décision.</text:span></text:p>
        </text:list-item>
        <text:list-item>
          <text:p text:style-name="P392" loext:marker-style-name="T113"><text:span text:style-name="T160">Sensibilité </text:span><text:span text:style-name="T113">: La sensibilité de notre modèle, également appelée rappel ou taux de vrais positifs, mesure</text:span><text:span text:style-name="T139"> </text:span><text:span text:style-name="T113">sa</text:span><text:span text:style-name="T139"> </text:span><text:span text:style-name="T113">capacité</text:span><text:span text:style-name="T139"> </text:span><text:span text:style-name="T113">à</text:span><text:span text:style-name="T139"> </text:span><text:span text:style-name="T113">détecter</text:span><text:span text:style-name="T140"> </text:span><text:span text:style-name="T113">correctement</text:span><text:span text:style-name="T136"> </text:span><text:span text:style-name="T113">les</text:span><text:span text:style-name="T136"> </text:span><text:span text:style-name="T113">clients</text:span><text:span text:style-name="T136"> </text:span><text:span text:style-name="T113">qui</text:span><text:span text:style-name="T136"> </text:span><text:span text:style-name="T113">vont</text:span><text:span text:style-name="T136"> </text:span><text:span text:style-name="T113">réellement</text:span><text:span text:style-name="T136"> </text:span><text:span text:style-name="T113">churner,</text:span><text:span text:style-name="T136"> </text:span><text:span text:style-name="T113">ce</text:span><text:span text:style-name="T139"> </text:span><text:span text:style-name="T113">qui</text:span><text:span text:style-name="T136"> </text:span><text:span text:style-name="T113">est</text:span><text:span text:style-name="T136"> </text:span><text:span text:style-name="T113">crucial pour anticiper et prévenir la perte de clients.</text:span></text:p>
        </text:list-item>
        <text:list-item>
          <text:p text:style-name="P393" loext:marker-style-name="T113"><text:span text:style-name="T160">Spécificité </text:span><text:span text:style-name="T113">: La spécificité, ou taux de vrais négatifs, mesure la capacité du modèle à identifier correctement</text:span><text:span text:style-name="T136"> </text:span><text:span text:style-name="T113">les</text:span><text:span text:style-name="T136"> </text:span><text:span text:style-name="T113">clients</text:span><text:span text:style-name="T136"> </text:span><text:span text:style-name="T113">qui</text:span><text:span text:style-name="T136"> </text:span><text:span text:style-name="T113">ne</text:span><text:span text:style-name="T136"> </text:span><text:span text:style-name="T113">churneront</text:span><text:span text:style-name="T136"> </text:span><text:span text:style-name="T113">pas,</text:span><text:span text:style-name="T136"> </text:span><text:span text:style-name="T113">assurant</text:span><text:span text:style-name="T136"> </text:span><text:span text:style-name="T113">ainsi</text:span><text:span text:style-name="T136"> </text:span><text:span text:style-name="T113">une</text:span><text:span text:style-name="T139"> </text:span><text:span text:style-name="T113">bonne</text:span><text:span text:style-name="T139"> </text:span><text:span text:style-name="T113">gestion</text:span><text:span text:style-name="T136"> </text:span><text:span text:style-name="T113">des</text:span><text:span text:style-name="T136"> </text:span><text:span text:style-name="T113">ressources</text:span><text:span text:style-name="T136"> </text:span><text:span text:style-name="T113">et</text:span><text:span text:style-name="T136"> </text:span><text:span text:style-name="T113">des actions de rétention.</text:span></text:p>
        </text:list-item>
      </text:list>
      <text:p text:style-name="P124"/>
      <text:list text:continue-list="list191358910060261" text:style-name="WWNum30">
        <text:list-item>
          <text:list>
            <text:list-item>
              <text:h text:style-name="P394" text:outline-level="4"><text:bookmark text:name="_bookmark61"/>Facteurs<text:span text:style-name="T40"> </text:span>Déterminants<text:span text:style-name="T43"> </text:span>de<text:span text:style-name="T39"> </text:span>la<text:span text:style-name="T40"> </text:span>Perte<text:span text:style-name="T40"> </text:span>de<text:span text:style-name="T42"> </text:span><text:span text:style-name="T39">Clients</text:span></text:h>
            </text:list-item>
          </text:list>
        </text:list-item>
      </text:list>
      <text:p text:style-name="P395">Nous avons identifié les principaux facteurs qui influencent la perte de clients dans le secteur des télécommunications.<text:span text:style-name="T40"> </text:span>Ces<text:span text:style-name="T40"> </text:span>facteurs<text:span text:style-name="T40"> </text:span>incluent<text:span text:style-name="T40"> </text:span>la<text:span text:style-name="T40"> </text:span>durée<text:span text:style-name="T47"> </text:span>du<text:span text:style-name="T40"> </text:span>contrat,<text:span text:style-name="T40"> </text:span>le<text:span text:style-name="T47"> </text:span>type<text:span text:style-name="T40"> </text:span>de<text:span text:style-name="T47"> </text:span>service,<text:span text:style-name="T40"> </text:span>les<text:span text:style-name="T40"> </text:span>charges<text:span text:style-name="T40"> </text:span>mensuelles,<text:span text:style-name="T40"> </text:span>et d'autres variables liées à l'expérience client et aux caractéristiques démographiques.</text:p>
      <text:p text:style-name="P396" loext:marker-style-name="T143"/>
      <text:p text:style-name="P397" loext:marker-style-name="T143"><draw:frame draw:style-name="fr4" draw:name="Image 31" text:anchor-type="as-char" svg:width="6.9752in" svg:height="3.7862in" draw:z-index="81"><draw:image xlink:href="Pictures/10000000000005F20000033A3580BB14.jpg" xlink:type="simple" xlink:show="embed" xlink:actuate="onLoad" draw:mime-type="image/jpeg"/></draw:frame></text:p>
      <text:section text:style-name="Sect4" text:name="Section6">
        <text:p text:style-name="P398" loext:marker-style-name="T169"/>
        <text:list xml:id="list3902866225" text:style-name="WWNum32">
          <text:list-item>
            <text:list>
              <text:list-item>
                <text:h text:style-name="P399" text:outline-level="4"><text:bookmark text:name="_bookmark62"/><text:bookmark text:name="_bookmark63"/>Limitations</text:h>
              </text:list-item>
            </text:list>
          </text:list-item>
        </text:list>
        <text:p text:style-name="P400" loext:marker-style-name="T144"><text:span text:style-name="T145">Figure</text:span><text:span text:style-name="T146"> </text:span><text:span text:style-name="T145">17</text:span><text:span text:style-name="T148"> </text:span><text:span text:style-name="T145">:</text:span><text:span text:style-name="T147"> </text:span><text:span text:style-name="T145">Facteurs</text:span><text:span text:style-name="T147"> </text:span><text:span text:style-name="T145">Déterminants</text:span><text:span text:style-name="T147"> </text:span><text:span text:style-name="T145">de</text:span><text:span text:style-name="T148"> </text:span><text:span text:style-name="T145">la</text:span><text:span text:style-name="T148"> </text:span><text:span text:style-name="T145">Perte</text:span><text:span text:style-name="T148"> </text:span><text:span text:style-name="T145">de</text:span><text:span text:style-name="T146"> </text:span><text:span text:style-name="T148">Clients</text:span></text:p>
      </text:section>
      <text:section text:style-name="Sect1" text:name="Section7">
        <text:p text:style-name="P401" loext:marker-style-name="T279"/>
        <text:p text:style-name="P402">Bien<text:span text:style-name="T40"> </text:span>que<text:span text:style-name="T40"> </text:span>notre<text:span text:style-name="T40"> </text:span>modèle ait<text:span text:style-name="T42"> </text:span>montré<text:span text:style-name="T40"> </text:span>de<text:span text:style-name="T39"> </text:span>bonnes<text:span text:style-name="T42"> </text:span>performances,<text:span text:style-name="T197"> </text:span>certaines<text:span text:style-name="T42"> </text:span>limitations<text:span text:style-name="T42"> </text:span>subsistent<text:span text:style-name="T42"> </text:span><text:span text:style-name="T41">:</text:span></text:p>
        <text:p text:style-name="P205"/>
        <text:list text:continue-list="list3375857179" text:style-name="WWNum31">
          <text:list-item>
            <text:p text:style-name="P403" loext:marker-style-name="T113"><text:soft-page-break/><text:span text:style-name="T160">Qualité et quantité des données </text:span><text:span text:style-name="T113">: La taille et la qualité du dataset peuvent influencer les performances</text:span><text:span text:style-name="T139"> </text:span><text:span text:style-name="T113">du</text:span><text:span text:style-name="T139"> </text:span><text:span text:style-name="T113">modèle.</text:span><text:span text:style-name="T137"> </text:span><text:span text:style-name="T113">Un</text:span><text:span text:style-name="T139"> </text:span><text:span text:style-name="T113">dataset</text:span><text:span text:style-name="T139"> </text:span><text:span text:style-name="T113">plus</text:span><text:span text:style-name="T139"> </text:span><text:span text:style-name="T113">grand</text:span><text:span text:style-name="T137"> </text:span><text:span text:style-name="T113">et</text:span><text:span text:style-name="T139"> </text:span><text:span text:style-name="T113">plus</text:span><text:span text:style-name="T139"> </text:span><text:span text:style-name="T113">varié</text:span><text:span text:style-name="T215"> </text:span><text:span text:style-name="T113">pourrait</text:span><text:span text:style-name="T139"> </text:span><text:span text:style-name="T113">améliorer</text:span><text:span text:style-name="T139"> </text:span><text:span text:style-name="T113">les</text:span><text:span text:style-name="T139"> </text:span><text:span text:style-name="T113">résultats.</text:span></text:p>
          </text:list-item>
        </text:list>
      </text:section>
      <text:list xml:id="list191359346929663" text:continue-numbering="true" text:style-name="WWNum31">
        <text:list-item>
          <text:p text:style-name="P404" loext:marker-style-name="T113"><text:span text:style-name="T160">Surapprentissage</text:span><text:span text:style-name="T164"> </text:span><text:span text:style-name="T113">:</text:span><text:span text:style-name="T136"> </text:span><text:span text:style-name="T113">Il</text:span><text:span text:style-name="T136"> </text:span><text:span text:style-name="T113">est</text:span><text:span text:style-name="T138"> </text:span><text:span text:style-name="T113">possible</text:span><text:span text:style-name="T136"> </text:span><text:span text:style-name="T113">que</text:span><text:span text:style-name="T140"> </text:span><text:span text:style-name="T113">le</text:span><text:span text:style-name="T136"> </text:span><text:span text:style-name="T113">modèle</text:span><text:span text:style-name="T136"> </text:span><text:span text:style-name="T113">soit</text:span><text:span text:style-name="T136"> </text:span><text:span text:style-name="T113">surajusté</text:span><text:span text:style-name="T139"> </text:span><text:span text:style-name="T113">aux</text:span><text:span text:style-name="T136"> </text:span><text:span text:style-name="T113">données</text:span><text:span text:style-name="T138"> </text:span><text:span text:style-name="T113">d'entraînement,</text:span><text:span text:style-name="T136"> </text:span><text:span text:style-name="T113">ce</text:span><text:span text:style-name="T139"> </text:span><text:span text:style-name="T113">qui pourrait limiter sa capacité à généraliser à de nouvelles données.</text:span></text:p>
        </text:list-item>
        <text:list-item>
          <text:p text:style-name="P405" loext:marker-style-name="T113"><text:span text:style-name="T160">Variables non prises en compte </text:span><text:span text:style-name="T113">: D'autres variables importantes, telles que les interactions des clients</text:span><text:span text:style-name="T136"> </text:span><text:span text:style-name="T113">avec</text:span><text:span text:style-name="T139"> </text:span><text:span text:style-name="T113">le</text:span><text:span text:style-name="T136"> </text:span><text:span text:style-name="T113">service</text:span><text:span text:style-name="T139"> </text:span><text:span text:style-name="T113">client</text:span><text:span text:style-name="T136"> </text:span><text:span text:style-name="T113">ou</text:span><text:span text:style-name="T136"> </text:span><text:span text:style-name="T113">des</text:span><text:span text:style-name="T136"> </text:span><text:span text:style-name="T113">données</text:span><text:span text:style-name="T138"> </text:span><text:span text:style-name="T113">externes</text:span><text:span text:style-name="T136"> </text:span><text:span text:style-name="T113">économiques,</text:span><text:span text:style-name="T136"> </text:span><text:span text:style-name="T113">n'ont</text:span><text:span text:style-name="T136"> </text:span><text:span text:style-name="T113">pas</text:span><text:span text:style-name="T136"> </text:span><text:span text:style-name="T113">été</text:span><text:span text:style-name="T136"> </text:span><text:span text:style-name="T113">incluses</text:span><text:span text:style-name="T136"> </text:span><text:span text:style-name="T113">dans</text:span><text:span text:style-name="T136"> </text:span><text:span text:style-name="T113">le </text:span><text:span text:style-name="T137">modèle.</text:span></text:p>
        </text:list-item>
      </text:list>
      <text:p text:style-name="P124"/>
      <text:list xml:id="list191358935543722" text:continue-list="list3902866225" text:style-name="WWNum32">
        <text:list-item>
          <text:list>
            <text:list-item>
              <text:h text:style-name="P406" text:outline-level="4"><text:bookmark text:name="_bookmark64"/>Pistes<text:span text:style-name="T39"> d'Amélioration</text:span></text:h>
            </text:list-item>
          </text:list>
        </text:list-item>
      </text:list>
      <text:p text:style-name="P407">Pour<text:span text:style-name="T42"> </text:span>améliorer<text:span text:style-name="T42"> </text:span>notre<text:span text:style-name="T42"> </text:span>modèle<text:span text:style-name="T39"> </text:span>et ses<text:span text:style-name="T42"> </text:span>prédictions,<text:span text:style-name="T42"> </text:span>nous proposons<text:span text:style-name="T42"> </text:span>les pistes<text:span text:style-name="T42"> </text:span>suivantes <text:span text:style-name="T41">:</text:span></text:p>
      <text:p text:style-name="P142"/>
      <text:list text:continue-list="list191359346929663" text:style-name="WWNum31">
        <text:list-item>
          <text:p text:style-name="P408" loext:marker-style-name="T113"><text:span text:style-name="T160">Augmenter</text:span><text:span text:style-name="T165"> </text:span><text:span text:style-name="T160">la</text:span><text:span text:style-name="T164"> </text:span><text:span text:style-name="T160">taille</text:span><text:span text:style-name="T164"> </text:span><text:span text:style-name="T160">du</text:span><text:span text:style-name="T163"> </text:span><text:span text:style-name="T160">dataset</text:span><text:span text:style-name="T162"> </text:span><text:span text:style-name="T113">:</text:span><text:span text:style-name="T136"> </text:span><text:span text:style-name="T113">Utiliser</text:span><text:span text:style-name="T136"> </text:span><text:span text:style-name="T113">un</text:span><text:span text:style-name="T136"> </text:span><text:span text:style-name="T113">dataset</text:span><text:span text:style-name="T136"> </text:span><text:span text:style-name="T113">plus</text:span><text:span text:style-name="T136"> </text:span><text:span text:style-name="T113">large</text:span><text:span text:style-name="T140"> </text:span><text:span text:style-name="T113">et</text:span><text:span text:style-name="T136"> </text:span><text:span text:style-name="T113">plus</text:span><text:span text:style-name="T136"> </text:span><text:span text:style-name="T113">diversifié</text:span><text:span text:style-name="T140"> </text:span><text:span text:style-name="T113">pourrait</text:span><text:span text:style-name="T136"> </text:span><text:span text:style-name="T113">améliorer les performances du modèle.</text:span></text:p>
        </text:list-item>
        <text:list-item>
          <text:p text:style-name="P409" loext:marker-style-name="T113"><text:span text:style-name="T160">Inclure</text:span><text:span text:style-name="T163"> </text:span><text:span text:style-name="T160">des</text:span><text:span text:style-name="T165"> </text:span><text:span text:style-name="T160">variables</text:span><text:span text:style-name="T165"> </text:span><text:span text:style-name="T160">supplémentaires</text:span><text:span text:style-name="T162"> </text:span><text:span text:style-name="T113">:</text:span><text:span text:style-name="T139"> </text:span><text:span text:style-name="T113">Intégrer</text:span><text:span text:style-name="T136"> </text:span><text:span text:style-name="T113">des</text:span><text:span text:style-name="T139"> </text:span><text:span text:style-name="T113">variables</text:span><text:span text:style-name="T136"> </text:span><text:span text:style-name="T113">additionnelles</text:span><text:span text:style-name="T139"> </text:span><text:span text:style-name="T113">telles</text:span><text:span text:style-name="T139"> </text:span><text:span text:style-name="T113">que</text:span><text:span text:style-name="T215"> </text:span><text:span text:style-name="T113">les interactions clients ou des données économiques pour enrichir le modèle.</text:span></text:p>
        </text:list-item>
        <text:list-item>
          <text:p text:style-name="P410" loext:marker-style-name="T113"><text:span text:style-name="T160">Techniques avancées de traitement de données </text:span><text:span text:style-name="T113">: Appliquer des techniques avancées de prétraitement</text:span><text:span text:style-name="T139"> </text:span><text:span text:style-name="T113">des</text:span><text:span text:style-name="T139"> </text:span><text:span text:style-name="T113">données</text:span><text:span text:style-name="T139"> </text:span><text:span text:style-name="T113">pour</text:span><text:span text:style-name="T139"> </text:span><text:span text:style-name="T113">mieux</text:span><text:span text:style-name="T139"> </text:span><text:span text:style-name="T113">gérer</text:span><text:span text:style-name="T139"> </text:span><text:span text:style-name="T113">les</text:span><text:span text:style-name="T139"> </text:span><text:span text:style-name="T113">valeurs</text:span><text:span text:style-name="T139"> </text:span><text:span text:style-name="T113">manquantes</text:span><text:span text:style-name="T139"> </text:span><text:span text:style-name="T113">et</text:span><text:span text:style-name="T139"> </text:span><text:span text:style-name="T113">les</text:span><text:span text:style-name="T139"> </text:span><text:span text:style-name="T113">variables</text:span><text:span text:style-name="T139"> </text:span><text:span text:style-name="T113">aberrantes.</text:span></text:p>
        </text:list-item>
        <text:list-item>
          <text:p text:style-name="P411" loext:marker-style-name="T113"><text:span text:style-name="T160">Optimisation</text:span><text:span text:style-name="T165"> </text:span><text:span text:style-name="T160">des</text:span><text:span text:style-name="T165"> </text:span><text:span text:style-name="T160">hyperparamètres</text:span><text:span text:style-name="T162"> </text:span><text:span text:style-name="T113">:</text:span><text:span text:style-name="T139"> </text:span><text:span text:style-name="T113">Utiliser</text:span><text:span text:style-name="T139"> </text:span><text:span text:style-name="T113">des</text:span><text:span text:style-name="T139"> </text:span><text:span text:style-name="T113">méthodes</text:span><text:span text:style-name="T139"> </text:span><text:span text:style-name="T113">d'optimisation</text:span><text:span text:style-name="T139"> </text:span><text:span text:style-name="T113">avancées</text:span><text:span text:style-name="T139"> </text:span><text:span text:style-name="T113">pour</text:span><text:span text:style-name="T136"> </text:span><text:span text:style-name="T113">ajuster</text:span><text:span text:style-name="T139"> </text:span><text:span text:style-name="T113">les hyperparamètres des modèles.</text:span></text:p>
        </text:list-item>
      </text:list>
      <text:p text:style-name="P202"/>
      <text:list text:continue-list="list191358935543722" text:style-name="WWNum32">
        <text:list-item>
          <text:list>
            <text:list-item>
              <text:h text:style-name="P399" text:outline-level="4"><text:bookmark text:name="_bookmark65"/>Conclusion</text:h>
            </text:list-item>
          </text:list>
        </text:list-item>
      </text:list>
      <text:p text:style-name="P412">Ce<text:span text:style-name="T40"> </text:span>chapitre<text:span text:style-name="T39"> </text:span>a<text:span text:style-name="T40"> </text:span>présenté<text:span text:style-name="T39"> </text:span>une<text:span text:style-name="T40"> </text:span>analyse<text:span text:style-name="T39"> </text:span>détaillée<text:span text:style-name="T40"> </text:span>des résultats<text:span text:style-name="T39"> </text:span>de<text:span text:style-name="T39"> </text:span>notre<text:span text:style-name="T47"> </text:span>modèle<text:span text:style-name="T40"> </text:span>de<text:span text:style-name="T40"> </text:span>prédiction<text:span text:style-name="T39"> </text:span>de<text:span text:style-name="T39"> </text:span>la<text:span text:style-name="T40"> </text:span>perte<text:span text:style-name="T47"> </text:span>de<text:span text:style-name="T40"> </text:span>clients. Malgré<text:span text:style-name="T42"> </text:span>les bonnes performances globales du modèle RandomForestClassifier, des limitations existent et des améliorations sont possibles. En suivant les pistes d'amélioration proposées, nous espérons développer un modèle encore plus précis et robuste pour aider les entreprises de télécommunications à mieux comprendre et prédire la perte de clients, et ainsi mettre en place des stratégies de rétention efficaces.</text:p>
      <text:h text:style-name="P413" text:outline-level="2"><text:bookmark text:name="_bookmark66"/>Conclusion<text:span text:style-name="T131"> </text:span>et<text:span text:style-name="T16"> </text:span><text:span text:style-name="T39">perspectives</text:span></text:h>
      <text:p text:style-name="P66" loext:marker-style-name="T50"/>
      <text:p text:style-name="P414" loext:marker-style-name="T50"/>
      <text:p text:style-name="P415" loext:marker-style-name="T284"><text:span text:style-name="T284">En conclusion, notre étude a mis en lumière l'importance de développer des modèles de prédiction du churn des clients pour les entreprises de télécommunications. Nous avons réussi</text:span><text:span text:style-name="T285"> </text:span><text:span text:style-name="T284">à</text:span><text:span text:style-name="T286"> </text:span><text:span text:style-name="T284">élaborer</text:span><text:span text:style-name="T287"> </text:span><text:span text:style-name="T284">un</text:span><text:span text:style-name="T285"> </text:span><text:span text:style-name="T284">modèle</text:span><text:span text:style-name="T287"> </text:span><text:span text:style-name="T284">précis</text:span><text:span text:style-name="T285"> </text:span><text:span text:style-name="T284">basé</text:span><text:span text:style-name="T288"> </text:span><text:span text:style-name="T284">sur</text:span><text:span text:style-name="T287"> </text:span><text:span text:style-name="T284">l'algorithme</text:span><text:span text:style-name="T287"> </text:span><text:span text:style-name="T284">RandomForestClassifier,</text:span><text:span text:style-name="T289"> </text:span><text:span text:style-name="T284">offrant ainsi une solution prometteuse pour anticiper et gérer le churn.</text:span></text:p>
      <text:p text:style-name="P416" loext:marker-style-name="T284"><text:span text:style-name="T284">Nos résultats démontrent que la prédiction du churn est réalisable avec un haut niveau de précision,</text:span><text:span text:style-name="T286"> </text:span><text:span text:style-name="T284">ce</text:span><text:span text:style-name="T288"> </text:span><text:span text:style-name="T284">qui</text:span><text:span text:style-name="T288"> </text:span><text:span text:style-name="T284">peut</text:span><text:span text:style-name="T286"> </text:span><text:span text:style-name="T284">aider</text:span><text:span text:style-name="T286"> </text:span><text:span text:style-name="T284">les</text:span><text:span text:style-name="T285"> </text:span><text:span text:style-name="T284">opérateurs</text:span><text:span text:style-name="T285"> </text:span><text:span text:style-name="T284">à</text:span><text:span text:style-name="T288"> </text:span><text:span text:style-name="T284">prendre</text:span><text:span text:style-name="T287"> </text:span><text:span text:style-name="T284">des</text:span><text:span text:style-name="T285"> </text:span><text:span text:style-name="T284">mesures</text:span><text:span text:style-name="T290"> </text:span><text:span text:style-name="T284">proactives</text:span><text:span text:style-name="T285"> </text:span><text:span text:style-name="T284">pour</text:span><text:span text:style-name="T287"> </text:span><text:span text:style-name="T284">retenir</text:span><text:span text:style-name="T287"> </text:span><text:span text:style-name="T284">leurs clients et maintenir leur rentabilité. Cependant, plusieurs perspectives peuvent être envisagées pour améliorer encore notre modèle et ses applications pratiques :</text:span></text:p>
      <text:list text:style-name="WWNum33">
        <text:list-item>
          <text:p text:style-name="P417" loext:marker-style-name="T284"><text:span text:style-name="T291">Optimisation continue du modèle : </text:span><text:span text:style-name="T284">Nous pouvons explorer de nouvelles techniques d'apprentissage</text:span><text:span text:style-name="T288"> </text:span><text:span text:style-name="T284">automatique,</text:span><text:span text:style-name="T289"> </text:span><text:span text:style-name="T284">ajuster</text:span><text:span text:style-name="T288"> </text:span><text:span text:style-name="T284">les</text:span><text:span text:style-name="T292"> </text:span><text:span text:style-name="T284">hyperparamètres</text:span><text:span text:style-name="T290"> </text:span><text:span text:style-name="T284">et</text:span><text:span text:style-name="T290"> </text:span><text:span text:style-name="T284">tester</text:span><text:span text:style-name="T288"> </text:span><text:span text:style-name="T284">d'autres</text:span><text:span text:style-name="T290"> </text:span><text:span text:style-name="T284">algorithmes pour améliorer encore la précision de notre modèle.</text:span></text:p>
        </text:list-item>
        <text:list-item>
          <text:p text:style-name="P418" loext:marker-style-name="T284"><text:span text:style-name="T291">Intégration de données supplémentaires : </text:span><text:span text:style-name="T284">En incorporant des données supplémentaires telles que les interactions des clients avec le service client, les historiques</text:span><text:span text:style-name="T287"> </text:span><text:span text:style-name="T284">de</text:span><text:span text:style-name="T286"> </text:span><text:span text:style-name="T284">paiement,</text:span><text:span text:style-name="T290"> </text:span><text:span text:style-name="T284">etc.,</text:span><text:span text:style-name="T290"> </text:span><text:span text:style-name="T284">nous</text:span><text:span text:style-name="T287"> </text:span><text:span text:style-name="T284">pourrions</text:span><text:span text:style-name="T287"> </text:span><text:span text:style-name="T284">améliorer</text:span><text:span text:style-name="T289"> </text:span><text:span text:style-name="T284">la</text:span><text:span text:style-name="T286"> </text:span><text:span text:style-name="T284">qualité</text:span><text:span text:style-name="T286"> </text:span><text:span text:style-name="T284">de</text:span><text:span text:style-name="T286"> </text:span><text:span text:style-name="T284">la</text:span><text:span text:style-name="T286"> </text:span><text:span text:style-name="T284">prédiction.</text:span></text:p>
        </text:list-item>
        <text:list-item>
          <text:p text:style-name="P419" loext:marker-style-name="T284"><text:span text:style-name="T291">Interprétabilité du modèle : </text:span><text:span text:style-name="T284">Il est crucial de rendre notre modèle plus compréhensible</text:span><text:span text:style-name="T286"> </text:span><text:span text:style-name="T284">afin</text:span><text:span text:style-name="T289"> </text:span><text:span text:style-name="T284">que</text:span><text:span text:style-name="T286"> </text:span><text:span text:style-name="T284">les</text:span><text:span text:style-name="T287"> </text:span><text:span text:style-name="T284">décideurs</text:span><text:span text:style-name="T287"> </text:span><text:span text:style-name="T284">puissent</text:span><text:span text:style-name="T287"> </text:span><text:span text:style-name="T284">comprendre</text:span><text:span text:style-name="T289"> </text:span><text:span text:style-name="T284">les</text:span><text:span text:style-name="T287"> </text:span><text:span text:style-name="T284">raisons</text:span><text:span text:style-name="T289"> </text:span><text:span text:style-name="T284">derrière</text:span><text:span text:style-name="T286"> </text:span><text:span text:style-name="T284">les prédictions de churn et prendre des décisions éclairées.</text:span></text:p>
        </text:list-item>
        <text:list-item>
          <text:p text:style-name="P420" loext:marker-style-name="T284"><text:span text:style-name="T291">Analyse</text:span><text:span text:style-name="T293"> </text:span><text:span text:style-name="T291">en</text:span><text:span text:style-name="T294"> </text:span><text:span text:style-name="T291">temps</text:span><text:span text:style-name="T295"> </text:span><text:span text:style-name="T291">réel</text:span><text:span text:style-name="T295"> </text:span><text:span text:style-name="T291">:</text:span><text:span text:style-name="T295"> </text:span><text:span text:style-name="T284">Développer</text:span><text:span text:style-name="T288"> </text:span><text:span text:style-name="T284">des</text:span><text:span text:style-name="T285"> </text:span><text:span text:style-name="T284">capacités</text:span><text:span text:style-name="T290"> </text:span><text:span text:style-name="T284">d'analyse</text:span><text:span text:style-name="T287"> </text:span><text:span text:style-name="T284">en</text:span><text:span text:style-name="T285"> </text:span><text:span text:style-name="T284">temps</text:span><text:span text:style-name="T285"> </text:span><text:span text:style-name="T284">réel</text:span><text:span text:style-name="T288"> </text:span><text:span text:style-name="T284">pour détecter rapidement les signes de churn et</text:span><text:span text:style-name="T287"> </text:span><text:span text:style-name="T284">permettre</text:span><text:span text:style-name="T286"> </text:span><text:span text:style-name="T284">une</text:span><text:span text:style-name="T287"> </text:span><text:span text:style-name="T284">intervention</text:span><text:span text:style-name="T286"> </text:span><text:span text:style-name="T284">proactive.</text:span></text:p>
        </text:list-item>
        <text:list-item>
          <text:p text:style-name="P421" loext:marker-style-name="T284"><text:span text:style-name="T291">Étude de l'impact des actions de rétention : </text:span><text:span text:style-name="T284">Évaluer l'efficacité des stratégies de rétention</text:span><text:span text:style-name="T285"> </text:span><text:span text:style-name="T284">mises</text:span><text:span text:style-name="T285"> </text:span><text:span text:style-name="T284">en</text:span><text:span text:style-name="T288"> </text:span><text:span text:style-name="T284">place</text:span><text:span text:style-name="T287"> </text:span><text:span text:style-name="T284">à</text:span><text:span text:style-name="T287"> </text:span><text:span text:style-name="T284">partir</text:span><text:span text:style-name="T287"> </text:span><text:span text:style-name="T284">des</text:span><text:span text:style-name="T285"> </text:span><text:span text:style-name="T284">prédictions</text:span><text:span text:style-name="T285"> </text:span><text:span text:style-name="T284">du</text:span><text:span text:style-name="T285"> </text:span><text:span text:style-name="T284">modèle</text:span><text:span text:style-name="T287"> </text:span><text:span text:style-name="T284">et</text:span><text:span text:style-name="T285"> </text:span><text:span text:style-name="T284">ajuster</text:span><text:span text:style-name="T287"> </text:span><text:span text:style-name="T284">ces</text:span><text:span text:style-name="T288"> </text:span><text:span text:style-name="T284">stratégies</text:span><text:span text:style-name="T285"> </text:span><text:span text:style-name="T284">en </text:span><text:span text:style-name="T285">conséquence.</text:span></text:p>
        </text:list-item>
      </text:list>
      <text:p text:style-name="P422" loext:marker-style-name="T284"><text:span text:style-name="T284">Enfin, notre recherche souligne l'importance continue de l'analyse des données et de l'intelligence artificielle dans la gestion des entreprises, en particulier dans le domaine des télécommunications. En poursuivant nos efforts dans cette direction, nous pouvons contribuer</text:span><text:span text:style-name="T287"> </text:span><text:span text:style-name="T284">à</text:span><text:span text:style-name="T286"> </text:span><text:span text:style-name="T284">réduire</text:span><text:span text:style-name="T287"> </text:span><text:span text:style-name="T284">le</text:span><text:span text:style-name="T287"> </text:span><text:span text:style-name="T284">churn</text:span><text:span text:style-name="T290"> </text:span><text:span text:style-name="T284">des</text:span><text:span text:style-name="T285"> </text:span><text:span text:style-name="T284">clients,</text:span><text:span text:style-name="T286"> </text:span><text:span text:style-name="T284">améliorer</text:span><text:span text:style-name="T287"> </text:span><text:span text:style-name="T284">la</text:span><text:span text:style-name="T288"> </text:span><text:span text:style-name="T284">satisfaction</text:span><text:span text:style-name="T285"> </text:span><text:span text:style-name="T284">des</text:span><text:span text:style-name="T285"> </text:span><text:span text:style-name="T284">clients</text:span><text:span text:style-name="T285"> </text:span><text:span text:style-name="T284">et</text:span><text:span text:style-name="T285"> </text:span><text:span text:style-name="T284">renforcer</text:span><text:span text:style-name="T287"> </text:span><text:span text:style-name="T284">la compétitivité des entreprises.</text:span></text:p>
      <text:h text:style-name="P423" text:outline-level="2"><text:bookmark text:name="_bookmark67"/>Bibliographie<text:span text:style-name="T296"> </text:span>&amp;<text:span text:style-name="T49"> </text:span><text:span text:style-name="T39">Webographie</text:span></text:h>
      <text:p text:style-name="P424" loext:marker-style-name="T297"><text:span text:style-name="T297">Voici</text:span><text:span text:style-name="T298"> </text:span><text:span text:style-name="T297">la</text:span><text:span text:style-name="T299"> </text:span><text:span text:style-name="T297">liste</text:span><text:span text:style-name="T300"> </text:span><text:span text:style-name="T297">des</text:span><text:span text:style-name="T301"> </text:span><text:span text:style-name="T297">références</text:span><text:span text:style-name="T301"> </text:span><text:span text:style-name="T297">bibliographiques</text:span><text:span text:style-name="T301"> </text:span><text:span text:style-name="T297">utilisées</text:span><text:span text:style-name="T301"> </text:span><text:span text:style-name="T297">dans</text:span><text:span text:style-name="T299"> </text:span><text:span text:style-name="T297">ce</text:span><text:span text:style-name="T302"> </text:span><text:span text:style-name="T297">rapport</text:span><text:span text:style-name="T301"> </text:span><text:span text:style-name="T298">:</text:span></text:p>
      <text:list text:style-name="WWNum34">
        <text:list-item>
          <text:p text:style-name="P425" loext:marker-style-name="T297"><text:span text:style-name="T297">Google</text:span><text:span text:style-name="T301"> </text:span><text:span text:style-name="T297">Scholar</text:span><text:span text:style-name="T303"> </text:span><text:span text:style-name="T297">-</text:span><text:span text:style-name="T301"> </text:span><text:span text:style-name="T297">Prédiction</text:span><text:span text:style-name="T299"> </text:span><text:span text:style-name="T297">du</text:span><text:span text:style-name="T299"> </text:span><text:span text:style-name="T297">churn</text:span><text:span text:style-name="T299"> </text:span><text:span text:style-name="T297">des</text:span><text:span text:style-name="T303"> </text:span><text:span text:style-name="T304">clients</text:span></text:p>
        </text:list-item>
        <text:list-item>
          <text:p text:style-name="P426" loext:marker-style-name="T297"><text:span text:style-name="T304">Ooredoo</text:span><text:span text:style-name="T304"/></text:p>
        </text:list-item>
        <text:list-item>
          <text:p text:style-name="P427" loext:marker-style-name="T297"><text:span text:style-name="T302">ASJP</text:span><text:span text:style-name="T302"/></text:p>
        </text:list-item>
        <text:list-item>
          <text:p text:style-name="P427" loext:marker-style-name="T297"><text:span text:style-name="T304">Wizishop</text:span><text:span text:style-name="T304"/></text:p>
        </text:list-item>
        <text:list-item>
          <text:p text:style-name="P427" loext:marker-style-name="T297"><text:span text:style-name="T304">InMoment</text:span><text:span text:style-name="T304"/></text:p>
        </text:list-item>
        <text:list-item>
          <text:p text:style-name="P428" loext:marker-style-name="T297"><text:span text:style-name="T304">Harvestr</text:span><text:span text:style-name="T304"/></text:p>
        </text:list-item>
        <text:list-item>
          <text:p text:style-name="P427" loext:marker-style-name="T297"><text:span text:style-name="T304">Custup</text:span><text:span text:style-name="T304"/></text:p>
        </text:list-item>
        <text:list-item>
          <text:p text:style-name="P427" loext:marker-style-name="T297"><text:span text:style-name="T304">OpenThesis</text:span><text:span text:style-name="T304"/></text:p>
        </text:list-item>
        <text:list-item>
          <text:p text:style-name="P427" loext:marker-style-name="T297"><text:span text:style-name="T297">WorldCat</text:span><text:span text:style-name="T305"> </text:span><text:span text:style-name="T297">Dissertations</text:span><text:span text:style-name="T306"> </text:span><text:span text:style-name="T297">and</text:span><text:span text:style-name="T305"> </text:span><text:span text:style-name="T304">Theses</text:span></text:p>
        </text:list-item>
        <text:list-item>
          <text:p text:style-name="P429" loext:marker-style-name="T297"><text:span text:style-name="T297">DART-Europe</text:span><text:span text:style-name="T307"> </text:span><text:span text:style-name="T297">E-theses</text:span><text:span text:style-name="T308"> </text:span><text:span text:style-name="T304">Portal</text:span></text:p>
        </text:list-item>
        <text:list-item>
          <text:p text:style-name="P430" loext:marker-style-name="T297"><text:span text:style-name="T297">BASE</text:span><text:span text:style-name="T309"> </text:span><text:span text:style-name="T297">(Bielefeld</text:span><text:span text:style-name="T309"> </text:span><text:span text:style-name="T297">Academic</text:span><text:span text:style-name="T309"> </text:span><text:span text:style-name="T297">Search</text:span><text:span text:style-name="T309"> </text:span><text:span text:style-name="T304">Engine)</text:span></text:p>
        </text:list-item>
        <text:list-item>
          <text:p text:style-name="P430" loext:marker-style-name="T297"><text:span text:style-name="T297">OATD</text:span><text:span text:style-name="T298"> </text:span><text:span text:style-name="T297">(Open</text:span><text:span text:style-name="T299"> </text:span><text:span text:style-name="T297">Access</text:span><text:span text:style-name="T301"> </text:span><text:span text:style-name="T297">Theses</text:span><text:span text:style-name="T309"> </text:span><text:span text:style-name="T297">and</text:span><text:span text:style-name="T300"> </text:span><text:span text:style-name="T304">Dissertations)</text:span></text:p>
        </text:list-item>
        <text:list-item>
          <text:p text:style-name="P430" loext:marker-style-name="T297"><text:span text:style-name="T297">Networked</text:span><text:span text:style-name="T305"> </text:span><text:span text:style-name="T297">Digital</text:span><text:span text:style-name="T309"> </text:span><text:span text:style-name="T297">Library</text:span><text:span text:style-name="T305"> </text:span><text:span text:style-name="T297">of</text:span><text:span text:style-name="T306"> </text:span><text:span text:style-name="T297">Theses</text:span><text:span text:style-name="T298"> </text:span><text:span text:style-name="T297">and</text:span><text:span text:style-name="T298"> </text:span><text:span text:style-name="T297">Dissertations</text:span><text:span text:style-name="T306"> </text:span><text:span text:style-name="T304">(NDLTD)</text:span></text:p>
        </text:list-item>
        <text:list-item>
          <text:p text:style-name="P430" loext:marker-style-name="T297"><text:span text:style-name="T297">ProQuest</text:span><text:span text:style-name="T308"> </text:span><text:span text:style-name="T297">Dissertations</text:span><text:span text:style-name="T298"> </text:span><text:span text:style-name="T297">&amp;</text:span><text:span text:style-name="T306"> </text:span><text:span text:style-name="T297">Theses</text:span><text:span text:style-name="T298"> </text:span><text:span text:style-name="T302">Open</text:span></text:p>
        </text:list-item>
        <text:list-item>
          <text:p text:style-name="P429" loext:marker-style-name="T297"><text:span text:style-name="T297">EThOS</text:span><text:span text:style-name="T306"> </text:span><text:span text:style-name="T297">(Electronic</text:span><text:span text:style-name="T298"> </text:span><text:span text:style-name="T297">Theses</text:span><text:span text:style-name="T306"> </text:span><text:span text:style-name="T297">Online</text:span><text:span text:style-name="T306"> </text:span><text:span text:style-name="T304">Service)</text:span></text:p>
        </text:list-item>
        <text:list-item>
          <text:p text:style-name="P430" loext:marker-style-name="T297"><text:span text:style-name="T297">Open</text:span><text:span text:style-name="T309"> </text:span><text:span text:style-name="T297">Access</text:span><text:span text:style-name="T298"> </text:span><text:span text:style-name="T297">Theses</text:span><text:span text:style-name="T298"> </text:span><text:span text:style-name="T297">and</text:span><text:span text:style-name="T309"> </text:span><text:span text:style-name="T297">Dissertations</text:span><text:span text:style-name="T301"> </text:span><text:span text:style-name="T304">(OATD)</text:span></text:p>
        </text:list-item>
        <text:list-item>
          <text:p text:style-name="P430" loext:marker-style-name="T297"><text:span text:style-name="T302">Core</text:span><text:span text:style-name="T302"/></text:p>
        </text:list-item>
        <text:list-item>
          <text:p text:style-name="P431" loext:marker-style-name="T297"><text:span text:style-name="T304">kaggle</text:span><text:span text:style-name="T304"/></text:p>
        </text:list-item>
      </text:list>
      <text:p text:style-name="P432" loext:marker-style-name="T297"><text:span text:style-name="T297">Ces références ont été consultées pour la collecte de données, la recherche d'informations pertinentes</text:span><text:span text:style-name="T300"> </text:span><text:span text:style-name="T297">et</text:span><text:span text:style-name="T302"> </text:span><text:span text:style-name="T297">l'analyse</text:span><text:span text:style-name="T302"> </text:span><text:span text:style-name="T297">des</text:span><text:span text:style-name="T300"> </text:span><text:span text:style-name="T297">travaux</text:span><text:span text:style-name="T302"> </text:span><text:span text:style-name="T297">existants</text:span><text:span text:style-name="T302"> </text:span><text:span text:style-name="T297">dans</text:span><text:span text:style-name="T302"> </text:span><text:span text:style-name="T297">le</text:span><text:span text:style-name="T302"> </text:span><text:span text:style-name="T297">domaine</text:span><text:span text:style-name="T302"> </text:span><text:span text:style-name="T297">de</text:span><text:span text:style-name="T302"> </text:span><text:span text:style-name="T297">la prédiction</text:span><text:span text:style-name="T302"> </text:span><text:span text:style-name="T297">du</text:span><text:span text:style-name="T302"> </text:span><text:span text:style-name="T297">churn</text:span><text:span text:style-name="T302"> </text:span><text:span text:style-name="T297">des </text:span><text:span text:style-name="T304">cli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lef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class="index">
      <style:paragraph-properties fo:margin-left="0.1063in" fo:margin-top="0.0835in" fo:margin-bottom="0in" style:contextual-spacing="false"/>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2" style:display-name="Contents 2" style:family="paragraph" style:parent-style-name="Standard" style:class="index">
      <style:paragraph-properties fo:margin-left="0.1063in" fo:margin-top="0.0835in" fo:margin-bottom="0in" style:contextual-spacing="false"/>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3" style:display-name="Contents 3" style:family="paragraph" style:parent-style-name="Standard" style:class="index">
      <style:paragraph-properties fo:margin-left="0.4898in" fo:margin-top="0.0835in" fo:margin-bottom="0in" style:contextual-spacing="false" fo:text-indent="-0.2299in" style:auto-text-indent="false"/>
      <style:text-properties style:font-name="Times New Roman" fo:font-family="'Times New Roman'"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chapter">
      <style:paragraph-properties fo:margin-left="2.2728in" fo:margin-right="2.4681in" fo:margin-top="0.0362in" fo:margin-bottom="0in" style:contextual-spacing="false" fo:text-align="center" style:justify-single-word="false"/>
      <style:text-properties style:font-name="Times New Roman" fo:font-family="'Times New Roman'" style:font-family-generic="roman" style:font-pitch="variable" fo:font-size="22pt" fo:language="fr" fo:country="FR" fo:font-weight="bold" style:font-name-asian="Times New Roman1" style:font-family-asian="'Times New Roman'" style:font-family-generic-asian="system" style:font-pitch-asian="variable" style:font-size-asian="22pt" style:language-asian="en" style:country-asian="US" style:font-weight-asian="bold" style:font-name-complex="Times New Roman1" style:font-family-complex="'Times New Roman'" style:font-family-generic-complex="system" style:font-pitch-complex="variable" style:font-size-complex="22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4929in" fo:margin-top="0.0382in" fo:margin-bottom="0in" style:contextual-spacing="false"/>
      <style:text-properties style:font-name="Times New Roman" fo:font-family="'Times New Roman'" style:font-family-generic="roman" style:font-pitch="variable" fo:font-size="20pt" fo:language="fr" fo:country="FR" style:text-underline-style="solid" style:text-underline-width="auto" style:text-underline-color="#000000"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style>
    <style:style style:name="Heading_20_3" style:display-name="Heading 3" style:family="paragraph" style:parent-style-name="Standard" style:default-outline-level="4" style:list-style-name="" style:class="chapter">
      <style:paragraph-properties fo:margin-left="0.911in" fo:text-indent="-0.3126in" style:auto-text-indent="false"/>
      <style:text-properties style:font-name="Times New Roman" fo:font-family="'Times New Roman'" style:font-family-generic="roman" style:font-pitch="variable" fo:font-size="15pt" fo:language="fr" fo:country="FR" fo:font-weight="bold" style:font-name-asian="Times New Roman1" style:font-family-asian="'Times New Roman'" style:font-family-generic-asian="system" style:font-pitch-asian="variable" style:font-size-asian="15pt" style:language-asian="en" style:country-asian="US" style:font-weight-asian="bold" style:font-name-complex="Times New Roman1" style:font-family-complex="'Times New Roman'" style:font-family-generic-complex="system" style:font-pitch-complex="variable" style:font-size-complex="15pt" style:language-complex="ar" style:country-complex="SA" style:font-weight-complex="bold"/>
    </style:style>
    <style:style style:name="Heading_20_4" style:display-name="Heading 4" style:family="paragraph" style:parent-style-name="Standard" style:default-outline-level="5" style:list-style-name="" style:class="chapter">
      <style:paragraph-properties fo:margin-left="0.2417in" fo:text-indent="-0.4673in" style:auto-text-indent="false"/>
      <style:text-properties style:font-name="Times New Roman" fo:font-family="'Times New Roman'" style:font-family-generic="roman" style:font-pitch="variable" fo:font-size="14pt" fo:language="fr" fo:country="FR"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6" style:list-style-name="" style:class="chapter">
      <style:paragraph-properties fo:margin-left="0.4346in" fo:margin-top="0.0846in" fo:margin-bottom="0in" style:contextual-spacing="false" fo:text-indent="-0.25in" style:auto-text-indent="false"/>
      <style:text-properties style:font-name="Times New Roman" fo:font-family="'Times New Roman'" style:font-family-generic="roman" style:font-pitch="variable" fo:font-size="13pt" fo:language="fr" fo:country="FR"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Heading_20_6" style:display-name="Heading 6" style:family="paragraph" style:parent-style-name="Standard" style:default-outline-level="7" style:list-style-name="" style:class="chapter">
      <style:paragraph-properties fo:margin-left="0.1063in"/>
      <style:text-properties style:font-name="Times New Roman" fo:font-family="'Times New Roman'" style:font-family-generic="roman" style:font-pitch="variable" fo:font-size="12pt" fo:language="fr" fo:country="FR"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right="0.2in" fo:margin-top="0.0008in" fo:margin-bottom="0in" style:contextual-spacing="false" fo:text-align="center" style:justify-single-word="false"/>
      <style:text-properties style:font-name="Times New Roman" fo:font-family="'Times New Roman'" style:font-family-generic="roman" style:font-pitch="variable" fo:font-size="36pt" fo:language="fr" fo:country="FR" fo:font-style="italic" style:font-name-asian="Times New Roman1" style:font-family-asian="'Times New Roman'" style:font-family-generic-asian="system" style:font-pitch-asian="variable" style:font-size-asian="36pt" style:language-asian="en" style:country-asian="US" style:font-style-asian="italic" style:font-name-complex="Times New Roman1" style:font-family-complex="'Times New Roman'" style:font-family-generic-complex="system" style:font-pitch-complex="variable" style:font-size-complex="36pt" style:language-complex="ar" style:country-complex="SA" style:font-style-complex="italic"/>
    </style:style>
    <style:style style:name="List_20_Paragraph" style:display-name="List Paragraph" style:family="paragraph" style:parent-style-name="Standard">
      <style:paragraph-properties fo:margin-left="0.6071in" fo:text-indent="-0.2299in" style:auto-text-indent="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709in" fo:line-height="0.1862in"/>
      <style:text-properties style:font-name="Calibri" fo:font-family="Calibri" style:font-family-generic="roman" style:font-pitch="variable" fo:language="fr" fo:country="FR"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style:font-name="Calibri" fo:font-family="Calibri" style:font-family-generic="roman" style:font-pitch="variable" fo:font-size="13pt" fo:letter-spacing="normal" fo:language="fr" fo:country="FR" fo:font-style="normal" fo:font-weight="normal" style:font-name-asian="Calibri1" style:font-family-asian="Calibri" style:font-family-generic-asian="system" style:font-pitch-asian="variable" style:font-size-asian="13pt" style:language-asian="en" style:country-asian="US" style:font-style-asian="normal" style:font-weight-asian="normal" style:font-name-complex="Calibri1" style:font-family-complex="Calibri" style:font-family-generic-complex="system" style:font-pitch-complex="variable" style:font-size-complex="13pt" style:language-complex="ar" style:country-complex="SA" style:font-style-complex="normal" style:font-weight-complex="normal" style:text-scale="99%"/>
    </style:style>
    <style:style style:name="ListLabel_20_11" style:display-name="ListLabel 11" style:family="text">
      <style:text-properties fo:language="fr" fo:country="FR" style:language-asian="en" style:country-asian="US" style:language-complex="ar" style:country-complex="SA"/>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4pt" fo:letter-spacing="normal" fo:language="fr" fo:country="FR"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language="fr" fo:country="FR"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0pt" fo:letter-spacing="normal" fo:language="fr" fo:country="FR"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38" style:display-name="ListLabel 38" style:family="text">
      <style:text-properties fo:language="fr" fo:country="FR" style:language-asian="en" style:country-asian="US" style:language-complex="ar" style:country-complex="SA"/>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7" style:display-name="ListLabel 47"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language="fr" fo:country="FR" style:language-asian="en" style:country-asian="US" style:language-complex="ar" style:country-complex="SA"/>
    </style:style>
    <style:style style:name="ListLabel_20_56" style:display-name="ListLabel 56"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font-size="13pt" fo:letter-spacing="normal" fo:language="fr" fo:country="FR" fo:font-style="normal" fo:font-weight="normal" style:font-name-asian="Wingdings" style:font-family-asian="Wingdings" style:font-family-generic-asian="system" style:font-pitch-asian="variable" style:font-size-asian="13pt" style:language-asian="en" style:country-asian="US" style:font-style-asian="normal" style:font-weight-asian="normal" style:font-name-complex="Wingdings" style:font-family-complex="Wingdings" style:font-family-generic-complex="system" style:font-pitch-complex="variable" style:font-size-complex="13pt" style:language-complex="ar" style:country-complex="SA" style:font-style-complex="normal" style:font-weight-complex="normal" style:text-scale="99%"/>
    </style:style>
    <style:style style:name="ListLabel_20_65" style:display-name="ListLabel 65" style:family="text">
      <style:text-properties style:font-name="Calibri" fo:font-family="Calibri"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fo:language="fr" fo:country="FR" style:language-asian="en" style:country-asian="US" style:language-complex="ar" style:country-complex="SA"/>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language="fr" fo:country="FR" style:language-asian="en" style:country-asian="US" style:language-complex="ar" style:country-complex="SA"/>
    </style:style>
    <style:style style:name="ListLabel_20_74" style:display-name="ListLabel 74"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fo:language="fr" fo:country="FR" style:language-asian="en" style:country-asian="US" style:language-complex="ar" style:country-complex="SA"/>
    </style:style>
    <style:style style:name="ListLabel_20_91" style:display-name="ListLabel 91" style:family="text">
      <style:text-properties fo:language="fr" fo:country="FR" style:language-asian="en" style:country-asian="US" style:language-complex="ar" style:country-complex="SA"/>
    </style:style>
    <style:style style:name="ListLabel_20_92" style:display-name="ListLabel 92"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93" style:display-name="ListLabel 93" style:family="text">
      <style:text-properties fo:language="fr" fo:country="FR" style:language-asian="en" style:country-asian="US" style:language-complex="ar" style:country-complex="SA"/>
    </style:style>
    <style:style style:name="ListLabel_20_94" style:display-name="ListLabel 94" style:family="text">
      <style:text-properties fo:language="fr" fo:country="FR" style:language-asian="en" style:country-asian="US" style:language-complex="ar" style:country-complex="SA"/>
    </style:style>
    <style:style style:name="ListLabel_20_95" style:display-name="ListLabel 95" style:family="text">
      <style:text-properties fo:language="fr" fo:country="FR" style:language-asian="en" style:country-asian="US" style:language-complex="ar" style:country-complex="SA"/>
    </style:style>
    <style:style style:name="ListLabel_20_96" style:display-name="ListLabel 96" style:family="text">
      <style:text-properties fo:language="fr" fo:country="FR" style:language-asian="en" style:country-asian="US" style:language-complex="ar" style:country-complex="SA"/>
    </style:style>
    <style:style style:name="ListLabel_20_97" style:display-name="ListLabel 97" style:family="text">
      <style:text-properties fo:language="fr" fo:country="FR" style:language-asian="en" style:country-asian="US" style:language-complex="ar" style:country-complex="SA"/>
    </style:style>
    <style:style style:name="ListLabel_20_98" style:display-name="ListLabel 98" style:family="text">
      <style:text-properties fo:language="fr" fo:country="FR" style:language-asian="en" style:country-asian="US" style:language-complex="ar" style:country-complex="SA"/>
    </style:style>
    <style:style style:name="ListLabel_20_99" style:display-name="ListLabel 99" style:family="text">
      <style:text-properties fo:language="fr" fo:country="FR" style:language-asian="en" style:country-asian="US" style:language-complex="ar" style:country-complex="SA"/>
    </style:style>
    <style:style style:name="ListLabel_20_100" style:display-name="ListLabel 100"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01" style:display-name="ListLabel 101" style:family="text">
      <style:text-properties fo:color="#233e5f" loext:opacity="100%" fo:font-size="11pt" fo:letter-spacing="normal" fo:language="fr" fo:country="FR" fo:font-style="normal" fo:font-weight="normal" style:font-name-asian="Symbol1" style:font-family-asian="Symbol" style:font-family-generic-asian="system" style:font-pitch-asian="variable" style:font-size-asian="11pt" style:language-asian="en" style:country-asian="US" style:font-style-asian="normal" style:font-weight-asian="normal" style:font-name-complex="Symbol1"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02" style:display-name="ListLabel 102" style:family="text">
      <style:text-properties fo:language="fr" fo:country="FR" style:language-asian="en" style:country-asian="US" style:language-complex="ar" style:country-complex="SA"/>
    </style:style>
    <style:style style:name="ListLabel_20_103" style:display-name="ListLabel 103" style:family="text">
      <style:text-properties fo:language="fr" fo:country="FR" style:language-asian="en" style:country-asian="US" style:language-complex="ar" style:country-complex="SA"/>
    </style:style>
    <style:style style:name="ListLabel_20_104" style:display-name="ListLabel 104" style:family="text">
      <style:text-properties fo:language="fr" fo:country="FR" style:language-asian="en" style:country-asian="US" style:language-complex="ar" style:country-complex="SA"/>
    </style:style>
    <style:style style:name="ListLabel_20_105" style:display-name="ListLabel 105" style:family="text">
      <style:text-properties fo:language="fr" fo:country="FR" style:language-asian="en" style:country-asian="US" style:language-complex="ar" style:country-complex="SA"/>
    </style:style>
    <style:style style:name="ListLabel_20_106" style:display-name="ListLabel 106" style:family="text">
      <style:text-properties fo:language="fr" fo:country="FR" style:language-asian="en" style:country-asian="US" style:language-complex="ar" style:country-complex="SA"/>
    </style:style>
    <style:style style:name="ListLabel_20_107" style:display-name="ListLabel 107" style:family="text">
      <style:text-properties fo:language="fr" fo:country="FR" style:language-asian="en" style:country-asian="US" style:language-complex="ar" style:country-complex="SA"/>
    </style:style>
    <style:style style:name="ListLabel_20_108" style:display-name="ListLabel 108" style:family="text">
      <style:text-properties fo:language="fr" fo:country="FR" style:language-asian="en" style:country-asian="US" style:language-complex="ar" style:country-complex="SA"/>
    </style:style>
    <style:style style:name="ListLabel_20_109" style:display-name="ListLabel 109"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0" style:display-name="ListLabel 110" style:family="text">
      <style:text-properties fo:font-size="10pt" fo:letter-spacing="normal" fo:language="fr" fo:country="FR"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11" style:display-name="ListLabel 111" style:family="text">
      <style:text-properties fo:language="fr" fo:country="FR" style:language-asian="en" style:country-asian="US" style:language-complex="ar" style:country-complex="SA"/>
    </style:style>
    <style:style style:name="ListLabel_20_112" style:display-name="ListLabel 112" style:family="text">
      <style:text-properties fo:language="fr" fo:country="FR" style:language-asian="en" style:country-asian="US" style:language-complex="ar" style:country-complex="SA"/>
    </style:style>
    <style:style style:name="ListLabel_20_113" style:display-name="ListLabel 113" style:family="text">
      <style:text-properties fo:language="fr" fo:country="FR" style:language-asian="en" style:country-asian="US" style:language-complex="ar" style:country-complex="SA"/>
    </style:style>
    <style:style style:name="ListLabel_20_114" style:display-name="ListLabel 114" style:family="text">
      <style:text-properties fo:language="fr" fo:country="FR" style:language-asian="en" style:country-asian="US" style:language-complex="ar" style:country-complex="SA"/>
    </style:style>
    <style:style style:name="ListLabel_20_115" style:display-name="ListLabel 115" style:family="text">
      <style:text-properties fo:language="fr" fo:country="FR" style:language-asian="en" style:country-asian="US" style:language-complex="ar" style:country-complex="SA"/>
    </style:style>
    <style:style style:name="ListLabel_20_116" style:display-name="ListLabel 116" style:family="text">
      <style:text-properties fo:language="fr" fo:country="FR" style:language-asian="en" style:country-asian="US" style:language-complex="ar" style:country-complex="SA"/>
    </style:style>
    <style:style style:name="ListLabel_20_117" style:display-name="ListLabel 117" style:family="text">
      <style:text-properties fo:language="fr" fo:country="FR" style:language-asian="en" style:country-asian="US" style:language-complex="ar" style:country-complex="SA"/>
    </style:style>
    <style:style style:name="ListLabel_20_118" style:display-name="ListLabel 118" style:family="text">
      <style:text-properties fo:font-size="12pt" fo:letter-spacing="normal" fo:language="fr" fo:country="FR"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19" style:display-name="ListLabel 119" style:family="text">
      <style:text-properties fo:language="fr" fo:country="FR" style:language-asian="en" style:country-asian="US" style:language-complex="ar" style:country-complex="SA"/>
    </style:style>
    <style:style style:name="ListLabel_20_120" style:display-name="ListLabel 120" style:family="text">
      <style:text-properties fo:language="fr" fo:country="FR" style:language-asian="en" style:country-asian="US" style:language-complex="ar" style:country-complex="SA"/>
    </style:style>
    <style:style style:name="ListLabel_20_121" style:display-name="ListLabel 121" style:family="text">
      <style:text-properties fo:language="fr" fo:country="FR" style:language-asian="en" style:country-asian="US" style:language-complex="ar" style:country-complex="SA"/>
    </style:style>
    <style:style style:name="ListLabel_20_122" style:display-name="ListLabel 122" style:family="text">
      <style:text-properties fo:language="fr" fo:country="FR" style:language-asian="en" style:country-asian="US" style:language-complex="ar" style:country-complex="SA"/>
    </style:style>
    <style:style style:name="ListLabel_20_123" style:display-name="ListLabel 123" style:family="text">
      <style:text-properties fo:language="fr" fo:country="FR" style:language-asian="en" style:country-asian="US" style:language-complex="ar" style:country-complex="SA"/>
    </style:style>
    <style:style style:name="ListLabel_20_124" style:display-name="ListLabel 124" style:family="text">
      <style:text-properties fo:language="fr" fo:country="FR" style:language-asian="en" style:country-asian="US" style:language-complex="ar" style:country-complex="SA"/>
    </style:style>
    <style:style style:name="ListLabel_20_125" style:display-name="ListLabel 125" style:family="text">
      <style:text-properties fo:language="fr" fo:country="FR" style:language-asian="en" style:country-asian="US" style:language-complex="ar" style:country-complex="SA"/>
    </style:style>
    <style:style style:name="ListLabel_20_126" style:display-name="ListLabel 126" style:family="text">
      <style:text-properties fo:language="fr" fo:country="FR" style:language-asian="en" style:country-asian="US" style:language-complex="ar" style:country-complex="SA"/>
    </style:style>
    <style:style style:name="ListLabel_20_127" style:display-name="ListLabel 127" style:family="text">
      <style:text-properties fo:font-size="12pt" fo:letter-spacing="normal" fo:language="fr" fo:country="FR" fo:font-style="normal" fo:font-weight="normal" style:font-name-asian="Wingdings" style:font-family-asian="Wingdings" style:font-family-generic-asian="system" style:font-pitch-asian="variable" style:font-size-asian="12pt" style:language-asian="en" style:country-asian="US" style:font-style-asian="normal" style:font-weight-asian="normal" style:font-name-complex="Wingdings"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128" style:display-name="ListLabel 128" style:family="text">
      <style:text-properties fo:language="fr" fo:country="FR" style:language-asian="en" style:country-asian="US" style:language-complex="ar" style:country-complex="SA"/>
    </style:style>
    <style:style style:name="ListLabel_20_129" style:display-name="ListLabel 129" style:family="text">
      <style:text-properties fo:language="fr" fo:country="FR" style:language-asian="en" style:country-asian="US" style:language-complex="ar" style:country-complex="SA"/>
    </style:style>
    <style:style style:name="ListLabel_20_130" style:display-name="ListLabel 130" style:family="text">
      <style:text-properties fo:language="fr" fo:country="FR" style:language-asian="en" style:country-asian="US" style:language-complex="ar" style:country-complex="SA"/>
    </style:style>
    <style:style style:name="ListLabel_20_131" style:display-name="ListLabel 131" style:family="text">
      <style:text-properties fo:language="fr" fo:country="FR" style:language-asian="en" style:country-asian="US" style:language-complex="ar" style:country-complex="SA"/>
    </style:style>
    <style:style style:name="ListLabel_20_132" style:display-name="ListLabel 132" style:family="text">
      <style:text-properties fo:language="fr" fo:country="FR" style:language-asian="en" style:country-asian="US" style:language-complex="ar" style:country-complex="SA"/>
    </style:style>
    <style:style style:name="ListLabel_20_133" style:display-name="ListLabel 133" style:family="text">
      <style:text-properties fo:language="fr" fo:country="FR" style:language-asian="en" style:country-asian="US" style:language-complex="ar" style:country-complex="SA"/>
    </style:style>
    <style:style style:name="ListLabel_20_134" style:display-name="ListLabel 134" style:family="text">
      <style:text-properties fo:language="fr" fo:country="FR" style:language-asian="en" style:country-asian="US" style:language-complex="ar" style:country-complex="SA"/>
    </style:style>
    <style:style style:name="ListLabel_20_135" style:display-name="ListLabel 135" style:family="text">
      <style:text-properties fo:language="fr" fo:country="FR" style:language-asian="en" style:country-asian="US" style:language-complex="ar" style:country-complex="SA"/>
    </style:style>
    <style:style style:name="ListLabel_20_136" style:display-name="ListLabel 136" style:family="text">
      <style:text-properties style:font-name="Calibri" fo:font-family="Calibri"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37" style:display-name="ListLabel 137" style:family="text">
      <style:text-properties fo:language="fr" fo:country="FR" style:language-asian="en" style:country-asian="US" style:language-complex="ar" style:country-complex="SA"/>
    </style:style>
    <style:style style:name="ListLabel_20_138" style:display-name="ListLabel 138" style:family="text">
      <style:text-properties fo:language="fr" fo:country="FR" style:language-asian="en" style:country-asian="US" style:language-complex="ar" style:country-complex="SA"/>
    </style:style>
    <style:style style:name="ListLabel_20_139" style:display-name="ListLabel 139" style:family="text">
      <style:text-properties fo:language="fr" fo:country="FR" style:language-asian="en" style:country-asian="US" style:language-complex="ar" style:country-complex="SA"/>
    </style:style>
    <style:style style:name="ListLabel_20_140" style:display-name="ListLabel 140" style:family="text">
      <style:text-properties fo:language="fr" fo:country="FR" style:language-asian="en" style:country-asian="US" style:language-complex="ar" style:country-complex="SA"/>
    </style:style>
    <style:style style:name="ListLabel_20_141" style:display-name="ListLabel 141" style:family="text">
      <style:text-properties fo:language="fr" fo:country="FR" style:language-asian="en" style:country-asian="US" style:language-complex="ar" style:country-complex="SA"/>
    </style:style>
    <style:style style:name="ListLabel_20_142" style:display-name="ListLabel 142" style:family="text">
      <style:text-properties fo:language="fr" fo:country="FR" style:language-asian="en" style:country-asian="US" style:language-complex="ar" style:country-complex="SA"/>
    </style:style>
    <style:style style:name="ListLabel_20_143" style:display-name="ListLabel 143" style:family="text">
      <style:text-properties fo:language="fr" fo:country="FR" style:language-asian="en" style:country-asian="US" style:language-complex="ar" style:country-complex="SA"/>
    </style:style>
    <style:style style:name="ListLabel_20_144" style:display-name="ListLabel 144" style:family="text">
      <style:text-properties fo:language="fr" fo:country="FR" style:language-asian="en" style:country-asian="US" style:language-complex="ar" style:country-complex="SA"/>
    </style:style>
    <style:style style:name="ListLabel_20_145" style:display-name="ListLabel 145"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6" style:display-name="ListLabel 146"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147" style:display-name="ListLabel 147" style:family="text">
      <style:text-properties fo:language="fr" fo:country="FR" style:language-asian="en" style:country-asian="US" style:language-complex="ar" style:country-complex="SA"/>
    </style:style>
    <style:style style:name="ListLabel_20_148" style:display-name="ListLabel 148" style:family="text">
      <style:text-properties fo:language="fr" fo:country="FR" style:language-asian="en" style:country-asian="US" style:language-complex="ar" style:country-complex="SA"/>
    </style:style>
    <style:style style:name="ListLabel_20_149" style:display-name="ListLabel 149" style:family="text">
      <style:text-properties fo:language="fr" fo:country="FR" style:language-asian="en" style:country-asian="US" style:language-complex="ar" style:country-complex="SA"/>
    </style:style>
    <style:style style:name="ListLabel_20_150" style:display-name="ListLabel 150" style:family="text">
      <style:text-properties fo:language="fr" fo:country="FR" style:language-asian="en" style:country-asian="US" style:language-complex="ar" style:country-complex="SA"/>
    </style:style>
    <style:style style:name="ListLabel_20_151" style:display-name="ListLabel 151" style:family="text">
      <style:text-properties fo:language="fr" fo:country="FR" style:language-asian="en" style:country-asian="US" style:language-complex="ar" style:country-complex="SA"/>
    </style:style>
    <style:style style:name="ListLabel_20_152" style:display-name="ListLabel 152" style:family="text">
      <style:text-properties fo:language="fr" fo:country="FR" style:language-asian="en" style:country-asian="US" style:language-complex="ar" style:country-complex="SA"/>
    </style:style>
    <style:style style:name="ListLabel_20_153" style:display-name="ListLabel 153" style:family="text">
      <style:text-properties fo:language="fr" fo:country="FR" style:language-asian="en" style:country-asian="US" style:language-complex="ar" style:country-complex="SA"/>
    </style:style>
    <style:style style:name="ListLabel_20_154" style:display-name="ListLabel 154"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5" style:display-name="ListLabel 155"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156" style:display-name="ListLabel 156" style:family="text">
      <style:text-properties fo:language="fr" fo:country="FR" style:language-asian="en" style:country-asian="US" style:language-complex="ar" style:country-complex="SA"/>
    </style:style>
    <style:style style:name="ListLabel_20_157" style:display-name="ListLabel 157" style:family="text">
      <style:text-properties fo:language="fr" fo:country="FR" style:language-asian="en" style:country-asian="US" style:language-complex="ar" style:country-complex="SA"/>
    </style:style>
    <style:style style:name="ListLabel_20_158" style:display-name="ListLabel 158" style:family="text">
      <style:text-properties fo:language="fr" fo:country="FR" style:language-asian="en" style:country-asian="US" style:language-complex="ar" style:country-complex="SA"/>
    </style:style>
    <style:style style:name="ListLabel_20_159" style:display-name="ListLabel 159" style:family="text">
      <style:text-properties fo:language="fr" fo:country="FR" style:language-asian="en" style:country-asian="US" style:language-complex="ar" style:country-complex="SA"/>
    </style:style>
    <style:style style:name="ListLabel_20_160" style:display-name="ListLabel 160" style:family="text">
      <style:text-properties fo:language="fr" fo:country="FR" style:language-asian="en" style:country-asian="US" style:language-complex="ar" style:country-complex="SA"/>
    </style:style>
    <style:style style:name="ListLabel_20_161" style:display-name="ListLabel 161" style:family="text">
      <style:text-properties fo:language="fr" fo:country="FR" style:language-asian="en" style:country-asian="US" style:language-complex="ar" style:country-complex="SA"/>
    </style:style>
    <style:style style:name="ListLabel_20_162" style:display-name="ListLabel 162" style:family="text">
      <style:text-properties fo:language="fr" fo:country="FR" style:language-asian="en" style:country-asian="US" style:language-complex="ar" style:country-complex="SA"/>
    </style:style>
    <style:style style:name="ListLabel_20_163" style:display-name="ListLabel 163" style:family="text">
      <style:text-properties fo:font-size="10pt" fo:letter-spacing="normal" fo:language="fr" fo:country="FR"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64" style:display-name="ListLabel 164" style:family="text">
      <style:text-properties fo:language="fr" fo:country="FR" style:language-asian="en" style:country-asian="US" style:language-complex="ar" style:country-complex="SA"/>
    </style:style>
    <style:style style:name="ListLabel_20_165" style:display-name="ListLabel 165" style:family="text">
      <style:text-properties fo:language="fr" fo:country="FR" style:language-asian="en" style:country-asian="US" style:language-complex="ar" style:country-complex="SA"/>
    </style:style>
    <style:style style:name="ListLabel_20_166" style:display-name="ListLabel 166" style:family="text">
      <style:text-properties fo:language="fr" fo:country="FR" style:language-asian="en" style:country-asian="US" style:language-complex="ar" style:country-complex="SA"/>
    </style:style>
    <style:style style:name="ListLabel_20_167" style:display-name="ListLabel 167" style:family="text">
      <style:text-properties fo:language="fr" fo:country="FR" style:language-asian="en" style:country-asian="US" style:language-complex="ar" style:country-complex="SA"/>
    </style:style>
    <style:style style:name="ListLabel_20_168" style:display-name="ListLabel 168" style:family="text">
      <style:text-properties fo:language="fr" fo:country="FR" style:language-asian="en" style:country-asian="US" style:language-complex="ar" style:country-complex="SA"/>
    </style:style>
    <style:style style:name="ListLabel_20_169" style:display-name="ListLabel 169" style:family="text">
      <style:text-properties fo:language="fr" fo:country="FR" style:language-asian="en" style:country-asian="US" style:language-complex="ar" style:country-complex="SA"/>
    </style:style>
    <style:style style:name="ListLabel_20_170" style:display-name="ListLabel 170" style:family="text">
      <style:text-properties fo:language="fr" fo:country="FR" style:language-asian="en" style:country-asian="US" style:language-complex="ar" style:country-complex="SA"/>
    </style:style>
    <style:style style:name="ListLabel_20_171" style:display-name="ListLabel 171" style:family="text">
      <style:text-properties fo:language="fr" fo:country="FR" style:language-asian="en" style:country-asian="US" style:language-complex="ar" style:country-complex="SA"/>
    </style:style>
    <style:style style:name="ListLabel_20_172" style:display-name="ListLabel 172" style:family="text">
      <style:text-properties fo:language="fr" fo:country="FR" style:language-asian="en" style:country-asian="US" style:language-complex="ar" style:country-complex="SA"/>
    </style:style>
    <style:style style:name="ListLabel_20_173" style:display-name="ListLabel 173"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174" style:display-name="ListLabel 174" style:family="text">
      <style:text-properties fo:language="fr" fo:country="FR" style:language-asian="en" style:country-asian="US" style:language-complex="ar" style:country-complex="SA"/>
    </style:style>
    <style:style style:name="ListLabel_20_175" style:display-name="ListLabel 175" style:family="text">
      <style:text-properties fo:language="fr" fo:country="FR" style:language-asian="en" style:country-asian="US" style:language-complex="ar" style:country-complex="SA"/>
    </style:style>
    <style:style style:name="ListLabel_20_176" style:display-name="ListLabel 176" style:family="text">
      <style:text-properties fo:language="fr" fo:country="FR" style:language-asian="en" style:country-asian="US" style:language-complex="ar" style:country-complex="SA"/>
    </style:style>
    <style:style style:name="ListLabel_20_177" style:display-name="ListLabel 177" style:family="text">
      <style:text-properties fo:language="fr" fo:country="FR" style:language-asian="en" style:country-asian="US" style:language-complex="ar" style:country-complex="SA"/>
    </style:style>
    <style:style style:name="ListLabel_20_178" style:display-name="ListLabel 178" style:family="text">
      <style:text-properties fo:language="fr" fo:country="FR" style:language-asian="en" style:country-asian="US" style:language-complex="ar" style:country-complex="SA"/>
    </style:style>
    <style:style style:name="ListLabel_20_179" style:display-name="ListLabel 179" style:family="text">
      <style:text-properties fo:language="fr" fo:country="FR" style:language-asian="en" style:country-asian="US" style:language-complex="ar" style:country-complex="SA"/>
    </style:style>
    <style:style style:name="ListLabel_20_180" style:display-name="ListLabel 180" style:family="text">
      <style:text-properties fo:language="fr" fo:country="FR" style:language-asian="en" style:country-asian="US" style:language-complex="ar" style:country-complex="SA"/>
    </style:style>
    <style:style style:name="ListLabel_20_181" style:display-name="ListLabel 181" style:family="text">
      <style:text-properties style:font-name="Times New Roman" fo:font-family="'Times New Roman'" style:font-family-generic="roman" style:font-pitch="variable" fo:font-size="12pt" fo:letter-spacing="normal" fo:language="fr" fo:country="FR"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82" style:display-name="ListLabel 182"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183" style:display-name="ListLabel 183" style:family="text">
      <style:text-properties fo:language="fr" fo:country="FR" style:language-asian="en" style:country-asian="US" style:language-complex="ar" style:country-complex="SA"/>
    </style:style>
    <style:style style:name="ListLabel_20_184" style:display-name="ListLabel 184" style:family="text">
      <style:text-properties fo:language="fr" fo:country="FR" style:language-asian="en" style:country-asian="US" style:language-complex="ar" style:country-complex="SA"/>
    </style:style>
    <style:style style:name="ListLabel_20_185" style:display-name="ListLabel 185" style:family="text">
      <style:text-properties fo:language="fr" fo:country="FR" style:language-asian="en" style:country-asian="US" style:language-complex="ar" style:country-complex="SA"/>
    </style:style>
    <style:style style:name="ListLabel_20_186" style:display-name="ListLabel 186" style:family="text">
      <style:text-properties fo:language="fr" fo:country="FR" style:language-asian="en" style:country-asian="US" style:language-complex="ar" style:country-complex="SA"/>
    </style:style>
    <style:style style:name="ListLabel_20_187" style:display-name="ListLabel 187" style:family="text">
      <style:text-properties fo:language="fr" fo:country="FR" style:language-asian="en" style:country-asian="US" style:language-complex="ar" style:country-complex="SA"/>
    </style:style>
    <style:style style:name="ListLabel_20_188" style:display-name="ListLabel 188" style:family="text">
      <style:text-properties fo:language="fr" fo:country="FR" style:language-asian="en" style:country-asian="US" style:language-complex="ar" style:country-complex="SA"/>
    </style:style>
    <style:style style:name="ListLabel_20_189" style:display-name="ListLabel 189" style:family="text">
      <style:text-properties fo:language="fr" fo:country="FR" style:language-asian="en" style:country-asian="US" style:language-complex="ar" style:country-complex="SA"/>
    </style:style>
    <style:style style:name="ListLabel_20_190" style:display-name="ListLabel 190" style:family="text">
      <style:text-properties style:font-name="Times New Roman" fo:font-family="'Times New Roman'" style:font-family-generic="roman" style:font-pitch="variable" fo:font-size="12pt" fo:letter-spacing="normal" fo:language="fr" fo:country="FR"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91" style:display-name="ListLabel 191" style:family="text">
      <style:text-properties fo:language="fr" fo:country="FR" style:language-asian="en" style:country-asian="US" style:language-complex="ar" style:country-complex="SA"/>
    </style:style>
    <style:style style:name="ListLabel_20_192" style:display-name="ListLabel 192" style:family="text">
      <style:text-properties fo:language="fr" fo:country="FR" style:language-asian="en" style:country-asian="US" style:language-complex="ar" style:country-complex="SA"/>
    </style:style>
    <style:style style:name="ListLabel_20_193" style:display-name="ListLabel 193" style:family="text">
      <style:text-properties fo:language="fr" fo:country="FR" style:language-asian="en" style:country-asian="US" style:language-complex="ar" style:country-complex="SA"/>
    </style:style>
    <style:style style:name="ListLabel_20_194" style:display-name="ListLabel 194" style:family="text">
      <style:text-properties fo:language="fr" fo:country="FR" style:language-asian="en" style:country-asian="US" style:language-complex="ar" style:country-complex="SA"/>
    </style:style>
    <style:style style:name="ListLabel_20_195" style:display-name="ListLabel 195" style:family="text">
      <style:text-properties fo:language="fr" fo:country="FR" style:language-asian="en" style:country-asian="US" style:language-complex="ar" style:country-complex="SA"/>
    </style:style>
    <style:style style:name="ListLabel_20_196" style:display-name="ListLabel 196" style:family="text">
      <style:text-properties fo:language="fr" fo:country="FR" style:language-asian="en" style:country-asian="US" style:language-complex="ar" style:country-complex="SA"/>
    </style:style>
    <style:style style:name="ListLabel_20_197" style:display-name="ListLabel 197" style:family="text">
      <style:text-properties fo:language="fr" fo:country="FR" style:language-asian="en" style:country-asian="US" style:language-complex="ar" style:country-complex="SA"/>
    </style:style>
    <style:style style:name="ListLabel_20_198" style:display-name="ListLabel 198" style:family="text">
      <style:text-properties fo:language="fr" fo:country="FR" style:language-asian="en" style:country-asian="US" style:language-complex="ar" style:country-complex="SA"/>
    </style:style>
    <style:style style:name="ListLabel_20_199" style:display-name="ListLabel 199" style:family="text">
      <style:text-properties fo:letter-spacing="normal" fo:language="fr" fo:country="FR" style:font-name-asian="Symbol1" style:font-family-asian="Symbol" style:font-family-generic-asian="system" style:font-pitch-asian="variable" style:language-asian="en" style:country-asian="US" style:font-name-complex="Symbol1" style:font-family-complex="Symbol" style:font-family-generic-complex="system" style:font-pitch-complex="variable" style:language-complex="ar" style:country-complex="SA" style:text-scale="100%"/>
    </style:style>
    <style:style style:name="ListLabel_20_200" style:display-name="ListLabel 200" style:family="text">
      <style:text-properties fo:language="fr" fo:country="FR" style:language-asian="en" style:country-asian="US" style:language-complex="ar" style:country-complex="SA"/>
    </style:style>
    <style:style style:name="ListLabel_20_201" style:display-name="ListLabel 201" style:family="text">
      <style:text-properties fo:language="fr" fo:country="FR" style:language-asian="en" style:country-asian="US" style:language-complex="ar" style:country-complex="SA"/>
    </style:style>
    <style:style style:name="ListLabel_20_202" style:display-name="ListLabel 202" style:family="text">
      <style:text-properties fo:language="fr" fo:country="FR" style:language-asian="en" style:country-asian="US" style:language-complex="ar" style:country-complex="SA"/>
    </style:style>
    <style:style style:name="ListLabel_20_203" style:display-name="ListLabel 203" style:family="text">
      <style:text-properties fo:language="fr" fo:country="FR" style:language-asian="en" style:country-asian="US" style:language-complex="ar" style:country-complex="SA"/>
    </style:style>
    <style:style style:name="ListLabel_20_204" style:display-name="ListLabel 204" style:family="text">
      <style:text-properties fo:language="fr" fo:country="FR" style:language-asian="en" style:country-asian="US" style:language-complex="ar" style:country-complex="SA"/>
    </style:style>
    <style:style style:name="ListLabel_20_205" style:display-name="ListLabel 205" style:family="text">
      <style:text-properties fo:language="fr" fo:country="FR" style:language-asian="en" style:country-asian="US" style:language-complex="ar" style:country-complex="SA"/>
    </style:style>
    <style:style style:name="ListLabel_20_206" style:display-name="ListLabel 206" style:family="text">
      <style:text-properties fo:language="fr" fo:country="FR" style:language-asian="en" style:country-asian="US" style:language-complex="ar" style:country-complex="SA"/>
    </style:style>
    <style:style style:name="ListLabel_20_207" style:display-name="ListLabel 207" style:family="text">
      <style:text-properties fo:language="fr" fo:country="FR" style:language-asian="en" style:country-asian="US" style:language-complex="ar" style:country-complex="SA"/>
    </style:style>
    <style:style style:name="ListLabel_20_208" style:display-name="ListLabel 208" style:family="text">
      <style:text-properties fo:color="#0e233d" loext:opacity="100%" style:font-name="Calibri" fo:font-family="Calibri" style:font-family-generic="roman" style:font-pitch="variable" fo:font-size="13pt" fo:letter-spacing="normal" fo:language="fr" fo:country="FR" fo:font-style="normal" fo:font-weight="normal" style:font-name-asian="Times New Roman1" style:font-family-asian="'Times New Roman'" style:font-family-generic-asian="system" style:font-pitch-asian="variable" style:font-size-asian="13pt" style:language-asian="en" style:country-asian="US" style:font-style-asian="normal" style:font-weight-asian="normal" style:font-name-complex="Times New Roman1" style:font-family-complex="'Times New Roman'" style:font-family-generic-complex="system" style:font-pitch-complex="variable" style:font-size-complex="13pt" style:language-complex="ar" style:country-complex="SA" style:font-style-complex="normal" style:font-weight-complex="normal" style:text-scale="99%"/>
    </style:style>
    <style:style style:name="ListLabel_20_209" style:display-name="ListLabel 209" style:family="text">
      <style:text-properties fo:language="fr" fo:country="FR" style:language-asian="en" style:country-asian="US" style:language-complex="ar" style:country-complex="SA"/>
    </style:style>
    <style:style style:name="ListLabel_20_210" style:display-name="ListLabel 210" style:family="text">
      <style:text-properties fo:language="fr" fo:country="FR" style:language-asian="en" style:country-asian="US" style:language-complex="ar" style:country-complex="SA"/>
    </style:style>
    <style:style style:name="ListLabel_20_211" style:display-name="ListLabel 211" style:family="text">
      <style:text-properties fo:language="fr" fo:country="FR" style:language-asian="en" style:country-asian="US" style:language-complex="ar" style:country-complex="SA"/>
    </style:style>
    <style:style style:name="ListLabel_20_212" style:display-name="ListLabel 212" style:family="text">
      <style:text-properties fo:language="fr" fo:country="FR" style:language-asian="en" style:country-asian="US" style:language-complex="ar" style:country-complex="SA"/>
    </style:style>
    <style:style style:name="ListLabel_20_213" style:display-name="ListLabel 213" style:family="text">
      <style:text-properties fo:language="fr" fo:country="FR" style:language-asian="en" style:country-asian="US" style:language-complex="ar" style:country-complex="SA"/>
    </style:style>
    <style:style style:name="ListLabel_20_214" style:display-name="ListLabel 214" style:family="text">
      <style:text-properties fo:language="fr" fo:country="FR" style:language-asian="en" style:country-asian="US" style:language-complex="ar" style:country-complex="SA"/>
    </style:style>
    <style:style style:name="ListLabel_20_215" style:display-name="ListLabel 215" style:family="text">
      <style:text-properties fo:language="fr" fo:country="FR" style:language-asian="en" style:country-asian="US" style:language-complex="ar" style:country-complex="SA"/>
    </style:style>
    <style:style style:name="ListLabel_20_216" style:display-name="ListLabel 216" style:family="text">
      <style:text-properties fo:language="fr" fo:country="FR" style:language-asian="en" style:country-asian="US" style:language-complex="ar" style:country-complex="SA"/>
    </style:style>
    <style:style style:name="ListLabel_20_217" style:display-name="ListLabel 217" style:family="text">
      <style:text-properties fo:language="fr" fo:country="FR" style:language-asian="en" style:country-asian="US" style:language-complex="ar" style:country-complex="SA"/>
    </style:style>
    <style:style style:name="ListLabel_20_218" style:display-name="ListLabel 218" style:family="text">
      <style:text-properties style:font-name="Times New Roman" fo:font-family="'Times New Roman'" style:font-family-generic="roman" style:font-pitch="variable" fo:font-size="15pt" fo:letter-spacing="normal" fo:language="fr" fo:country="FR" fo:font-style="normal" fo:font-weight="bold" style:font-name-asian="Times New Roman1" style:font-family-asian="'Times New Roman'" style:font-family-generic-asian="system" style:font-pitch-asian="variable" style:font-size-asian="15pt" style:language-asian="en" style:country-asian="US" style:font-style-asian="normal" style:font-weight-asian="bold" style:font-name-complex="Times New Roman1" style:font-family-complex="'Times New Roman'" style:font-family-generic-complex="system" style:font-pitch-complex="variable" style:font-size-complex="15pt" style:language-complex="ar" style:country-complex="SA" style:font-style-complex="normal" style:font-weight-complex="bold" style:text-scale="100%"/>
    </style:style>
    <style:style style:name="ListLabel_20_219" style:display-name="ListLabel 219" style:family="text">
      <style:text-properties fo:letter-spacing="normal" fo:language="fr" fo:country="FR" style:language-asian="en" style:country-asian="US" style:language-complex="ar" style:country-complex="SA" style:text-scale="100%"/>
    </style:style>
    <style:style style:name="ListLabel_20_220" style:display-name="ListLabel 220" style:family="text">
      <style:text-properties fo:language="fr" fo:country="FR" style:language-asian="en" style:country-asian="US" style:language-complex="ar" style:country-complex="SA"/>
    </style:style>
    <style:style style:name="ListLabel_20_221" style:display-name="ListLabel 221" style:family="text">
      <style:text-properties fo:language="fr" fo:country="FR" style:language-asian="en" style:country-asian="US" style:language-complex="ar" style:country-complex="SA"/>
    </style:style>
    <style:style style:name="ListLabel_20_222" style:display-name="ListLabel 222" style:family="text">
      <style:text-properties fo:language="fr" fo:country="FR" style:language-asian="en" style:country-asian="US" style:language-complex="ar" style:country-complex="SA"/>
    </style:style>
    <style:style style:name="ListLabel_20_223" style:display-name="ListLabel 223" style:family="text">
      <style:text-properties fo:language="fr" fo:country="FR" style:language-asian="en" style:country-asian="US" style:language-complex="ar" style:country-complex="SA"/>
    </style:style>
    <style:style style:name="ListLabel_20_224" style:display-name="ListLabel 224" style:family="text">
      <style:text-properties fo:language="fr" fo:country="FR" style:language-asian="en" style:country-asian="US" style:language-complex="ar" style:country-complex="SA"/>
    </style:style>
    <style:style style:name="ListLabel_20_225" style:display-name="ListLabel 225" style:family="text">
      <style:text-properties fo:language="fr" fo:country="FR" style:language-asian="en" style:country-asian="US" style:language-complex="ar" style:country-complex="SA"/>
    </style:style>
    <style:style style:name="ListLabel_20_226" style:display-name="ListLabel 226" style:family="text">
      <style:text-properties fo:language="fr" fo:country="FR" style:language-asian="en" style:country-asian="US" style:language-complex="ar" style:country-complex="SA"/>
    </style:style>
    <style:style style:name="ListLabel_20_227" style:display-name="ListLabel 227"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28" style:display-name="ListLabel 228" style:family="text">
      <style:text-properties fo:language="fr" fo:country="FR" style:language-asian="en" style:country-asian="US" style:language-complex="ar" style:country-complex="SA"/>
    </style:style>
    <style:style style:name="ListLabel_20_229" style:display-name="ListLabel 229" style:family="text">
      <style:text-properties fo:language="fr" fo:country="FR" style:language-asian="en" style:country-asian="US" style:language-complex="ar" style:country-complex="SA"/>
    </style:style>
    <style:style style:name="ListLabel_20_230" style:display-name="ListLabel 230" style:family="text">
      <style:text-properties fo:language="fr" fo:country="FR" style:language-asian="en" style:country-asian="US" style:language-complex="ar" style:country-complex="SA"/>
    </style:style>
    <style:style style:name="ListLabel_20_231" style:display-name="ListLabel 231" style:family="text">
      <style:text-properties fo:language="fr" fo:country="FR" style:language-asian="en" style:country-asian="US" style:language-complex="ar" style:country-complex="SA"/>
    </style:style>
    <style:style style:name="ListLabel_20_232" style:display-name="ListLabel 232" style:family="text">
      <style:text-properties fo:language="fr" fo:country="FR" style:language-asian="en" style:country-asian="US" style:language-complex="ar" style:country-complex="SA"/>
    </style:style>
    <style:style style:name="ListLabel_20_233" style:display-name="ListLabel 233" style:family="text">
      <style:text-properties fo:language="fr" fo:country="FR" style:language-asian="en" style:country-asian="US" style:language-complex="ar" style:country-complex="SA"/>
    </style:style>
    <style:style style:name="ListLabel_20_234" style:display-name="ListLabel 234" style:family="text">
      <style:text-properties fo:language="fr" fo:country="FR" style:language-asian="en" style:country-asian="US" style:language-complex="ar" style:country-complex="SA"/>
    </style:style>
    <style:style style:name="ListLabel_20_235" style:display-name="ListLabel 235" style:family="text">
      <style:text-properties fo:language="fr" fo:country="FR" style:language-asian="en" style:country-asian="US" style:language-complex="ar" style:country-complex="SA"/>
    </style:style>
    <style:style style:name="ListLabel_20_236" style:display-name="ListLabel 236"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37" style:display-name="ListLabel 237" style:family="text">
      <style:text-properties fo:language="fr" fo:country="FR" style:language-asian="en" style:country-asian="US" style:language-complex="ar" style:country-complex="SA"/>
    </style:style>
    <style:style style:name="ListLabel_20_238" style:display-name="ListLabel 238" style:family="text">
      <style:text-properties fo:language="fr" fo:country="FR" style:language-asian="en" style:country-asian="US" style:language-complex="ar" style:country-complex="SA"/>
    </style:style>
    <style:style style:name="ListLabel_20_239" style:display-name="ListLabel 239" style:family="text">
      <style:text-properties fo:language="fr" fo:country="FR" style:language-asian="en" style:country-asian="US" style:language-complex="ar" style:country-complex="SA"/>
    </style:style>
    <style:style style:name="ListLabel_20_240" style:display-name="ListLabel 240" style:family="text">
      <style:text-properties fo:language="fr" fo:country="FR" style:language-asian="en" style:country-asian="US" style:language-complex="ar" style:country-complex="SA"/>
    </style:style>
    <style:style style:name="ListLabel_20_241" style:display-name="ListLabel 241" style:family="text">
      <style:text-properties fo:language="fr" fo:country="FR" style:language-asian="en" style:country-asian="US" style:language-complex="ar" style:country-complex="SA"/>
    </style:style>
    <style:style style:name="ListLabel_20_242" style:display-name="ListLabel 242" style:family="text">
      <style:text-properties fo:language="fr" fo:country="FR" style:language-asian="en" style:country-asian="US" style:language-complex="ar" style:country-complex="SA"/>
    </style:style>
    <style:style style:name="ListLabel_20_243" style:display-name="ListLabel 243" style:family="text">
      <style:text-properties fo:language="fr" fo:country="FR" style:language-asian="en" style:country-asian="US" style:language-complex="ar" style:country-complex="SA"/>
    </style:style>
    <style:style style:name="ListLabel_20_244" style:display-name="ListLabel 244" style:family="text">
      <style:text-properties fo:language="fr" fo:country="FR" style:language-asian="en" style:country-asian="US" style:language-complex="ar" style:country-complex="SA"/>
    </style:style>
    <style:style style:name="ListLabel_20_245" style:display-name="ListLabel 245"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46" style:display-name="ListLabel 246" style:family="text">
      <style:text-properties fo:language="fr" fo:country="FR" style:language-asian="en" style:country-asian="US" style:language-complex="ar" style:country-complex="SA"/>
    </style:style>
    <style:style style:name="ListLabel_20_247" style:display-name="ListLabel 247" style:family="text">
      <style:text-properties fo:language="fr" fo:country="FR" style:language-asian="en" style:country-asian="US" style:language-complex="ar" style:country-complex="SA"/>
    </style:style>
    <style:style style:name="ListLabel_20_248" style:display-name="ListLabel 248" style:family="text">
      <style:text-properties fo:language="fr" fo:country="FR" style:language-asian="en" style:country-asian="US" style:language-complex="ar" style:country-complex="SA"/>
    </style:style>
    <style:style style:name="ListLabel_20_249" style:display-name="ListLabel 249" style:family="text">
      <style:text-properties fo:language="fr" fo:country="FR" style:language-asian="en" style:country-asian="US" style:language-complex="ar" style:country-complex="SA"/>
    </style:style>
    <style:style style:name="ListLabel_20_250" style:display-name="ListLabel 250" style:family="text">
      <style:text-properties fo:language="fr" fo:country="FR" style:language-asian="en" style:country-asian="US" style:language-complex="ar" style:country-complex="SA"/>
    </style:style>
    <style:style style:name="ListLabel_20_251" style:display-name="ListLabel 251" style:family="text">
      <style:text-properties fo:language="fr" fo:country="FR" style:language-asian="en" style:country-asian="US" style:language-complex="ar" style:country-complex="SA"/>
    </style:style>
    <style:style style:name="ListLabel_20_252" style:display-name="ListLabel 252" style:family="text">
      <style:text-properties fo:language="fr" fo:country="FR" style:language-asian="en" style:country-asian="US" style:language-complex="ar" style:country-complex="SA"/>
    </style:style>
    <style:style style:name="ListLabel_20_253" style:display-name="ListLabel 253" style:family="text">
      <style:text-properties fo:language="fr" fo:country="FR" style:language-asian="en" style:country-asian="US" style:language-complex="ar" style:country-complex="SA"/>
    </style:style>
    <style:style style:name="ListLabel_20_254" style:display-name="ListLabel 254"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55" style:display-name="ListLabel 255" style:family="text">
      <style:text-properties fo:language="fr" fo:country="FR" style:language-asian="en" style:country-asian="US" style:language-complex="ar" style:country-complex="SA"/>
    </style:style>
    <style:style style:name="ListLabel_20_256" style:display-name="ListLabel 256" style:family="text">
      <style:text-properties fo:language="fr" fo:country="FR" style:language-asian="en" style:country-asian="US" style:language-complex="ar" style:country-complex="SA"/>
    </style:style>
    <style:style style:name="ListLabel_20_257" style:display-name="ListLabel 257" style:family="text">
      <style:text-properties fo:language="fr" fo:country="FR" style:language-asian="en" style:country-asian="US" style:language-complex="ar" style:country-complex="SA"/>
    </style:style>
    <style:style style:name="ListLabel_20_258" style:display-name="ListLabel 258" style:family="text">
      <style:text-properties fo:language="fr" fo:country="FR" style:language-asian="en" style:country-asian="US" style:language-complex="ar" style:country-complex="SA"/>
    </style:style>
    <style:style style:name="ListLabel_20_259" style:display-name="ListLabel 259" style:family="text">
      <style:text-properties fo:language="fr" fo:country="FR" style:language-asian="en" style:country-asian="US" style:language-complex="ar" style:country-complex="SA"/>
    </style:style>
    <style:style style:name="ListLabel_20_260" style:display-name="ListLabel 260" style:family="text">
      <style:text-properties fo:language="fr" fo:country="FR" style:language-asian="en" style:country-asian="US" style:language-complex="ar" style:country-complex="SA"/>
    </style:style>
    <style:style style:name="ListLabel_20_261" style:display-name="ListLabel 261" style:family="text">
      <style:text-properties fo:language="fr" fo:country="FR" style:language-asian="en" style:country-asian="US" style:language-complex="ar" style:country-complex="SA"/>
    </style:style>
    <style:style style:name="ListLabel_20_262" style:display-name="ListLabel 262" style:family="text">
      <style:text-properties fo:language="fr" fo:country="FR" style:language-asian="en" style:country-asian="US" style:language-complex="ar" style:country-complex="SA"/>
    </style:style>
    <style:style style:name="ListLabel_20_263" style:display-name="ListLabel 263"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64" style:display-name="ListLabel 264" style:family="text">
      <style:text-properties fo:language="fr" fo:country="FR" style:language-asian="en" style:country-asian="US" style:language-complex="ar" style:country-complex="SA"/>
    </style:style>
    <style:style style:name="ListLabel_20_265" style:display-name="ListLabel 265" style:family="text">
      <style:text-properties fo:language="fr" fo:country="FR" style:language-asian="en" style:country-asian="US" style:language-complex="ar" style:country-complex="SA"/>
    </style:style>
    <style:style style:name="ListLabel_20_266" style:display-name="ListLabel 266" style:family="text">
      <style:text-properties fo:language="fr" fo:country="FR" style:language-asian="en" style:country-asian="US" style:language-complex="ar" style:country-complex="SA"/>
    </style:style>
    <style:style style:name="ListLabel_20_267" style:display-name="ListLabel 267" style:family="text">
      <style:text-properties fo:language="fr" fo:country="FR" style:language-asian="en" style:country-asian="US" style:language-complex="ar" style:country-complex="SA"/>
    </style:style>
    <style:style style:name="ListLabel_20_268" style:display-name="ListLabel 268" style:family="text">
      <style:text-properties fo:language="fr" fo:country="FR" style:language-asian="en" style:country-asian="US" style:language-complex="ar" style:country-complex="SA"/>
    </style:style>
    <style:style style:name="ListLabel_20_269" style:display-name="ListLabel 269" style:family="text">
      <style:text-properties fo:language="fr" fo:country="FR" style:language-asian="en" style:country-asian="US" style:language-complex="ar" style:country-complex="SA"/>
    </style:style>
    <style:style style:name="ListLabel_20_270" style:display-name="ListLabel 270" style:family="text">
      <style:text-properties fo:language="fr" fo:country="FR" style:language-asian="en" style:country-asian="US" style:language-complex="ar" style:country-complex="SA"/>
    </style:style>
    <style:style style:name="ListLabel_20_271" style:display-name="ListLabel 271" style:family="text">
      <style:text-properties fo:language="fr" fo:country="FR" style:language-asian="en" style:country-asian="US" style:language-complex="ar" style:country-complex="SA"/>
    </style:style>
    <style:style style:name="ListLabel_20_272" style:display-name="ListLabel 272"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73" style:display-name="ListLabel 273" style:family="text">
      <style:text-properties fo:language="fr" fo:country="FR" style:language-asian="en" style:country-asian="US" style:language-complex="ar" style:country-complex="SA"/>
    </style:style>
    <style:style style:name="ListLabel_20_274" style:display-name="ListLabel 274" style:family="text">
      <style:text-properties fo:language="fr" fo:country="FR" style:language-asian="en" style:country-asian="US" style:language-complex="ar" style:country-complex="SA"/>
    </style:style>
    <style:style style:name="ListLabel_20_275" style:display-name="ListLabel 275" style:family="text">
      <style:text-properties fo:language="fr" fo:country="FR" style:language-asian="en" style:country-asian="US" style:language-complex="ar" style:country-complex="SA"/>
    </style:style>
    <style:style style:name="ListLabel_20_276" style:display-name="ListLabel 276" style:family="text">
      <style:text-properties fo:language="fr" fo:country="FR" style:language-asian="en" style:country-asian="US" style:language-complex="ar" style:country-complex="SA"/>
    </style:style>
    <style:style style:name="ListLabel_20_277" style:display-name="ListLabel 277" style:family="text">
      <style:text-properties fo:language="fr" fo:country="FR" style:language-asian="en" style:country-asian="US" style:language-complex="ar" style:country-complex="SA"/>
    </style:style>
    <style:style style:name="ListLabel_20_278" style:display-name="ListLabel 278" style:family="text">
      <style:text-properties fo:language="fr" fo:country="FR" style:language-asian="en" style:country-asian="US" style:language-complex="ar" style:country-complex="SA"/>
    </style:style>
    <style:style style:name="ListLabel_20_279" style:display-name="ListLabel 279" style:family="text">
      <style:text-properties fo:language="fr" fo:country="FR" style:language-asian="en" style:country-asian="US" style:language-complex="ar" style:country-complex="SA"/>
    </style:style>
    <style:style style:name="ListLabel_20_280" style:display-name="ListLabel 280" style:family="text">
      <style:text-properties fo:language="fr" fo:country="FR" style:language-asian="en" style:country-asian="US" style:language-complex="ar" style:country-complex="SA"/>
    </style:style>
    <style:style style:name="ListLabel_20_281" style:display-name="ListLabel 281"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82" style:display-name="ListLabel 282" style:family="text">
      <style:text-properties fo:language="fr" fo:country="FR" style:language-asian="en" style:country-asian="US" style:language-complex="ar" style:country-complex="SA"/>
    </style:style>
    <style:style style:name="ListLabel_20_283" style:display-name="ListLabel 283" style:family="text">
      <style:text-properties fo:language="fr" fo:country="FR" style:language-asian="en" style:country-asian="US" style:language-complex="ar" style:country-complex="SA"/>
    </style:style>
    <style:style style:name="ListLabel_20_284" style:display-name="ListLabel 284" style:family="text">
      <style:text-properties fo:language="fr" fo:country="FR" style:language-asian="en" style:country-asian="US" style:language-complex="ar" style:country-complex="SA"/>
    </style:style>
    <style:style style:name="ListLabel_20_285" style:display-name="ListLabel 285" style:family="text">
      <style:text-properties fo:language="fr" fo:country="FR" style:language-asian="en" style:country-asian="US" style:language-complex="ar" style:country-complex="SA"/>
    </style:style>
    <style:style style:name="ListLabel_20_286" style:display-name="ListLabel 286" style:family="text">
      <style:text-properties fo:language="fr" fo:country="FR" style:language-asian="en" style:country-asian="US" style:language-complex="ar" style:country-complex="SA"/>
    </style:style>
    <style:style style:name="ListLabel_20_287" style:display-name="ListLabel 287" style:family="text">
      <style:text-properties fo:language="fr" fo:country="FR" style:language-asian="en" style:country-asian="US" style:language-complex="ar" style:country-complex="SA"/>
    </style:style>
    <style:style style:name="ListLabel_20_288" style:display-name="ListLabel 288" style:family="text">
      <style:text-properties fo:language="fr" fo:country="FR" style:language-asian="en" style:country-asian="US" style:language-complex="ar" style:country-complex="SA"/>
    </style:style>
    <style:style style:name="ListLabel_20_289" style:display-name="ListLabel 289" style:family="text">
      <style:text-properties fo:language="fr" fo:country="FR" style:language-asian="en" style:country-asian="US" style:language-complex="ar" style:country-complex="SA"/>
    </style:style>
    <style:style style:name="ListLabel_20_290" style:display-name="ListLabel 290"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91" style:display-name="ListLabel 291" style:family="text">
      <style:text-properties fo:language="fr" fo:country="FR" style:language-asian="en" style:country-asian="US" style:language-complex="ar" style:country-complex="SA"/>
    </style:style>
    <style:style style:name="ListLabel_20_292" style:display-name="ListLabel 292" style:family="text">
      <style:text-properties fo:language="fr" fo:country="FR" style:language-asian="en" style:country-asian="US" style:language-complex="ar" style:country-complex="SA"/>
    </style:style>
    <style:style style:name="ListLabel_20_293" style:display-name="ListLabel 293" style:family="text">
      <style:text-properties fo:language="fr" fo:country="FR" style:language-asian="en" style:country-asian="US" style:language-complex="ar" style:country-complex="SA"/>
    </style:style>
    <style:style style:name="ListLabel_20_294" style:display-name="ListLabel 294" style:family="text">
      <style:text-properties fo:language="fr" fo:country="FR" style:language-asian="en" style:country-asian="US" style:language-complex="ar" style:country-complex="SA"/>
    </style:style>
    <style:style style:name="ListLabel_20_295" style:display-name="ListLabel 295" style:family="text">
      <style:text-properties fo:language="fr" fo:country="FR" style:language-asian="en" style:country-asian="US" style:language-complex="ar" style:country-complex="SA"/>
    </style:style>
    <style:style style:name="ListLabel_20_296" style:display-name="ListLabel 296" style:family="text">
      <style:text-properties fo:language="fr" fo:country="FR" style:language-asian="en" style:country-asian="US" style:language-complex="ar" style:country-complex="SA"/>
    </style:style>
    <style:style style:name="ListLabel_20_297" style:display-name="ListLabel 297" style:family="text">
      <style:text-properties fo:language="fr" fo:country="FR" style:language-asian="en" style:country-asian="US" style:language-complex="ar" style:country-complex="SA"/>
    </style:style>
    <style:style style:name="ListLabel_20_298" style:display-name="ListLabel 298" style:family="text">
      <style:text-properties fo:language="fr" fo:country="FR" style:language-asian="en" style:country-asian="US" style:language-complex="ar" style:country-complex="SA"/>
    </style:style>
    <style:style style:name="ListLabel_20_299" style:display-name="ListLabel 299" style:family="text">
      <style:text-properties style:font-name="Times New Roman" fo:font-family="'Times New Roman'" style:font-family-generic="roman" style:font-pitch="variable" fo:font-size="11pt" fo:letter-spacing="normal" fo:language="fr" fo:country="FR"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300" style:display-name="ListLabel 300" style:family="text">
      <style:text-properties fo:language="fr" fo:country="FR" style:language-asian="en" style:country-asian="US" style:language-complex="ar" style:country-complex="SA"/>
    </style:style>
    <style:style style:name="ListLabel_20_301" style:display-name="ListLabel 301" style:family="text">
      <style:text-properties fo:language="fr" fo:country="FR" style:language-asian="en" style:country-asian="US" style:language-complex="ar" style:country-complex="SA"/>
    </style:style>
    <style:style style:name="ListLabel_20_302" style:display-name="ListLabel 302" style:family="text">
      <style:text-properties fo:language="fr" fo:country="FR" style:language-asian="en" style:country-asian="US" style:language-complex="ar" style:country-complex="SA"/>
    </style:style>
    <style:style style:name="ListLabel_20_303" style:display-name="ListLabel 303" style:family="text">
      <style:text-properties fo:language="fr" fo:country="FR" style:language-asian="en" style:country-asian="US" style:language-complex="ar" style:country-complex="SA"/>
    </style:style>
    <style:style style:name="ListLabel_20_304" style:display-name="ListLabel 304" style:family="text">
      <style:text-properties fo:language="fr" fo:country="FR" style:language-asian="en" style:country-asian="US" style:language-complex="ar" style:country-complex="SA"/>
    </style:style>
    <style:style style:name="ListLabel_20_305" style:display-name="ListLabel 305" style:family="text">
      <style:text-properties fo:language="fr" fo:country="FR" style:language-asian="en" style:country-asian="US" style:language-complex="ar" style:country-complex="SA"/>
    </style:style>
    <style:style style:name="ListLabel_20_306" style:display-name="ListLabel 306" style:family="text">
      <style:text-properties fo:language="fr" fo:country="FR" style:language-asian="en" style:country-asian="US" style:language-complex="ar" style:country-complex="SA"/>
    </style:style>
    <style:style style:name="ListLabel_20_307" style:display-name="ListLabel 307" style:family="text">
      <style:text-properties style:font-name="Calibri" fo:font-family="Calibri" style:font-family-generic="roman" style:font-pitch="variable"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08" style:display-name="ListLabel 308" style:family="text">
      <style:text-properties fo:color="#0000ff" loext:opacity="100%" style:font-name="Calibri" fo:font-family="Calibri" style:font-family-generic="roman" style:font-pitch="variable" fo:font-size="9pt" style:text-underline-style="solid" style:text-underline-width="auto" style:text-underline-color="#0000ff" style:font-size-asian="9pt"/>
    </style:style>
    <style:style style:name="ListLabel_20_309" style:display-name="ListLabel 309" style:family="text">
      <style:text-properties fo:color="#0000ff" loext:opacity="100%" style:font-name="Calibri" fo:font-family="Calibri" style:font-family-generic="roman" style:font-pitch="variable" fo:font-size="9pt" fo:letter-spacing="-0.0043in" style:text-underline-style="solid" style:text-underline-width="auto" style:text-underline-color="#0000ff" style:font-size-asian="9pt"/>
    </style:style>
    <style:style style:name="ListLabel_20_310" style:display-name="ListLabel 310" style:family="text">
      <style:text-properties fo:color="#0000ff" loext:opacity="100%" style:font-name="Calibri" fo:font-family="Calibri" style:font-family-generic="roman" style:font-pitch="variable" fo:font-size="9pt" fo:letter-spacing="-0.0016in" style:text-underline-style="solid" style:text-underline-width="auto" style:text-underline-color="#0000ff" style:font-size-asian="9pt"/>
    </style:style>
    <style:style style:name="ListLabel_20_311" style:display-name="ListLabel 311" style:family="text"/>
    <style:style style:name="ListLabel_20_312" style:display-name="ListLabel 312" style:family="text">
      <style:text-properties fo:letter-spacing="-0.0016in"/>
    </style:style>
    <style:style style:name="ListLabel_20_313" style:display-name="ListLabel 313" style:family="text">
      <style:text-properties fo:letter-spacing="-0.002in"/>
    </style:style>
    <style:style style:name="ListLabel_20_314" style:display-name="ListLabel 314" style:family="text">
      <style:text-properties fo:letter-spacing="-0.0071in"/>
    </style:style>
    <style:style style:name="ListLabel_20_315" style:display-name="ListLabel 315" style:family="text">
      <style:text-properties fo:letter-spacing="-0.0008in"/>
    </style:style>
    <style:style style:name="ListLabel_20_316" style:display-name="ListLabel 316" style:family="text">
      <style:text-properties fo:letter-spacing="-0.0035in"/>
    </style:style>
    <style:style style:name="ListLabel_20_317" style:display-name="ListLabel 317" style:family="text">
      <style:text-properties fo:letter-spacing="-0.0063in"/>
    </style:style>
    <style:style style:name="ListLabel_20_318" style:display-name="ListLabel 318" style:family="text">
      <style:text-properties fo:letter-spacing="-0.0055in"/>
    </style:style>
    <style:style style:name="ListLabel_20_319" style:display-name="ListLabel 319" style:family="text">
      <style:text-properties fo:letter-spacing="-0.0047in"/>
    </style:style>
    <style:style style:name="ListLabel_20_320" style:display-name="ListLabel 320" style:family="text">
      <style:text-properties style:font-name="Calibri" fo:font-family="Calibri" style:font-family-generic="roman" style:font-pitch="variable" fo:letter-spacing="-0.0035in"/>
    </style:style>
    <style:style style:name="ListLabel_20_321" style:display-name="ListLabel 321" style:family="text">
      <style:text-properties fo:letter-spacing="-0.0043in"/>
    </style:style>
    <style:style style:name="ListLabel_20_322" style:display-name="ListLabel 322" style:family="text">
      <style:text-properties fo:letter-spacing="-0.0028in"/>
    </style:style>
    <style:style style:name="ListLabel_20_323" style:display-name="ListLabel 323" style:family="text">
      <style:text-properties fo:letter-spacing="-0.0075in"/>
    </style:style>
    <style:style style:name="ListLabel_20_324" style:display-name="ListLabel 324" style:family="text">
      <style:text-properties fo:letter-spacing="-0.0083in"/>
    </style:style>
    <style:style style:name="ListLabel_20_325" style:display-name="ListLabel 325" style:family="text">
      <style:text-properties style:font-name="Calibri" fo:font-family="Calibri" style:font-family-generic="roman" style:font-pitch="variable"/>
    </style:style>
    <style:style style:name="ListLabel_20_326" style:display-name="ListLabel 326" style:family="text">
      <style:text-properties style:font-name="Calibri" fo:font-family="Calibri" style:font-family-generic="roman" style:font-pitch="variable" fo:letter-spacing="-0.0016in"/>
    </style:style>
    <style:style style:name="ListLabel_20_327" style:display-name="ListLabel 327" style:family="text">
      <style:text-properties style:font-name="Calibri" fo:font-family="Calibri" style:font-family-generic="roman" style:font-pitch="variable" fo:letter-spacing="-0.0008in"/>
    </style:style>
    <style:style style:name="ListLabel_20_328" style:display-name="ListLabel 328" style:family="text">
      <style:text-properties style:font-name="Calibri" fo:font-family="Calibri" style:font-family-generic="roman" style:font-pitch="variable" fo:letter-spacing="0.0008in"/>
    </style:style>
    <style:style style:name="ListLabel_20_329" style:display-name="ListLabel 329" style:family="text">
      <style:text-properties style:font-name="Calibri" fo:font-family="Calibri" style:font-family-generic="roman" style:font-pitch="variable" fo:letter-spacing="-0.002in"/>
    </style:style>
    <style:style style:name="ListLabel_20_330" style:display-name="ListLabel 330" style:family="text">
      <style:text-properties style:font-name="Calibri" fo:font-family="Calibri" style:font-family-generic="roman" style:font-pitch="variable" fo:letter-spacing="0.0016in"/>
    </style:style>
    <style:style style:name="ListLabel_20_331" style:display-name="ListLabel 331" style:family="text">
      <style:text-properties fo:font-weight="normal" style:font-weight-asian="normal"/>
    </style:style>
    <style:style style:name="ListLabel_20_332" style:display-name="ListLabel 332" style:family="text">
      <style:text-properties style:font-name="Calibri" fo:font-family="Calibri" style:font-family-generic="roman" style:font-pitch="variable" fo:letter-spacing="-0.0028in"/>
    </style:style>
    <style:style style:name="ListLabel_20_333" style:display-name="ListLabel 333" style:family="text">
      <style:text-properties style:font-name="Calibri" fo:font-family="Calibri" style:font-family-generic="roman" style:font-pitch="variable" fo:letter-spacing="0.0366in"/>
    </style:style>
    <style:style style:name="ListLabel_20_334" style:display-name="ListLabel 334" style:family="text">
      <style:text-properties style:font-name="Calibri" fo:font-family="Calibri" style:font-family-generic="roman" style:font-pitch="variable" fo:letter-spacing="-0.0043in"/>
    </style:style>
    <style:style style:name="ListLabel_20_335" style:display-name="ListLabel 335" style:family="text">
      <style:text-properties style:font-name="Calibri" fo:font-family="Calibri" style:font-family-generic="roman" style:font-pitch="variable" fo:font-size="11pt" style:font-size-asian="11pt"/>
    </style:style>
    <style:style style:name="ListLabel_20_336" style:display-name="ListLabel 336" style:family="text">
      <style:text-properties style:font-name="Calibri" fo:font-family="Calibri" style:font-family-generic="roman" style:font-pitch="variable" fo:font-size="11pt" fo:letter-spacing="-0.0047in" style:font-size-asian="11pt"/>
    </style:style>
    <style:style style:name="ListLabel_20_337" style:display-name="ListLabel 337" style:family="text">
      <style:text-properties style:font-name="Calibri" fo:font-family="Calibri" style:font-family-generic="roman" style:font-pitch="variable" fo:font-size="11pt" fo:letter-spacing="-0.0035in" style:font-size-asian="11pt"/>
    </style:style>
    <style:style style:name="ListLabel_20_338" style:display-name="ListLabel 338" style:family="text">
      <style:text-properties style:font-name="Calibri" fo:font-family="Calibri" style:font-family-generic="roman" style:font-pitch="variable" fo:font-size="11pt" fo:letter-spacing="-0.0028in" style:font-size-asian="11pt"/>
    </style:style>
    <style:style style:name="ListLabel_20_339" style:display-name="ListLabel 339" style:family="text">
      <style:text-properties style:font-name="Calibri" fo:font-family="Calibri" style:font-family-generic="roman" style:font-pitch="variable" fo:font-size="11pt" fo:letter-spacing="-0.0043in" style:font-size-asian="11pt"/>
    </style:style>
    <style:style style:name="ListLabel_20_340" style:display-name="ListLabel 340" style:family="text">
      <style:text-properties style:font-name="Calibri" fo:font-family="Calibri" style:font-family-generic="roman" style:font-pitch="variable" fo:font-size="11pt" fo:letter-spacing="-0.0016in" style:font-size-asian="11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loext:num-list-format="" style:num-suffix="" text:bullet-char="">
        <style:list-level-properties text:list-level-position-and-space-mode="label-alignment">
          <style:list-level-label-alignment text:label-followed-by="listtab" fo:text-indent="-0.2508in" fo:margin-left="0.6071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08in" fo:margin-left="1.317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0"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08in" fo:margin-left="1.317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9"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08in" fo:margin-left="1.3173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 loext:num-list-format="%1%" style:num-format="1" text:start-value="5">
        <style:list-level-properties text:list-level-position-and-space-mode="label-alignment">
          <style:list-level-label-alignment text:label-followed-by="listtab" fo:text-indent="-0.3134in" fo:margin-left="0.9118in"/>
        </style:list-level-properties>
      </text:list-level-style-number>
      <text:list-level-style-number text:level="2" text:style-name="ListLabel_20_29" loext:num-list-format="%1%.%2%" style:num-format="1" text:start-value="4" text:display-levels="2">
        <style:list-level-properties text:list-level-position-and-space-mode="label-alignment">
          <style:list-level-label-alignment text:label-followed-by="listtab" fo:text-indent="-0.3134in" fo:margin-left="0.9118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3134in" fo:margin-left="1.1217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134in" fo:margin-left="1.2244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134in" fo:margin-left="1.3264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134in" fo:margin-left="1.4291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134in" fo:margin-left="1.5319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134in" fo:margin-left="1.63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134in" fo:margin-left="1.736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7" loext:num-list-format="" style:num-suffix="" text:bullet-char="">
        <style:list-level-properties text:list-level-position-and-space-mode="label-alignment">
          <style:list-level-label-alignment text:label-followed-by="listtab" fo:text-indent="-0.2508in" fo:margin-left="0.6071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08in" fo:margin-left="1.3173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3138in" fo:margin-left="1.6673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138in" fo:margin-left="2.4189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138in" fo:margin-left="3.170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138in" fo:margin-left="3.9217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138in" fo:margin-left="4.6728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138in" fo:margin-left="5.424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138in" fo:margin-left="6.17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55" loext:num-list-format="%1%" style:num-format="1" text:start-value="4">
        <style:list-level-properties text:list-level-position-and-space-mode="label-alignment">
          <style:list-level-label-alignment text:label-followed-by="listtab" fo:text-indent="-0.3138in" fo:margin-left="0.9118in"/>
        </style:list-level-properties>
      </text:list-level-style-number>
      <text:list-level-style-number text:level="2" text:style-name="ListLabel_20_56" loext:num-list-format="%1%.%2%" style:num-format="1" text:start-value="3"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3138in" fo:margin-left="1.1154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138in" fo:margin-left="1.2146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138in" fo:margin-left="1.3146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138in" fo:margin-left="1.4138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138in" fo:margin-left="1.5134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138in" fo:margin-left="1.613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138in" fo:margin-left="1.712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4" loext:num-list-format="" style:num-suffix="" text:bullet-char="">
        <style:list-level-properties text:list-level-position-and-space-mode="label-alignment">
          <style:list-level-label-alignment text:label-followed-by="listtab" fo:text-indent="-0.25in" fo:margin-left="0.4346in"/>
        </style:list-level-properties>
        <style:text-properties fo:font-family="Wingdings"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0972in" fo:margin-left="0.4535in"/>
        </style:list-level-properties>
        <style:text-properties fo:font-family="'Times New Roman'"/>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0972in" fo:margin-left="1.260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0972in" fo:margin-left="2.0626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0972in" fo:margin-left="2.8646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0972in" fo:margin-left="3.667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0972in" fo:margin-left="4.4693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0972in" fo:margin-left="5.2717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0972in" fo:margin-left="6.073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73" loext:num-list-format="%1%" style:num-format="1" text:start-value="4">
        <style:list-level-properties text:list-level-position-and-space-mode="label-alignment">
          <style:list-level-label-alignment text:label-followed-by="listtab" fo:text-indent="-0.3138in" fo:margin-left="0.9118in"/>
        </style:list-level-properties>
      </text:list-level-style-number>
      <text:list-level-style-number text:level="2" text:style-name="ListLabel_20_74" loext:num-list-format="%1%.%2%" style:num-format="1" text:start-value="3"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3138in" fo:margin-left="2.2689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138in" fo:margin-left="2.945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138in" fo:margin-left="3.6209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138in" fo:margin-left="4.2972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138in" fo:margin-left="4.9736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138in" fo:margin-left="5.6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138in" fo:margin-left="6.32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82" loext:num-list-format="%1%" style:num-format="1" text:start-value="4">
        <style:list-level-properties text:list-level-position-and-space-mode="label-alignment">
          <style:list-level-label-alignment text:label-followed-by="listtab" fo:text-indent="-0.3138in" fo:margin-left="0.9118in"/>
        </style:list-level-properties>
      </text:list-level-style-number>
      <text:list-level-style-number text:level="2" text:style-name="ListLabel_20_83" loext:num-list-format="%1%.%2%" style:num-format="1" text:start-value="3"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3138in" fo:margin-left="2.2689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3138in" fo:margin-left="2.945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3138in" fo:margin-left="3.6209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3138in" fo:margin-left="4.2972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138in" fo:margin-left="4.9736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138in" fo:margin-left="5.6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138in" fo:margin-left="6.32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1" loext:num-list-format="%1%" style:num-format="1" text:start-value="4">
        <style:list-level-properties text:list-level-position-and-space-mode="label-alignment">
          <style:list-level-label-alignment text:label-followed-by="listtab" fo:text-indent="-0.3138in" fo:margin-left="0.9118in"/>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3138in" fo:margin-left="2.2689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3138in" fo:margin-left="2.945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3138in" fo:margin-left="3.6209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3138in" fo:margin-left="4.2972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3138in" fo:margin-left="4.9736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3138in" fo:margin-left="5.6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3138in" fo:margin-left="6.32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0"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508in" fo:margin-left="0.6071in"/>
        </style:list-level-properties>
        <style:text-properties fo:font-family="Symbol"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9"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2508in" fo:margin-left="0.6071in"/>
        </style:list-level-properties>
        <style:text-properties fo:font-family="Symbol"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18" loext:num-list-format="" style:num-suffix="" text:bullet-char="">
        <style:list-level-properties text:list-level-position-and-space-mode="label-alignment">
          <style:list-level-label-alignment text:label-followed-by="listtab" fo:text-indent="-0.2484in" fo:margin-left="0.2764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484in" fo:margin-left="1.0173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484in" fo:margin-left="1.757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484in" fo:margin-left="2.498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484in" fo:margin-left="3.2374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484in" fo:margin-left="3.978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484in" fo:margin-left="4.7181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484in" fo:margin-left="5.4583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484in" fo:margin-left="6.1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7" loext:num-list-format="" style:num-suffix="" text:bullet-char="">
        <style:list-level-properties text:list-level-position-and-space-mode="label-alignment">
          <style:list-level-label-alignment text:label-followed-by="listtab" fo:text-indent="-0.2484in" fo:margin-left="0.2764in"/>
        </style:list-level-properties>
        <style:text-properties fo:font-family="Wingdings"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484in" fo:margin-left="1.0173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484in" fo:margin-left="1.757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484in" fo:margin-left="2.498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484in" fo:margin-left="3.2374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484in" fo:margin-left="3.978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484in" fo:margin-left="4.7181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484in" fo:margin-left="5.4583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484in" fo:margin-left="6.1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6" loext:num-list-format="-" style:num-suffix="-" text:bullet-char="-">
        <style:list-level-properties text:list-level-position-and-space-mode="label-alignment">
          <style:list-level-label-alignment text:label-followed-by="listtab" fo:text-indent="-0.0972in" fo:margin-left="0.1071in"/>
        </style:list-level-properties>
        <style:text-properties fo:font-family="'Times New Roman'"/>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0972in" fo:margin-left="0.8673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0972in" fo:margin-left="1.6244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0972in" fo:margin-left="2.3811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0972in" fo:margin-left="3.1374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0972in" fo:margin-left="3.894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0972in" fo:margin-left="4.6516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0972in" fo:margin-left="5.4083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0972in" fo:margin-left="6.1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5"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25in" fo:margin-left="1.107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8402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5701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3.3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4.0299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4.7598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5.489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6.2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54" loext:num-list-format="%1%." style:num-suffix="." style:num-format="1">
        <style:list-level-properties text:list-level-position-and-space-mode="label-alignment">
          <style:list-level-label-alignment text:label-followed-by="listtab" fo:text-indent="-0.2508in" fo:margin-left="0.6071in"/>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25in" fo:margin-left="1.107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8402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5701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3.3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4.0299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4.7598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5.489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6.2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63" loext:num-list-format="" style:num-suffix="" text:bullet-char="">
        <style:list-level-properties text:list-level-position-and-space-mode="label-alignment">
          <style:list-level-label-alignment text:label-followed-by="listtab" fo:text-indent="-0.2508in" fo:margin-left="0.6071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08in" fo:margin-left="1.3173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08in" fo:margin-left="2.0244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08in" fo:margin-left="2.7311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08in" fo:margin-left="3.4374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08in" fo:margin-left="4.144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08in" fo:margin-left="4.8516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08in" fo:margin-left="5.5583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08in" fo:margin-left="6.2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72" loext:num-list-format="%1%" style:num-format="1" text:start-value="2">
        <style:list-level-properties text:list-level-position-and-space-mode="label-alignment">
          <style:list-level-label-alignment text:label-followed-by="listtab" fo:text-indent="-0.3138in" fo:margin-left="0.9118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fo:text-indent="-0.3138in" fo:margin-left="2.2689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3138in" fo:margin-left="2.9453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3138in" fo:margin-left="3.6209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3138in" fo:margin-left="4.2972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3138in" fo:margin-left="4.9736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3138in" fo:margin-left="5.6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3138in" fo:margin-left="6.32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81" loext:num-list-format="%1%." style:num-suffix="." style:num-format="1">
        <style:list-level-properties text:list-level-position-and-space-mode="label-alignment">
          <style:list-level-label-alignment text:label-followed-by="listtab" fo:text-indent="-0.1665in" fo:margin-left="0.2736in"/>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3138in" fo:margin-left="0.9118in"/>
        </style:list-level-properties>
      </text:list-level-style-number>
      <text:list-level-style-bullet text:level="3" text:style-name="ListLabel_20_183" loext:num-list-format="•" style:num-suffix="•" text:bullet-char="•">
        <style:list-level-properties text:list-level-position-and-space-mode="label-alignment">
          <style:list-level-label-alignment text:label-followed-by="listtab" fo:text-indent="-0.3138in" fo:margin-left="1.6673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3138in" fo:margin-left="2.4189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3138in" fo:margin-left="3.1701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3138in" fo:margin-left="3.9217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3138in" fo:margin-left="4.6728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3138in" fo:margin-left="5.4244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3138in" fo:margin-left="6.17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90" loext:num-list-format="%1%." style:num-suffix="." style:num-format="1">
        <style:list-level-properties text:list-level-position-and-space-mode="label-alignment">
          <style:list-level-label-alignment text:label-followed-by="listtab" fo:text-indent="-0.1665in" fo:margin-left="0.1071in"/>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1665in" fo:margin-left="0.8673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1665in" fo:margin-left="1.6244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1665in" fo:margin-left="2.3811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1665in" fo:margin-left="3.1374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1665in" fo:margin-left="3.894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1665in" fo:margin-left="4.6516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1665in" fo:margin-left="5.4083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1665in" fo:margin-left="6.1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99" loext:num-list-format="" style:num-suffix="" text:bullet-char="">
        <style:list-level-properties text:list-level-position-and-space-mode="label-alignment">
          <style:list-level-label-alignment text:label-followed-by="listtab" fo:text-indent="-0.25in" fo:margin-left="0.316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0547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7909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527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3.2626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9984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4.7346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5.4709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6.20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08" loext:num-list-format="-" style:num-suffix="-" text:bullet-char="-">
        <style:list-level-properties text:list-level-position-and-space-mode="label-alignment">
          <style:list-level-label-alignment text:label-followed-by="listtab" fo:text-indent="-0.1055in" fo:margin-left="0.1071in"/>
        </style:list-level-properties>
        <style:text-properties fo:font-family="'Times New Roman'"/>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1055in" fo:margin-left="0.8673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1055in" fo:margin-left="1.6244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1055in" fo:margin-left="2.3811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1055in" fo:margin-left="3.1374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1055in" fo:margin-left="3.894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1055in" fo:margin-left="4.6516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1055in" fo:margin-left="5.4083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1055in" fo:margin-left="6.1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17" loext:num-list-format="%1%" style:num-format="1">
        <style:list-level-properties text:list-level-position-and-space-mode="label-alignment">
          <style:list-level-label-alignment text:label-followed-by="listtab" fo:text-indent="-0.3138in" fo:margin-left="0.9118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3138in" fo:margin-left="0.9118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4689in" fo:margin-left="0.8535in"/>
        </style:list-level-properties>
      </text:list-level-style-number>
      <text:list-level-style-bullet text:level="4" text:style-name="ListLabel_20_220" loext:num-list-format="•" style:num-suffix="•" text:bullet-char="•">
        <style:list-level-properties text:list-level-position-and-space-mode="label-alignment">
          <style:list-level-label-alignment text:label-followed-by="listtab" fo:text-indent="-0.4689in" fo:margin-left="2.4189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4689in" fo:margin-left="3.1701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4689in" fo:margin-left="3.9217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4689in" fo:margin-left="4.6728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4689in" fo:margin-left="5.424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4689in" fo:margin-left="6.17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26" loext:num-list-format="%1%" style:num-format="1" text:start-value="5">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27" loext:num-list-format="%1%.%2%" style:num-format="1" text:start-value="4"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28"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35" loext:num-list-format="%1%" style:num-format="1" text:start-value="5">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37"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44" loext:num-list-format="%1%" style:num-format="1" text:start-value="4">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45" loext:num-list-format="%1%.%2%" style:num-format="1" text:start-value="3"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46"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53" loext:num-list-format="%1%" style:num-format="1" text:start-value="4">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54" loext:num-list-format="%1%.%2%" style:num-format="1" text:start-value="3"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55"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2" loext:num-list-format="%1%" style:num-format="1" text:start-value="4">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63" loext:num-list-format="%1%.%2%" style:num-format="1" text:start-value="3"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64"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71" loext:num-list-format="%1%" style:num-format="1" text:start-value="4">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73"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80" loext:num-list-format="%1%" style:num-format="1" text:start-value="3">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82"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9" loext:num-list-format="%1%" style:num-format="1" text:start-value="2">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291"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98" loext:num-list-format="%1%" style:num-format="1">
        <style:list-level-properties text:list-level-position-and-space-mode="label-alignment">
          <style:list-level-label-alignment text:label-followed-by="listtab" fo:text-indent="-0.2307in" fo:margin-left="0.4902in"/>
        </style:list-level-properties>
      </text:list-level-style-number>
      <text:list-level-style-number text:level="2" text:style-name="ListLabel_20_299" loext:num-list-format="%1%.%2%" style:num-format="1" text:display-levels="2">
        <style:list-level-properties text:list-level-position-and-space-mode="label-alignment">
          <style:list-level-label-alignment text:label-followed-by="listtab" fo:text-indent="-0.2307in" fo:margin-left="0.4902in"/>
        </style:list-level-properties>
      </text:list-level-style-number>
      <text:list-level-style-bullet text:level="3" text:style-name="ListLabel_20_300" loext:num-list-format="•" style:num-suffix="•" text:bullet-char="•">
        <style:list-level-properties text:list-level-position-and-space-mode="label-alignment">
          <style:list-level-label-alignment text:label-followed-by="listtab" fo:text-indent="-0.2307in" fo:margin-left="1.9244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307in" fo:margin-left="2.6437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307in" fo:margin-left="3.3626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307in" fo:margin-left="4.0819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307in" fo:margin-left="4.8016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307in" fo:margin-left="5.5209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307in" fo:margin-left="6.2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9.5pt" style:font-size-asian="9.5pt"/>
    </style:style>
    <style:style style:name="MP2" style:family="paragraph" style:parent-style-name="Frame_20_contents">
      <style:paragraph-properties fo:margin-left="0.0138in" fo:margin-right="0in" fo:margin-top="0in" fo:margin-bottom="0in" style:contextual-spacing="false" fo:line-height="0.1701in" fo:text-align="left" style:justify-single-word="false" fo:text-indent="0in" style:auto-text-indent="false"/>
    </style:style>
    <style:style style:name="MP3" style:family="paragraph">
      <loext:graphic-properties draw:fill="none"/>
      <style:paragraph-properties fo:text-align="left"/>
      <style:text-properties fo:font-size="18pt"/>
    </style:style>
    <style:style style:name="MT1" style:family="text">
      <style:text-properties fo:font-size="9.5pt" style:font-size-asian="9.5pt"/>
    </style:style>
    <style:style style:name="MT2" style:family="text">
      <style:text-properties style:font-name="Calibri" fo:font-size="11pt" style:font-size-asian="11pt"/>
    </style:style>
    <style:style style:name="MT3" style:family="text">
      <style:text-properties style:font-name="Calibri" fo:font-size="11pt" fo:letter-spacing="-0.0035in" style:font-size-asian="11pt"/>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loext:fill-use-slide-background="false" draw:textarea-vertical-align="top" draw:auto-grow-height="false" fo:min-height="0.1819in" fo:min-width="0.18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3055in" fo:margin-bottom="0.1945in" fo:margin-left="0.3929in" fo:margin-right="0.19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445in" fo:margin-bottom="0.6535in" fo:margin-left="0.3929in" fo:margin-right="0.1965in" style:writing-mode="lr-tb" style:layout-grid-color="#c0c0c0" style:layout-grid-lines="26031"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465in" fo:margin-left="0in" fo:margin-right="0in" fo:margin-top="0.3071in" style:dynamic-spacing="true"/>
      </style:footer-style>
    </style:page-layout>
    <style:page-layout style:name="Mpm3">
      <style:page-layout-properties fo:page-width="8.2681in" fo:page-height="11.6929in" style:num-format="1" style:print-orientation="portrait" fo:margin-top="0.4445in" fo:margin-bottom="0.6535in" fo:margin-left="0.3929in" fo:margin-right="0.1965in" style:writing-mode="lr-tb" style:layout-grid-color="#c0c0c0" style:layout-grid-lines="2652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4">
      <style:page-layout-properties fo:page-width="8.2681in" fo:page-height="11.6929in" style:num-format="1" style:print-orientation="portrait" fo:margin-top="0.9862in" fo:margin-bottom="0.6535in" fo:margin-left="0.3929in" fo:margin-right="0.1965in" style:writing-mode="lr-tb" style:layout-grid-color="#c0c0c0" style:layout-grid-lines="2514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5">
      <style:page-layout-properties fo:page-width="8.2681in" fo:page-height="11.6929in" style:num-format="1" style:print-orientation="portrait" fo:margin-top="0.9583in" fo:margin-bottom="0.6535in" fo:margin-left="0.3929in" fo:margin-right="0.1965in" style:writing-mode="lr-tb" style:layout-grid-color="#c0c0c0" style:layout-grid-lines="2522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6">
      <style:page-layout-properties fo:page-width="8.2681in" fo:page-height="11.6929in" style:num-format="1" style:print-orientation="portrait" fo:margin-top="0.8752in" fo:margin-bottom="0.6535in" fo:margin-left="0.3929in" fo:margin-right="0.1965in" style:writing-mode="lr-tb" style:layout-grid-color="#c0c0c0" style:layout-grid-lines="25431"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7">
      <style:page-layout-properties fo:page-width="8.2681in" fo:page-height="11.6929in" style:num-format="1" style:print-orientation="portrait" fo:margin-top="0.7917in" fo:margin-bottom="0.6535in" fo:margin-left="0.3929in" fo:margin-right="0.1965in" style:writing-mode="lr-tb" style:layout-grid-color="#c0c0c0" style:layout-grid-lines="2564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8">
      <style:page-layout-properties fo:page-width="8.2681in" fo:page-height="11.6929in" style:num-format="1" style:print-orientation="portrait" fo:margin-top="1.028in" fo:margin-bottom="0.6535in" fo:margin-left="0.3929in" fo:margin-right="0.1965in" style:writing-mode="lr-tb" style:layout-grid-color="#c0c0c0" style:layout-grid-lines="2504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9">
      <style:page-layout-properties fo:page-width="8.2681in" fo:page-height="11.6929in" style:num-format="1" style:print-orientation="portrait" fo:margin-top="0.7638in" fo:margin-bottom="0.6535in" fo:margin-left="0.3929in" fo:margin-right="0.1965in" style:writing-mode="lr-tb" style:layout-grid-color="#c0c0c0" style:layout-grid-lines="2571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0">
      <style:page-layout-properties fo:page-width="8.2681in" fo:page-height="11.6929in" style:num-format="1" style:print-orientation="portrait" fo:margin-top="0.5555in" fo:margin-bottom="0.6535in" fo:margin-left="0.3929in" fo:margin-right="0.1965in" style:writing-mode="lr-tb" style:layout-grid-color="#c0c0c0" style:layout-grid-lines="2624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1">
      <style:page-layout-properties fo:page-width="8.2681in" fo:page-height="11.6929in" style:num-format="1" style:print-orientation="portrait" fo:margin-top="0.5693in" fo:margin-bottom="0.6535in" fo:margin-left="0.3929in" fo:margin-right="0.1965in" style:writing-mode="lr-tb" style:layout-grid-color="#c0c0c0" style:layout-grid-lines="2624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82in" fo:margin-left="0in" fo:margin-right="0in" fo:margin-top="0.0984in" style:dynamic-spacing="true"/>
      </style:footer-style>
    </style:page-layout>
    <style:page-layout style:name="Mpm12">
      <style:page-layout-properties fo:page-width="8.2681in" fo:page-height="11.6929in" style:num-format="1" style:print-orientation="portrait" fo:margin-top="0.5835in" fo:margin-bottom="0.6535in" fo:margin-left="0.3929in" fo:margin-right="0.1965in" style:writing-mode="lr-tb" style:layout-grid-color="#c0c0c0" style:layout-grid-lines="2617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3">
      <style:page-layout-properties fo:page-width="8.2681in" fo:page-height="11.6929in" style:num-format="1" style:print-orientation="portrait" fo:margin-top="0.5693in" fo:margin-bottom="0.6535in" fo:margin-left="0.3929in" fo:margin-right="0.1965in" style:writing-mode="lr-tb" style:layout-grid-color="#c0c0c0" style:layout-grid-lines="2620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4">
      <style:page-layout-properties fo:page-width="8.2681in" fo:page-height="11.6929in" style:num-format="1" style:print-orientation="portrait" fo:margin-top="0.6528in" fo:margin-bottom="0.6535in" fo:margin-left="0.3929in" fo:margin-right="0.1965in" style:writing-mode="lr-tb" style:layout-grid-color="#c0c0c0" style:layout-grid-lines="25996"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5">
      <style:page-layout-properties fo:page-width="8.2681in" fo:page-height="11.6929in" style:num-format="1" style:print-orientation="portrait" fo:margin-top="1.1665in" fo:margin-bottom="0.6535in" fo:margin-left="0.3929in" fo:margin-right="0.1965in" style:writing-mode="lr-tb" style:layout-grid-color="#c0c0c0" style:layout-grid-lines="24691"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6">
      <style:page-layout-properties fo:page-width="8.2681in" fo:page-height="11.6929in" style:num-format="1" style:print-orientation="portrait" fo:margin-top="0.611in" fo:margin-bottom="0.6535in" fo:margin-left="0.3929in" fo:margin-right="0.1965in" style:writing-mode="lr-tb" style:layout-grid-color="#c0c0c0" style:layout-grid-lines="2610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page-layout style:name="Mpm17">
      <style:page-layout-properties fo:page-width="8.2681in" fo:page-height="11.6929in" style:num-format="1" style:print-orientation="portrait" fo:margin-top="1.278in" fo:margin-bottom="0.6535in" fo:margin-left="0.3929in" fo:margin-right="0.1965in" style:writing-mode="lr-tb" style:layout-grid-color="#c0c0c0" style:layout-grid-lines="2440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2in" fo:margin-left="0in" fo:margin-right="0in" fo:margin-top="0.112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 loext:marker-style-name="MT1"><draw:frame draw:style-name="Mfr1" draw:name="Frame1" text:anchor-type="char" svg:x="4.0429in" svg:y="10.8661in" svg:width="0.1862in" svg:height="0.1827in"><draw:text-box><text:p text:style-name="MP2" loext:marker-style-name="MT2"><text:span text:style-name="MT3"><text:page-number text:select-page="current">0</text:page-number></text:span></text:p></draw:text-box></draw:frame><draw:custom-shape text:anchor-type="char" draw:z-index="3" draw:name="Textbox 11" draw:style-name="Mgr1" draw:text-style-name="MP3" svg:width="0.185in" svg:height="0.1815in" svg:x="4.0429in" svg:y="10.8661in"><text:p text:style-name="MP2" loext:marker-style-name="MT2"><text:span text:style-name="MT3"><text:page-number text:select-page="current">0</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in" svg:y="0in" svg:width="0.1862in" svg:height="0.1827in"><draw:text-box><text:p text:style-name="MP2" loext:marker-style-name="MT2"><text:span text:style-name="MT3"><text:page-number text:select-page="current">0</text:page-number></text:span></text:p></draw:text-box></draw:frame><draw:frame draw:style-name="Mfr1" draw:name="Frame21" text:anchor-type="char" svg:x="0in" svg:y="0in" svg:width="0.1862in" svg:height="0.1827in"><draw:text-box><text:p text:style-name="MP2" loext:marker-style-name="MT2"><text:span text:style-name="MT3"><text:page-number text:select-page="current">0</text:page-number></text:span></text:p></draw:text-box></draw:frame></text:p>
      </style:footer>
    </style:master-page>
    <style:master-page style:name="Converted2" style:page-layout-name="Mpm3" draw:style-name="Mdp1">
      <style:footer>
        <text:p text:style-name="MP1" loext:marker-style-name="MT1"><draw:custom-shape text:anchor-type="char" draw:z-index="18" draw:name="Textbox 1" draw:style-name="Mgr1" draw:text-style-name="MP3" svg:width="0.185in" svg:height="0.1815in" svg:x="4.0429in" svg:y="10.8661in"><text:p text:style-name="MP2" loext:marker-style-name="MT2"><text:span text:style-name="MT3"><text:page-number text:select-page="current">4</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4" draw:style-name="Mdp1">
      <style:footer>
        <text:p text:style-name="MP1" loext:marker-style-name="MT1"><draw:custom-shape text:anchor-type="char" draw:z-index="19" draw:name="Textbox 2" draw:style-name="Mgr1" draw:text-style-name="MP3" svg:width="0.185in" svg:height="0.1815in" svg:x="4.0429in" svg:y="10.8661in"><text:p text:style-name="MP2" loext:marker-style-name="MT2"><text:span text:style-name="MT3"><text:page-number text:select-page="current">5</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4" draw:style-name="Mdp1">
      <style:footer>
        <text:p text:style-name="MP1" loext:marker-style-name="MT1"><draw:custom-shape text:anchor-type="char" draw:z-index="20" draw:name="Textbox 3" draw:style-name="Mgr1" draw:text-style-name="MP3" svg:width="0.185in" svg:height="0.1815in" svg:x="4.0429in" svg:y="10.8661in"><text:p text:style-name="MP2" loext:marker-style-name="MT2"><text:span text:style-name="MT3"><text:page-number text:select-page="current">6</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5" draw:style-name="Mdp1">
      <style:footer>
        <text:p text:style-name="MP1" loext:marker-style-name="MT1"><draw:custom-shape text:anchor-type="char" draw:z-index="21" draw:name="Textbox 4" draw:style-name="Mgr1" draw:text-style-name="MP3" svg:width="0.185in" svg:height="0.1815in" svg:x="4.0429in" svg:y="10.8661in"><text:p text:style-name="MP2" loext:marker-style-name="MT2"><text:span text:style-name="MT3"><text:page-number text:select-page="current">7</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6" draw:style-name="Mdp1">
      <style:footer>
        <text:p text:style-name="MP1" loext:marker-style-name="MT1"><draw:custom-shape text:anchor-type="char" draw:z-index="22" draw:name="Textbox 5" draw:style-name="Mgr1" draw:text-style-name="MP3" svg:width="0.185in" svg:height="0.1815in" svg:x="4.0429in" svg:y="10.8661in"><text:p text:style-name="MP2" loext:marker-style-name="MT2"><text:span text:style-name="MT3"><text:page-number text:select-page="current">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7" draw:style-name="Mdp1">
      <style:footer>
        <text:p text:style-name="MP1" loext:marker-style-name="MT1"><draw:custom-shape text:anchor-type="char" draw:z-index="23" draw:name="Textbox 6" draw:style-name="Mgr1" draw:text-style-name="MP3" svg:width="0.185in" svg:height="0.1815in" svg:x="4.0429in" svg:y="10.8661in"><text:p text:style-name="MP2" loext:marker-style-name="MT2"><text:span text:style-name="MT3"><text:page-number text:select-page="current">9</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8" draw:style-name="Mdp1">
      <style:footer>
        <text:p text:style-name="MP1" loext:marker-style-name="MT1"><draw:custom-shape text:anchor-type="char" draw:z-index="24" draw:name="Textbox 7" draw:style-name="Mgr1" draw:text-style-name="MP3" svg:width="0.185in" svg:height="0.1815in" svg:x="4.0429in" svg:y="10.8661in"><text:p text:style-name="MP2" loext:marker-style-name="MT2"><text:span text:style-name="MT3"><text:page-number text:select-page="current">10</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7" draw:style-name="Mdp1">
      <style:footer>
        <text:p text:style-name="MP1" loext:marker-style-name="MT1"><draw:custom-shape text:anchor-type="char" draw:z-index="26" draw:name="Textbox 8" draw:style-name="Mgr1" draw:text-style-name="MP3" svg:width="0.185in" svg:height="0.1815in" svg:x="4.0429in" svg:y="10.8661in"><text:p text:style-name="MP2" loext:marker-style-name="MT2"><text:span text:style-name="MT3"><text:page-number text:select-page="current">12</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9" draw:style-name="Mdp1">
      <style:footer>
        <text:p text:style-name="MP1" loext:marker-style-name="MT1"><draw:custom-shape text:anchor-type="char" draw:z-index="27" draw:name="Textbox 10" draw:style-name="Mgr1" draw:text-style-name="MP3" svg:width="0.185in" svg:height="0.1815in" svg:x="4.0429in" svg:y="10.8661in"><text:p text:style-name="MP2" loext:marker-style-name="MT2"><text:span text:style-name="MT3"><text:page-number text:select-page="current">13</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10" draw:style-name="Mdp1">
      <style:footer>
        <text:p text:style-name="MP1" loext:marker-style-name="MT1"><draw:custom-shape text:anchor-type="char" draw:z-index="28" draw:name="Textbox 12" draw:style-name="Mgr1" draw:text-style-name="MP3" svg:width="0.185in" svg:height="0.1815in" svg:x="4.0429in" svg:y="10.8661in"><text:p text:style-name="MP2" loext:marker-style-name="MT2"><text:span text:style-name="MT3"><text:page-number text:select-page="current">14</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10" draw:style-name="Mdp1">
      <style:footer>
        <text:p text:style-name="MP1" loext:marker-style-name="MT1"><draw:custom-shape text:anchor-type="char" draw:z-index="29" draw:name="Textbox 13" draw:style-name="Mgr1" draw:text-style-name="MP3" svg:width="0.185in" svg:height="0.1815in" svg:x="4.0429in" svg:y="10.8661in"><text:p text:style-name="MP2" loext:marker-style-name="MT2"><text:span text:style-name="MT3"><text:page-number text:select-page="current">15</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10" draw:style-name="Mdp1">
      <style:footer>
        <text:p text:style-name="MP1" loext:marker-style-name="MT1"><draw:custom-shape text:anchor-type="char" draw:z-index="30" draw:name="Textbox 14" draw:style-name="Mgr1" draw:text-style-name="MP3" svg:width="0.185in" svg:height="0.1815in" svg:x="4.0429in" svg:y="10.8661in"><text:p text:style-name="MP2" loext:marker-style-name="MT2"><text:span text:style-name="MT3"><text:page-number text:select-page="current">16</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10" draw:style-name="Mdp1">
      <style:footer>
        <text:p text:style-name="MP1" loext:marker-style-name="MT1"><draw:custom-shape text:anchor-type="char" draw:z-index="31" draw:name="Textbox 15" draw:style-name="Mgr1" draw:text-style-name="MP3" svg:width="0.185in" svg:height="0.1815in" svg:x="4.0429in" svg:y="10.8661in"><text:p text:style-name="MP2" loext:marker-style-name="MT2"><text:span text:style-name="MT3"><text:page-number text:select-page="current">17</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10" draw:style-name="Mdp1">
      <style:footer>
        <text:p text:style-name="MP1" loext:marker-style-name="MT1"><draw:custom-shape text:anchor-type="char" draw:z-index="32" draw:name="Textbox 16" draw:style-name="Mgr1" draw:text-style-name="MP3" svg:width="0.185in" svg:height="0.1815in" svg:x="4.0429in" svg:y="10.8661in"><text:p text:style-name="MP2" loext:marker-style-name="MT2"><text:span text:style-name="MT3"><text:page-number text:select-page="current">1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11" draw:style-name="Mdp1">
      <style:footer>
        <text:p text:style-name="MP1" loext:marker-style-name="MT1"><draw:custom-shape text:anchor-type="char" draw:z-index="35" draw:name="Textbox 17" draw:style-name="Mgr1" draw:text-style-name="MP3" svg:width="0.185in" svg:height="0.1815in" svg:x="4.0429in" svg:y="10.8661in"><text:p text:style-name="MP2" loext:marker-style-name="MT2"><text:span text:style-name="MT3"><text:page-number text:select-page="current">25</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10" draw:style-name="Mdp1">
      <style:footer>
        <text:p text:style-name="MP1" loext:marker-style-name="MT1"><draw:custom-shape text:anchor-type="char" draw:z-index="36" draw:name="Textbox 18" draw:style-name="Mgr1" draw:text-style-name="MP3" svg:width="0.185in" svg:height="0.1815in" svg:x="4.0429in" svg:y="10.8661in"><text:p text:style-name="MP2" loext:marker-style-name="MT2"><text:span text:style-name="MT3"><text:page-number text:select-page="current">21</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8" text:anchor-type="char" svg:x="4.0429in" svg:y="10.8661in" svg:width="0.1862in" svg:height="0.1819in"><draw:text-box><text:p text:style-name="MP2" loext:marker-style-name="MT2"><text:span text:style-name="MT3"><text:page-number text:select-page="current">21</text:page-number></text:span></text:p></draw:text-box></draw:frame></text:p>
      </style:footer>
    </style:master-page>
    <style:master-page style:name="Converted18" style:page-layout-name="Mpm12" draw:style-name="Mdp1">
      <style:footer>
        <text:p text:style-name="MP1" loext:marker-style-name="MT1"><draw:custom-shape text:anchor-type="char" draw:z-index="38" draw:name="Textbox 19" draw:style-name="Mgr1" draw:text-style-name="MP3" svg:width="0.185in" svg:height="0.1815in" svg:x="4.0429in" svg:y="10.8661in"><text:p text:style-name="MP2" loext:marker-style-name="MT2"><text:span text:style-name="MT3"><text:page-number text:select-page="current">22</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10" draw:style-name="Mdp1">
      <style:footer>
        <text:p text:style-name="MP1" loext:marker-style-name="MT1"><draw:custom-shape text:anchor-type="char" draw:z-index="40" draw:name="Textbox 20" draw:style-name="Mgr1" draw:text-style-name="MP3" svg:width="0.185in" svg:height="0.1815in" svg:x="4.0429in" svg:y="10.8661in"><text:p text:style-name="MP2" loext:marker-style-name="MT2"><text:span text:style-name="MT3"><text:page-number text:select-page="current">24</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10" draw:style-name="Mdp1">
      <style:footer>
        <text:p text:style-name="MP1" loext:marker-style-name="MT1"><draw:custom-shape text:anchor-type="char" draw:z-index="41" draw:name="Textbox 21" draw:style-name="Mgr1" draw:text-style-name="MP3" svg:width="0.185in" svg:height="0.1815in" svg:x="4.0429in" svg:y="10.8661in"><text:p text:style-name="MP2" loext:marker-style-name="MT2"><text:span text:style-name="MT3"><text:page-number text:select-page="current">24</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2" text:anchor-type="char" svg:x="4.0429in" svg:y="10.8661in" svg:width="0.1862in" svg:height="0.1819in"><draw:text-box><text:p text:style-name="MP2" loext:marker-style-name="MT2"><text:span text:style-name="MT3"><text:page-number text:select-page="current">24</text:page-number></text:span></text:p></draw:text-box></draw:frame></text:p>
      </style:footer>
    </style:master-page>
    <style:master-page style:name="Converted21" style:page-layout-name="Mpm13" draw:style-name="Mdp1">
      <style:footer>
        <text:p text:style-name="MP1" loext:marker-style-name="MT1"><draw:custom-shape text:anchor-type="char" draw:z-index="42" draw:name="Textbox 22" draw:style-name="Mgr1" draw:text-style-name="MP3" svg:width="0.185in" svg:height="0.1815in" svg:x="4.0429in" svg:y="10.8661in"><text:p text:style-name="MP2" loext:marker-style-name="MT2"><text:span text:style-name="MT3"><text:page-number text:select-page="current">25</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3" text:anchor-type="char" svg:x="4.0429in" svg:y="10.8661in" svg:width="0.1862in" svg:height="0.1819in"><draw:text-box><text:p text:style-name="MP2" loext:marker-style-name="MT2"><text:span text:style-name="MT3"><text:page-number text:select-page="current">25</text:page-number></text:span></text:p></draw:text-box></draw:frame></text:p>
      </style:footer>
    </style:master-page>
    <style:master-page style:name="Converted22" style:page-layout-name="Mpm14" draw:style-name="Mdp1">
      <style:footer>
        <text:p text:style-name="MP1" loext:marker-style-name="MT1"><draw:custom-shape text:anchor-type="char" draw:z-index="44" draw:name="Textbox 23" draw:style-name="Mgr1" draw:text-style-name="MP3" svg:width="0.185in" svg:height="0.1815in" svg:x="4.0429in" svg:y="10.8661in"><text:p text:style-name="MP2" loext:marker-style-name="MT2"><text:span text:style-name="MT3"><text:page-number text:select-page="current">27</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15" draw:style-name="Mdp1">
      <style:footer>
        <text:p text:style-name="MP1" loext:marker-style-name="MT1"><draw:custom-shape text:anchor-type="char" draw:z-index="45" draw:name="Textbox 24" draw:style-name="Mgr1" draw:text-style-name="MP3" svg:width="0.185in" svg:height="0.1815in" svg:x="4.0429in" svg:y="10.8661in"><text:p text:style-name="MP2" loext:marker-style-name="MT2"><text:span text:style-name="MT3"><text:page-number text:select-page="current">2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5" text:anchor-type="char" svg:x="4.0429in" svg:y="10.8661in" svg:width="0.1862in" svg:height="0.1819in"><draw:text-box><text:p text:style-name="MP2" loext:marker-style-name="MT2"><text:span text:style-name="MT3"><text:page-number text:select-page="current">28</text:page-number></text:span></text:p></draw:text-box></draw:frame></text:p>
      </style:footer>
    </style:master-page>
    <style:master-page style:name="Converted24" style:page-layout-name="Mpm16" draw:style-name="Mdp1">
      <style:footer>
        <text:p text:style-name="MP1" loext:marker-style-name="MT1"><draw:custom-shape text:anchor-type="char" draw:z-index="46" draw:name="Textbox 25" draw:style-name="Mgr1" draw:text-style-name="MP3" svg:width="0.185in" svg:height="0.1815in" svg:x="4.0429in" svg:y="10.8661in"><text:p text:style-name="MP2" loext:marker-style-name="MT2"><text:span text:style-name="MT3"><text:page-number text:select-page="current">2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10" draw:style-name="Mdp1">
      <style:footer>
        <text:p text:style-name="MP1" loext:marker-style-name="MT1"><draw:custom-shape text:anchor-type="char" draw:z-index="47" draw:name="Textbox 26" draw:style-name="Mgr1" draw:text-style-name="MP3" svg:width="0.185in" svg:height="0.1815in" svg:x="4.0429in" svg:y="10.8661in"><text:p text:style-name="MP2" loext:marker-style-name="MT2"><text:span text:style-name="MT3"><text:page-number text:select-page="current">29</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13" draw:style-name="Mdp1">
      <style:footer>
        <text:p text:style-name="MP1" loext:marker-style-name="MT1"><draw:custom-shape text:anchor-type="char" draw:z-index="50" draw:name="Textbox 27" draw:style-name="Mgr1" draw:text-style-name="MP3" svg:width="0.185in" svg:height="0.1815in" svg:x="4.0429in" svg:y="10.8661in"><text:p text:style-name="MP2" loext:marker-style-name="MT2"><text:span text:style-name="MT3"><text:page-number text:select-page="current">32</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10" draw:style-name="Mdp1">
      <style:footer>
        <text:p text:style-name="MP1" loext:marker-style-name="MT1"><draw:custom-shape text:anchor-type="char" draw:z-index="55" draw:name="Textbox 28" draw:style-name="Mgr1" draw:text-style-name="MP3" svg:width="0.185in" svg:height="0.1815in" svg:x="4.0429in" svg:y="10.8661in"><text:p text:style-name="MP2" loext:marker-style-name="MT2"><text:span text:style-name="MT3"><text:page-number text:select-page="current">32</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9" text:anchor-type="char" svg:x="4.0429in" svg:y="10.8661in" svg:width="0.1862in" svg:height="0.1819in"><draw:text-box><text:p text:style-name="MP2" loext:marker-style-name="MT2"><text:span text:style-name="MT3"><text:page-number text:select-page="current">32</text:page-number></text:span></text:p></draw:text-box></draw:frame></text:p>
      </style:footer>
    </style:master-page>
    <style:master-page style:name="Converted28" style:page-layout-name="Mpm10" draw:style-name="Mdp1">
      <style:footer>
        <text:p text:style-name="MP1" loext:marker-style-name="MT1"><draw:custom-shape text:anchor-type="char" draw:z-index="56" draw:name="Textbox 29" draw:style-name="Mgr1" draw:text-style-name="MP3" svg:width="0.185in" svg:height="0.1815in" svg:x="4.0429in" svg:y="10.8661in"><text:p text:style-name="MP2" loext:marker-style-name="MT2"><text:span text:style-name="MT3"><text:page-number text:select-page="current">33</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9" style:page-layout-name="Mpm17" draw:style-name="Mdp1">
      <style:footer>
        <text:p text:style-name="MP1" loext:marker-style-name="MT1"><draw:custom-shape text:anchor-type="char" draw:z-index="57" draw:name="Textbox 30" draw:style-name="Mgr1" draw:text-style-name="MP3" svg:width="0.185in" svg:height="0.1815in" svg:x="4.0429in" svg:y="10.8661in"><text:p text:style-name="MP2" loext:marker-style-name="MT2"><text:span text:style-name="MT3"><text:page-number text:select-page="current">34</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17" draw:style-name="Mdp1">
      <style:footer>
        <text:p text:style-name="MP1" loext:marker-style-name="MT1"><draw:custom-shape text:anchor-type="char" draw:z-index="58" draw:name="Textbox 31" draw:style-name="Mgr1" draw:text-style-name="MP3" svg:width="0.185in" svg:height="0.1815in" svg:x="4.0429in" svg:y="10.8661in"><text:p text:style-name="MP2" loext:marker-style-name="MT2"><text:span text:style-name="MT3"><text:page-number text:select-page="current">35</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HP</meta:initial-creator>
    <meta:creation-date>2026-05-21T08:44:37</meta:creation-date>
    <dc:date>2026-06-15T19:13:57.002463988</dc:date>
    <meta:editing-duration>PT1H43M16S</meta:editing-duration>
    <meta:generator>LibreOffice/26.2.3.2$Linux_X86_64 LibreOffice_project/620$Build-2</meta:generator>
    <meta:editing-cycles>4</meta:editing-cycles>
    <meta:print-date>2026-06-15T19:13:25.097545691</meta:print-date>
    <meta:printed-by>PDF files</meta:printed-by>
    <meta:document-statistic meta:table-count="2" meta:image-count="21" meta:object-count="0" meta:page-count="35" meta:paragraph-count="545" meta:word-count="6823" meta:character-count="44669" meta:non-whitespace-character-count="38564"/>
    <meta:user-defined meta:name="AppVersion">12.0000</meta:user-defined>
    <meta:user-defined meta:name="Created" meta:value-type="date">2024-06-06T00:00:00</meta:user-defined>
    <meta:user-defined meta:name="Creator">Microsoft® Word 2019</meta:user-defined>
    <meta:user-defined meta:name="LastSaved" meta:value-type="date">2026-05-21T00:00:00</meta:user-defined>
    <meta:user-defined meta:name="Producer" meta:value-type="string">Microsoft® Word 2019</meta:user-defined>
    <meta:template xlink:type="simple" xlink:actuate="onRequest" xlink:title="Normal" xlink:href=""/>
  </office:meta>
</office:document-meta>
</file>